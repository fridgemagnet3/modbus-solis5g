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5.644cm"/>
    </style:style>
    <style:style style:name="co10" style:family="table-column">
      <style:table-column-properties fo:break-before="auto" style:column-width="5.618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11">
      <style:text-properties fo:font-weight="bold" style:font-weight-asian="bold" style:font-weight-complex="bold"/>
    </style:style>
    <style:style style:name="ce6" style:family="table-cell" style:parent-style-name="Default" style:data-style-name="N111"/>
    <style:style style:name="ce7" style:family="table-cell" style:parent-style-name="Default" style:data-style-name="N1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2026-05-14_19-52-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number-columns-repeated="16370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Slav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ddress</text:p>
          </table:table-cell>
          <table:table-cell table:style-name="ce5" table:number-columns-repeated="2"/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2026-May-14 20:01:21.4269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1.635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1.8471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2.0564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2.234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2.4463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2.620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2.8348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3.0719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3.2271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3.4327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3.6472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3.8263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4.0659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4.2463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4.3964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4.5704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4.7559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4.9049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5.0564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5.2304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5.4461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5.6530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5.8333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6.0466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6.2269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6.467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6.5803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6.7067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6.8265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0041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0911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2464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3940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5468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727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9366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8.0803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8.2672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8.3795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8.4756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9.0012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43]-[.A2]" office:value-type="time" office:time-value="PT00H00M07.574252947S" calcext:value-type="time">
            <text:p>00:00:07.57</text:p>
          </table:table-cell>
          <table:table-cell table:formula="of:=[.A43]-[.A42]" office:value-type="time" office:time-value="PT00H00M00.525616994S" calcext:value-type="time">
            <text:p>00:00:00.53</text:p>
          </table:table-cell>
          <table:table-cell office:value-type="string" calcext:value-type="string">
            <text:p>modbus-solis-broadcast answering slave request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4 20:01:29.1664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4]-[.A43]" office:value-type="time" office:time-value="PT00H00M00.165222399S" calcext:value-type="time">
            <text:p>00:00:00.17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2026-May-14 20:01:29.345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9.5256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33.0006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7]-[.A43]" office:value-type="time" office:time-value="PT00H00M03.999395552S" calcext:value-type="time">
            <text:p>00:00:03.99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2026-May-14 20:01:33.1860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33.3667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33.5458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37.0041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1]-[.A50]" office:value-type="time" office:time-value="PT00H00M03.45833092S" calcext:value-type="time">
            <text:p>00:00:03.46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2026-May-14 20:01:37.1757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37.3561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37.5353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1.0053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5]-[.A54]" office:value-type="time" office:time-value="PT00H00M03.469999158S" calcext:value-type="time">
            <text:p>00:00:03.47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2026-May-14 20:01:41.1668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1.34595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1.5263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4.9986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5.1866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5.3657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5.54618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9.0034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9.1725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9.3555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9.5349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3.0049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3.1663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3.34677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3.5258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6.99957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7.18613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7.3664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7.5468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2:01.0028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2:01.1718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2:01.3561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2026-May-14 20:02:01.53537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000" calcext:value-type="float">
            <text:p>33000</text:p>
          </table:table-cell>
          <table:table-cell table:style-name="ce7" table:formula="of:=[.A78]-[.A2]" office:value-type="time" office:time-value="PT00H00M40.108401189S" calcext:value-type="time">
            <text:p>00:00:40.11</text:p>
          </table:table-cell>
          <table:table-cell table:style-name="ce7"/>
          <table:table-cell table:style-name="ce4" office:value-type="string" calcext:value-type="string">
            <text:p>logger active time</text:p>
          </table:table-cell>
          <table:table-cell table:style-name="ce4" table:number-columns-repeated="16377"/>
        </table:table-row>
        <table:table-row table:style-name="ro1">
          <table:table-cell table:style-name="ce2" office:value-type="string" calcext:value-type="string">
            <text:p>2026-May-14 20:02:05.00666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79]-[.A78]" office:value-type="time" office:time-value="PT00H00M03.471296048S" calcext:value-type="time">
            <text:p>00:00:03.47</text:p>
          </table:table-cell>
          <table:table-cell/>
          <table:table-cell office:value-type="string" calcext:value-type="string">
            <text:p>spare bus time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4 20:06:21.4329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1.6371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1.8527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2.0029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2.1530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2.3322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2.5377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2.7522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2.933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3.0515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3.2333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3.4701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3.6523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3.8326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4.0708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4.1918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4.3737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4.5529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4.7014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4.8216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5.0585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5.2429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5.4534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5.6324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5.8367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0526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2630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3817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5017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6229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7679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8916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072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1856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3420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5500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6649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792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9702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8.0850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8.182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9.0065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9.1720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9.3524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9.5313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3.0117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3.1915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3.3708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3.55129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7.0073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7.1814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7.3618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7.5422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1.0108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1.1723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1.3515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1.53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5.01079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5.1911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5.3715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5.5521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9.0057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9.17607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9.3615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9.5355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3.0118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3.1720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3.35115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3.5316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7.0117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7.19209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7.3712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7.5517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7:01.00797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7:01.17567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7:01.3624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2026-May-14 20:07:01.54286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000" calcext:value-type="float">
            <text:p>33000</text:p>
          </table:table-cell>
          <table:table-cell table:style-name="ce7" table:formula="of:=[.A156]-[.A80]" office:value-type="time" office:time-value="PT00H00M40.109925647S" calcext:value-type="time">
            <text:p>00:00:40.11</text:p>
          </table:table-cell>
          <table:table-cell table:style-name="ce7"/>
          <table:table-cell table:style-name="ce4" table:number-columns-repeated="16378"/>
        </table:table-row>
        <table:table-row table:style-name="ro1">
          <table:table-cell table:style-name="ce2" office:value-type="string" calcext:value-type="string">
            <text:p>2026-May-14 20:07:05.0140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157]-[.A156]" office:value-type="time" office:time-value="PT00H00M03.471162147S" calcext:value-type="time">
            <text:p>00:00:03.47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4 20:11:21.4354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1.6487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1.8567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2.0687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2.2491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2.4295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2.6388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2.8495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2.9971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3.148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3.3289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3.5698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3.7489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3.9293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4.0492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4.1984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4.3734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4.559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4.7078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4.8228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5.0674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5.2492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5.4559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5.6364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5.8487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02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2699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3833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5083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6294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7783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8956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0484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1973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3488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5291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6780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7967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9494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8.0970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8.1830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9.0162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9.17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9.3580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9.5384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3.0095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3.1949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3.3779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3.5583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7.0160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7.1885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7.3680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7.5484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1.0168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1.1784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1.35860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1.5391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5.0112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5.1953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5.3783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5.5590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9.01634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9.1891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9.36827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9.54746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3.01599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3.1787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3.35778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3.5382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7.0106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7.19605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7.37909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7.55815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2:01.01434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2:01.18836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2:01.3677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2026-May-14 20:12:01.5480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000" calcext:value-type="float">
            <text:p>33000</text:p>
          </table:table-cell>
          <table:table-cell table:style-name="ce7" table:formula="of:=[.A234]-[.A158]" office:value-type="time" office:time-value="PT00H00M40.112520056S" calcext:value-type="time">
            <text:p>00:00:40.11</text:p>
          </table:table-cell>
          <table:table-cell table:style-name="ce7"/>
          <table:table-cell table:style-name="ce4" table:number-columns-repeated="16378"/>
        </table:table-row>
        <table:table-row table:style-name="ro1">
          <table:table-cell table:style-name="ce2" office:value-type="string" calcext:value-type="string">
            <text:p>2026-May-14 20:12:05.01805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235]-[.A234]" office:value-type="time" office:time-value="PT00H00M03.470043791S" calcext:value-type="time">
            <text:p>00:00:03.47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4 20:16:21.4375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1.6544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1.8346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2.0744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2.2548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2.4350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2.6392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2.8537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3.0642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3.2433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3.4527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3.6649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3.8438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3.9943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4.139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4.2867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4.4747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4.6538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4.8039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4.9238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5.0436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5.2531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5.4336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5.6378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5.8536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0326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2736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3871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5122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6323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7801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8735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0542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1677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3504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5334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682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7734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9551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8.0736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8.1935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 table:number-rows-repeated="104829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4T21:00:36.604630150</dc:date>
    <dc:creator>jon bird</dc:creator>
    <meta:editing-duration>PT36M9S</meta:editing-duration>
    <meta:editing-cycles>5</meta:editing-cycles>
    <meta:generator>LibreOffice/7.4.7.2$Linux_x86 LibreOffice_project/40$Build-2</meta:generator>
    <meta:document-statistic meta:table-count="1" meta:cell-count="1119" meta:object-count="0"/>
  </office:meta>
</office:document-meta>
</file>