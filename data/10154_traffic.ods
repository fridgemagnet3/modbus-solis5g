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2026-05-11_18-06-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6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1"/>
          <table:table-cell table:style-name="ce5" office:value-type="string" calcext:value-type="string">
            <text:p>Delta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2.6617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6-May-11 18:08:52.7273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3]-[.A2]" office:value-type="time" office:time-value="PT00H00M00.065607042S" calcext:value-type="time">
            <text:p>00:00:00.07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2.8801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formula="of:=[.A4]-[.A3]" office:value-type="time" office:time-value="PT00H00M00.152737554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3.0907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formula="of:=[.A5]-[.A4]" office:value-type="time" office:time-value="PT00H00M00.210665097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3.300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6]-[.A5]" office:value-type="time" office:time-value="PT00H00M00.20931540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3.480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7]-[.A6]" office:value-type="time" office:time-value="PT00H00M00.18040475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3.7149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]-[.A7]" office:value-type="time" office:time-value="PT00H00M00.234459224S" calcext:value-type="time">
            <text:p>00:00:00.23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3.9004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9]-[.A8]" office:value-type="time" office:time-value="PT00H00M00.185514987S" calcext:value-type="time">
            <text:p>00:00:00.1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4.0808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10]-[.A9]" office:value-type="time" office:time-value="PT00H00M00.180369546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4.285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1]-[.A10]" office:value-type="time" office:time-value="PT00H00M00.204321463S" calcext:value-type="time">
            <text:p>00:00:00.2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4.5008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2]-[.A11]" office:value-type="time" office:time-value="PT00H00M00.215721899S" calcext:value-type="time">
            <text:p>00:00:00.2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4.7102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3]-[.A12]" office:value-type="time" office:time-value="PT00H00M00.209335517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4.8905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14]-[.A13]" office:value-type="time" office:time-value="PT00H00M00.18035823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5.0987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5]-[.A14]" office:value-type="time" office:time-value="PT00H00M00.20813229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5.310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16]-[.A15]" office:value-type="time" office:time-value="PT00H00M00.21200473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5.4898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17]-[.A16]" office:value-type="time" office:time-value="PT00H00M00.179124833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5.70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18]-[.A17]" office:value-type="time" office:time-value="PT00H00M00.210600346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5.8808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19]-[.A18]" office:value-type="time" office:time-value="PT00H00M00.180438068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0599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20]-[.A19]" office:value-type="time" office:time-value="PT00H00M00.179066998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205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21]-[.A20]" office:value-type="time" office:time-value="PT00H00M00.145158637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3893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22]-[.A21]" office:value-type="time" office:time-value="PT00H00M00.184247014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5395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23]-[.A22]" office:value-type="time" office:time-value="PT00H00M00.15022235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6898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24]-[.A23]" office:value-type="time" office:time-value="PT00H00M00.150248758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6.896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25]-[.A24]" office:value-type="time" office:time-value="PT00H00M00.206736079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7.080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26]-[.A25]" office:value-type="time" office:time-value="PT00H00M00.1842489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7.2863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27]-[.A26]" office:value-type="time" office:time-value="PT00H00M00.205505197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7.4983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28]-[.A27]" office:value-type="time" office:time-value="PT00H00M00.211996562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7.7103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29]-[.A28]" office:value-type="time" office:time-value="PT00H00M00.212023593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7.860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30]-[.A29]" office:value-type="time" office:time-value="PT00H00M00.150148803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0105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31]-[.A30]" office:value-type="time" office:time-value="PT00H00M00.150055136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129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32]-[.A31]" office:value-type="time" office:time-value="PT00H00M00.118647516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249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33]-[.A32]" office:value-type="time" office:time-value="PT00H00M00.119922403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3702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34]-[.A33]" office:value-type="time" office:time-value="PT00H00M00.121185975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5153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35]-[.A34]" office:value-type="time" office:time-value="PT00H00M00.145056169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640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36]-[.A35]" office:value-type="time" office:time-value="PT00H00M00.124950917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785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37]-[.A36]" office:value-type="time" office:time-value="PT00H00M00.14486569S" calcext:value-type="time">
            <text:p>00:00:00.14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8.9340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38]-[.A37]" office:value-type="time" office:time-value="PT00H00M00.148905977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090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39]-[.A38]" office:value-type="time" office:time-value="PT00H00M00.156457862S" calcext:value-type="time">
            <text:p>00:00:00.16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2960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40]-[.A39]" office:value-type="time" office:time-value="PT00H00M00.205500168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4197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41]-[.A40]" office:value-type="time" office:time-value="PT00H00M00.123760267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5976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42]-[.A41]" office:value-type="time" office:time-value="PT00H00M00.177882635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810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43]-[.A42]" office:value-type="time" office:time-value="PT00H00M00.213276478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8:59.927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44]-[.A43]" office:value-type="time" office:time-value="PT00H00M00.116093969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00.045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45]-[.A44]" office:value-type="time" office:time-value="PT00H00M00.1187569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00.6760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46]-[.A45]" office:value-type="time" office:time-value="PT00H00M00.630274066S" calcext:value-type="time">
            <text:p>00:00:00.63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03.682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47]-[.A46]" office:value-type="time" office:time-value="PT00H00M03.00610985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06.6897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48]-[.A47]" office:value-type="time" office:time-value="PT00H00M03.00751423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09.6984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49]-[.A48]" office:value-type="time" office:time-value="PT00H00M03.00870237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13.6759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0]-[.A49]" office:value-type="time" office:time-value="PT00H00M03.977584164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16.6808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1]-[.A50]" office:value-type="time" office:time-value="PT00H00M03.004829935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19.6907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2]-[.A51]" office:value-type="time" office:time-value="PT00H00M03.00998040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22.6995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3]-[.A52]" office:value-type="time" office:time-value="PT00H00M03.00872752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26.6771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4]-[.A53]" office:value-type="time" office:time-value="PT00H00M03.977634455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29.6806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5]-[.A54]" office:value-type="time" office:time-value="PT00H00M03.003533673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32.6906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56]-[.A55]" office:value-type="time" office:time-value="PT00H00M03.00996846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35.6981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57]-[.A56]" office:value-type="time" office:time-value="PT00H00M03.00747966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39.6769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58]-[.A57]" office:value-type="time" office:time-value="PT00H00M03.978833905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42.6805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59]-[.A58]" office:value-type="time" office:time-value="PT00H00M03.003616026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45.6905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0]-[.A59]" office:value-type="time" office:time-value="PT00H00M03.00997286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48.698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1]-[.A60]" office:value-type="time" office:time-value="PT00H00M03.00744320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52.6768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2]-[.A61]" office:value-type="time" office:time-value="PT00H00M03.978865338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55.6804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3]-[.A62]" office:value-type="time" office:time-value="PT00H00M03.003580822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09:58.6904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4]-[.A63]" office:value-type="time" office:time-value="PT00H00M03.00996657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01.6991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5]-[.A64]" office:value-type="time" office:time-value="PT00H00M03.00873443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05.6779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66]-[.A65]" office:value-type="time" office:time-value="PT00H00M03.978837049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08.6815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67]-[.A66]" office:value-type="time" office:time-value="PT00H00M03.003606596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11.6891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68]-[.A67]" office:value-type="time" office:time-value="PT00H00M03.00752052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14.6978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69]-[.A68]" office:value-type="time" office:time-value="PT00H00M03.008691687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18.6778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0]-[.A69]" office:value-type="time" office:time-value="PT00H00M03.980067931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21.6827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1]-[.A70]" office:value-type="time" office:time-value="PT00H00M03.004839364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24.6914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2]-[.A71]" office:value-type="time" office:time-value="PT00H00M03.00870488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27.6989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3]-[.A72]" office:value-type="time" office:time-value="PT00H00M03.00750166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31.6777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4]-[.A73]" office:value-type="time" office:time-value="PT00H00M03.978821961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34.6813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5]-[.A74]" office:value-type="time" office:time-value="PT00H00M03.003608482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37.6913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76]-[.A75]" office:value-type="time" office:time-value="PT00H00M03.00997977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40.6999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77]-[.A76]" office:value-type="time" office:time-value="PT00H00M03.00860116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44.6775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78]-[.A77]" office:value-type="time" office:time-value="PT00H00M03.977587936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47.682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79]-[.A78]" office:value-type="time" office:time-value="PT00H00M03.004860738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50.6923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80]-[.A79]" office:value-type="time" office:time-value="PT00H00M03.009958402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53.6998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81]-[.A80]" office:value-type="time" office:time-value="PT00H00M03.00747274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0:57.6824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82]-[.A81]" office:value-type="time" office:time-value="PT00H00M03.982590046S" calcext:value-type="time">
            <text:p>00:00:03.98</text:p>
          </table:table-cell>
          <table:table-cell/>
        </table:table-row>
        <table:table-row table:style-name="ro1">
          <table:table-cell table:style-name="ce3" office:value-type="string" calcext:value-type="string">
            <text:p>2026-May-11 18:13:53.0948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50" calcext:value-type="float">
            <text:p>33050</text:p>
          </table:table-cell>
          <table:table-cell table:style-name="ce4"/>
          <table:table-cell table:style-name="ce7" table:formula="of:=[.A83]-[.A82]" office:value-type="time" office:time-value="PT00H02M55.412423001S" calcext:value-type="time">
            <text:p>00:02:55.41</text:p>
          </table:table-cell>
          <table:table-cell table:formula="of:=SUM([.F6:.F83])" office:value-type="time" office:time-value="PT00H05M00.00404818S" calcext:value-type="time">
            <text:p>00:05:00.00</text:p>
          </table:table-cell>
        </table:table-row>
        <table:table-row table:style-name="ro1">
          <table:table-cell table:style-name="ce2" office:value-type="string" calcext:value-type="string">
            <text:p>2026-May-11 18:13:53.301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84]-[.A83]" office:value-type="time" office:time-value="PT00H00M00.20658520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3.485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85]-[.A84]" office:value-type="time" office:time-value="PT00H00M00.184242614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3.6596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86]-[.A85]" office:value-type="time" office:time-value="PT00H00M00.174005167S" calcext:value-type="time">
            <text:p>00:00:00.17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3.7846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87]-[.A86]" office:value-type="time" office:time-value="PT00H00M00.124993036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3.995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88]-[.A87]" office:value-type="time" office:time-value="PT00H00M00.210749963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4.1693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89]-[.A88]" office:value-type="time" office:time-value="PT00H00M00.173993851S" calcext:value-type="time">
            <text:p>00:00:00.17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4.3851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90]-[.A89]" office:value-type="time" office:time-value="PT00H00M00.215750816S" calcext:value-type="time">
            <text:p>00:00:00.2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4.5957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91]-[.A90]" office:value-type="time" office:time-value="PT00H00M00.21060537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4.7156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92]-[.A91]" office:value-type="time" office:time-value="PT00H00M00.119884685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4.894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93]-[.A92]" office:value-type="time" office:time-value="PT00H00M00.179012306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5.1027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94]-[.A93]" office:value-type="time" office:time-value="PT00H00M00.20810903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5.283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95]-[.A94]" office:value-type="time" office:time-value="PT00H00M00.180504075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5.4953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96]-[.A95]" office:value-type="time" office:time-value="PT00H00M00.21204308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5.704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97]-[.A96]" office:value-type="time" office:time-value="PT00H00M00.209326716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5.854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98]-[.A97]" office:value-type="time" office:time-value="PT00H00M00.150126801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004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99]-[.A98]" office:value-type="time" office:time-value="PT00H00M00.150123029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185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100]-[.A99]" office:value-type="time" office:time-value="PT00H00M00.180505333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334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101]-[.A100]" office:value-type="time" office:time-value="PT00H00M00.14887454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4856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102]-[.A101]" office:value-type="time" office:time-value="PT00H00M00.151372142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6948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103]-[.A102]" office:value-type="time" office:time-value="PT00H00M00.20923493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6.875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104]-[.A103]" office:value-type="time" office:time-value="PT00H00M00.180407264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7.084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105]-[.A104]" office:value-type="time" office:time-value="PT00H00M00.20935500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7.295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106]-[.A105]" office:value-type="time" office:time-value="PT00H00M00.210612919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7.5007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107]-[.A106]" office:value-type="time" office:time-value="PT00H00M00.2055039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7.6850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108]-[.A107]" office:value-type="time" office:time-value="PT00H00M00.184331252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7.8956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109]-[.A108]" office:value-type="time" office:time-value="PT00H00M00.21054251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0445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110]-[.A109]" office:value-type="time" office:time-value="PT00H00M00.148896547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1342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111]-[.A110]" office:value-type="time" office:time-value="PT00H00M00.089723663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2844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112]-[.A111]" office:value-type="time" office:time-value="PT00H00M00.150232413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4294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113]-[.A112]" office:value-type="time" office:time-value="PT00H00M00.145017821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524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114]-[.A113]" office:value-type="time" office:time-value="PT00H00M00.094754691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704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115]-[.A114]" office:value-type="time" office:time-value="PT00H00M00.180365145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8244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116]-[.A115]" office:value-type="time" office:time-value="PT00H00M00.119875255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8.9745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117]-[.A116]" office:value-type="time" office:time-value="PT00H00M00.150107942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180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118]-[.A117]" office:value-type="time" office:time-value="PT00H00M00.205527828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328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119]-[.A118]" office:value-type="time" office:time-value="PT00H00M00.148868258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423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120]-[.A119]" office:value-type="time" office:time-value="PT00H00M00.094769779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6028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121]-[.A120]" office:value-type="time" office:time-value="PT00H00M00.179083971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7177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122]-[.A121]" office:value-type="time" office:time-value="PT00H00M00.114895147S" calcext:value-type="time">
            <text:p>00:00:00.1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3:59.844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123]-[.A122]" office:value-type="time" office:time-value="PT00H00M00.126274838S" calcext:value-type="time">
            <text:p>00:00:00.13</text:p>
          </table:table-cell>
          <table:table-cell table:formula="of:=[.A123]-[.A83]" office:value-type="time" office:time-value="PT00H00M06.7491889S" calcext:value-type="time">
            <text:p>00:00:06.75</text:p>
          </table:table-cell>
        </table:table-row>
        <table:table-row table:style-name="ro1">
          <table:table-cell table:style-name="ce2" office:value-type="string" calcext:value-type="string">
            <text:p>2026-May-11 18:14:00.6807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4]-[.A123]" office:value-type="time" office:time-value="PT00H00M00.836759317S" calcext:value-type="time">
            <text:p>00:00:00.8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2026-May-11 18:14:03.6857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5]-[.A124]" office:value-type="time" office:time-value="PT00H00M03.004968865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06.6932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26]-[.A125]" office:value-type="time" office:time-value="PT00H00M03.00747400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09.7032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27]-[.A126]" office:value-type="time" office:time-value="PT00H00M03.00999360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13.6807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28]-[.A127]" office:value-type="time" office:time-value="PT00H00M03.977573477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16.6857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29]-[.A128]" office:value-type="time" office:time-value="PT00H00M03.004977037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19.6945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0]-[.A129]" office:value-type="time" office:time-value="PT00H00M03.00877341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22.7032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1]-[.A130]" office:value-type="time" office:time-value="PT00H00M03.00868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26.6820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32]-[.A131]" office:value-type="time" office:time-value="PT00H00M03.978845221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29.6856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33]-[.A132]" office:value-type="time" office:time-value="PT00H00M03.003588994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32.694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4]-[.A133]" office:value-type="time" office:time-value="PT00H00M03.00874826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35.7030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5]-[.A134]" office:value-type="time" office:time-value="PT00H00M03.00869294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39.6819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36]-[.A135]" office:value-type="time" office:time-value="PT00H00M03.978844592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42.6867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37]-[.A136]" office:value-type="time" office:time-value="PT00H00M03.004842508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45.6942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38]-[.A137]" office:value-type="time" office:time-value="PT00H00M03.007464577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48.7042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39]-[.A138]" office:value-type="time" office:time-value="PT00H00M03.010004922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52.6818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0]-[.A139]" office:value-type="time" office:time-value="PT00H00M03.977596108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55.6879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1]-[.A140]" office:value-type="time" office:time-value="PT00H00M03.0060639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4:58.6953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42]-[.A141]" office:value-type="time" office:time-value="PT00H00M03.00748909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01.704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43]-[.A142]" office:value-type="time" office:time-value="PT00H00M03.00871180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05.6817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4]-[.A143]" office:value-type="time" office:time-value="PT00H00M03.977597994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08.6877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5]-[.A144]" office:value-type="time" office:time-value="PT00H00M03.00609036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11.6952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46]-[.A145]" office:value-type="time" office:time-value="PT00H00M03.00746520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14.7052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47]-[.A146]" office:value-type="time" office:time-value="PT00H00M03.01000052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18.6828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48]-[.A147]" office:value-type="time" office:time-value="PT00H00M03.977555246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21.6863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49]-[.A148]" office:value-type="time" office:time-value="PT00H00M03.003485268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24.696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0]-[.A149]" office:value-type="time" office:time-value="PT00H00M03.00995085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27.7049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1]-[.A150]" office:value-type="time" office:time-value="PT00H00M03.00873066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31.6826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2]-[.A151]" office:value-type="time" office:time-value="PT00H00M03.977616224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34.6861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3]-[.A152]" office:value-type="time" office:time-value="PT00H00M03.003565106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37.6961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4]-[.A153]" office:value-type="time" office:time-value="PT00H00M03.0099640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40.7048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5]-[.A154]" office:value-type="time" office:time-value="PT00H00M03.00873506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44.6824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156]-[.A155]" office:value-type="time" office:time-value="PT00H00M03.97761371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47.6860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157]-[.A156]" office:value-type="time" office:time-value="PT00H00M03.003575164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50.6973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158]-[.A157]" office:value-type="time" office:time-value="PT00H00M03.01124586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53.7047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159]-[.A158]" office:value-type="time" office:time-value="PT00H00M03.00747212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5:57.68859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formula="of:=[.A160]-[.A159]" office:value-type="time" office:time-value="PT00H00M03.983822814S" calcext:value-type="time">
            <text:p>00:00:03.98</text:p>
          </table:table-cell>
          <table:table-cell/>
        </table:table-row>
        <table:table-row table:style-name="ro1">
          <table:table-cell table:style-name="ce3" office:value-type="string" calcext:value-type="string">
            <text:p>2026-May-11 18:18:53.1784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50" calcext:value-type="float">
            <text:p>33050</text:p>
          </table:table-cell>
          <table:table-cell table:style-name="ce4"/>
          <table:table-cell table:style-name="ce7" table:formula="of:=[.A161]-[.A160]" office:value-type="time" office:time-value="PT00H02M55.489869271S" calcext:value-type="time">
            <text:p>00:02:55.49</text:p>
          </table:table-cell>
          <table:table-cell table:formula="of:=SUM([.F84:.F161])" office:value-type="time" office:time-value="PT00H05M00.083638122S" calcext:value-type="time">
            <text:p>00:05:00.08</text:p>
          </table:table-cell>
        </table:table-row>
        <table:table-row table:style-name="ro1">
          <table:table-cell table:style-name="ce2" office:value-type="string" calcext:value-type="string">
            <text:p>2026-May-11 18:18:53.3852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formula="of:=[.A162]-[.A161]" office:value-type="time" office:time-value="PT00H00M00.20676185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3.5985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formula="of:=[.A163]-[.A162]" office:value-type="time" office:time-value="PT00H00M00.213297852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3.8064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formula="of:=[.A164]-[.A163]" office:value-type="time" office:time-value="PT00H00M00.207970105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3.9857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formula="of:=[.A165]-[.A164]" office:value-type="time" office:time-value="PT00H00M00.179256219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4.1990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A166]-[.A165]" office:value-type="time" office:time-value="PT00H00M00.213292823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4.378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formula="of:=[.A167]-[.A166]" office:value-type="time" office:time-value="PT00H00M00.179055682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4.649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38" calcext:value-type="float">
            <text:p>33238</text:p>
          </table:table-cell>
          <table:table-cell/>
          <table:table-cell table:formula="of:=[.A168]-[.A167]" office:value-type="time" office:time-value="PT00H00M00.2711443S" calcext:value-type="time">
            <text:p>00:00:00.27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4.799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formula="of:=[.A169]-[.A168]" office:value-type="time" office:time-value="PT00H00M00.150116743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4.978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[.A170]-[.A169]" office:value-type="time" office:time-value="PT00H00M00.179107231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5.1839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formula="of:=[.A171]-[.A170]" office:value-type="time" office:time-value="PT00H00M00.20548319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5.3997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38" calcext:value-type="float">
            <text:p>33338</text:p>
          </table:table-cell>
          <table:table-cell/>
          <table:table-cell table:formula="of:=[.A172]-[.A171]" office:value-type="time" office:time-value="PT00H00M00.215769676S" calcext:value-type="time">
            <text:p>00:00:00.2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5.578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60" calcext:value-type="float">
            <text:p>33460</text:p>
          </table:table-cell>
          <table:table-cell/>
          <table:table-cell table:formula="of:=[.A173]-[.A172]" office:value-type="time" office:time-value="PT00H00M00.179122947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5.723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/>
          <table:table-cell table:formula="of:=[.A174]-[.A173]" office:value-type="time" office:time-value="PT00H00M00.145118404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5.8792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30" calcext:value-type="float">
            <text:p>33530</text:p>
          </table:table-cell>
          <table:table-cell/>
          <table:table-cell table:formula="of:=[.A175]-[.A174]" office:value-type="time" office:time-value="PT00H00M00.155255897S" calcext:value-type="time">
            <text:p>00:00:00.16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0583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40" calcext:value-type="float">
            <text:p>33540</text:p>
          </table:table-cell>
          <table:table-cell/>
          <table:table-cell table:formula="of:=[.A176]-[.A175]" office:value-type="time" office:time-value="PT00H00M00.179112889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2059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76" calcext:value-type="float">
            <text:p>33576</text:p>
          </table:table-cell>
          <table:table-cell/>
          <table:table-cell table:formula="of:=[.A177]-[.A176]" office:value-type="time" office:time-value="PT00H00M00.14762166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3888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40" calcext:value-type="float">
            <text:p>34240</text:p>
          </table:table-cell>
          <table:table-cell/>
          <table:table-cell table:formula="of:=[.A178]-[.A177]" office:value-type="time" office:time-value="PT00H00M00.182872172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5377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75" calcext:value-type="float">
            <text:p>34275</text:p>
          </table:table-cell>
          <table:table-cell/>
          <table:table-cell table:formula="of:=[.A179]-[.A178]" office:value-type="time" office:time-value="PT00H00M00.148877059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6890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25" calcext:value-type="float">
            <text:p>34325</text:p>
          </table:table-cell>
          <table:table-cell/>
          <table:table-cell table:formula="of:=[.A180]-[.A179]" office:value-type="time" office:time-value="PT00H00M00.1513822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6.8971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45" calcext:value-type="float">
            <text:p>34345</text:p>
          </table:table-cell>
          <table:table-cell/>
          <table:table-cell table:formula="of:=[.A181]-[.A180]" office:value-type="time" office:time-value="PT00H00M00.208038627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7.0788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66" calcext:value-type="float">
            <text:p>34366</text:p>
          </table:table-cell>
          <table:table-cell/>
          <table:table-cell table:formula="of:=[.A182]-[.A181]" office:value-type="time" office:time-value="PT00H00M00.181695982S" calcext:value-type="time">
            <text:p>00:00:00.1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7.288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91" calcext:value-type="float">
            <text:p>34391</text:p>
          </table:table-cell>
          <table:table-cell/>
          <table:table-cell table:formula="of:=[.A183]-[.A182]" office:value-type="time" office:time-value="PT00H00M00.20946816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7.4989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16" calcext:value-type="float">
            <text:p>34416</text:p>
          </table:table-cell>
          <table:table-cell/>
          <table:table-cell table:formula="of:=[.A184]-[.A183]" office:value-type="time" office:time-value="PT00H00M00.21066824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7.7095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41" calcext:value-type="float">
            <text:p>34441</text:p>
          </table:table-cell>
          <table:table-cell/>
          <table:table-cell table:formula="of:=[.A185]-[.A184]" office:value-type="time" office:time-value="PT00H00M00.21061669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7.858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7" calcext:value-type="float">
            <text:p>34457</text:p>
          </table:table-cell>
          <table:table-cell/>
          <table:table-cell table:formula="of:=[.A186]-[.A185]" office:value-type="time" office:time-value="PT00H00M00.14886511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003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90" calcext:value-type="float">
            <text:p>34490</text:p>
          </table:table-cell>
          <table:table-cell/>
          <table:table-cell table:formula="of:=[.A187]-[.A186]" office:value-type="time" office:time-value="PT00H00M00.14512280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1286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2" calcext:value-type="float">
            <text:p>34502</text:p>
          </table:table-cell>
          <table:table-cell/>
          <table:table-cell table:formula="of:=[.A188]-[.A187]" office:value-type="time" office:time-value="PT00H00M00.125077274S" calcext:value-type="time">
            <text:p>00:00:00.13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2421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09" calcext:value-type="float">
            <text:p>34509</text:p>
          </table:table-cell>
          <table:table-cell/>
          <table:table-cell table:formula="of:=[.A189]-[.A188]" office:value-type="time" office:time-value="PT00H00M00.113546709S" calcext:value-type="time">
            <text:p>00:00:00.1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3949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0" calcext:value-type="float">
            <text:p>34700</text:p>
          </table:table-cell>
          <table:table-cell/>
          <table:table-cell table:formula="of:=[.A190]-[.A189]" office:value-type="time" office:time-value="PT00H00M00.15274635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5175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00" calcext:value-type="float">
            <text:p>34800</text:p>
          </table:table-cell>
          <table:table-cell/>
          <table:table-cell table:formula="of:=[.A191]-[.A190]" office:value-type="time" office:time-value="PT00H00M00.122631225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667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A192]-[.A191]" office:value-type="time" office:time-value="PT00H00M00.150150689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7864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73" calcext:value-type="float">
            <text:p>43073</text:p>
          </table:table-cell>
          <table:table-cell/>
          <table:table-cell table:formula="of:=[.A193]-[.A192]" office:value-type="time" office:time-value="PT00H00M00.118711009S" calcext:value-type="time">
            <text:p>00:00:00.12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8.932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00" calcext:value-type="float">
            <text:p>43800</text:p>
          </table:table-cell>
          <table:table-cell/>
          <table:table-cell table:formula="of:=[.A194]-[.A193]" office:value-type="time" office:time-value="PT00H00M00.146405236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0892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45" calcext:value-type="float">
            <text:p>43245</text:p>
          </table:table-cell>
          <table:table-cell/>
          <table:table-cell table:formula="of:=[.A195]-[.A194]" office:value-type="time" office:time-value="PT00H00M00.156462891S" calcext:value-type="time">
            <text:p>00:00:00.16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297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02" calcext:value-type="float">
            <text:p>43302</text:p>
          </table:table-cell>
          <table:table-cell/>
          <table:table-cell table:formula="of:=[.A196]-[.A195]" office:value-type="time" office:time-value="PT00H00M00.208138581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445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41" calcext:value-type="float">
            <text:p>43341</text:p>
          </table:table-cell>
          <table:table-cell/>
          <table:table-cell table:formula="of:=[.A197]-[.A196]" office:value-type="time" office:time-value="PT00H00M00.147679495S" calcext:value-type="time">
            <text:p>00:00:00.15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537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65" calcext:value-type="float">
            <text:p>43365</text:p>
          </table:table-cell>
          <table:table-cell/>
          <table:table-cell table:formula="of:=[.A198]-[.A197]" office:value-type="time" office:time-value="PT00H00M00.092362077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7441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483" calcext:value-type="float">
            <text:p>43483</text:p>
          </table:table-cell>
          <table:table-cell/>
          <table:table-cell table:formula="of:=[.A199]-[.A198]" office:value-type="time" office:time-value="PT00H00M00.206698989S" calcext:value-type="time">
            <text:p>00:00:00.2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8377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85" calcext:value-type="float">
            <text:p>43885</text:p>
          </table:table-cell>
          <table:table-cell/>
          <table:table-cell table:formula="of:=[.A200]-[.A199]" office:value-type="time" office:time-value="PT00H00M00.093529467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8:59.9285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380" calcext:value-type="float">
            <text:p>43380</text:p>
          </table:table-cell>
          <table:table-cell/>
          <table:table-cell table:formula="of:=[.A201]-[.A200]" office:value-type="time" office:time-value="PT00H00M00.090856478S" calcext:value-type="time">
            <text:p>00:00:00.09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00.6859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2]-[.A201]" office:value-type="time" office:time-value="PT00H00M00.757405744S" calcext:value-type="time">
            <text:p>00:00:00.76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03.692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3]-[.A202]" office:value-type="time" office:time-value="PT00H00M03.00610985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06.7007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4]-[.A203]" office:value-type="time" office:time-value="PT00H00M03.00872311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09.708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5]-[.A204]" office:value-type="time" office:time-value="PT00H00M03.00746583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13.687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06]-[.A205]" office:value-type="time" office:time-value="PT00H00M03.978842078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16.69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07]-[.A206]" office:value-type="time" office:time-value="PT00H00M03.004843136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19.7006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08]-[.A207]" office:value-type="time" office:time-value="PT00H00M03.00872689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22.70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09]-[.A208]" office:value-type="time" office:time-value="PT00H00M03.006469435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26.686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0]-[.A209]" office:value-type="time" office:time-value="PT00H00M03.978880425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29.6908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1]-[.A210]" office:value-type="time" office:time-value="PT00H00M03.00480416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32.6995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2]-[.A211]" office:value-type="time" office:time-value="PT00H00M03.008765238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35.7070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3]-[.A212]" office:value-type="time" office:time-value="PT00H00M03.00742560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39.6858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4]-[.A213]" office:value-type="time" office:time-value="PT00H00M03.978852136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42.6919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5]-[.A214]" office:value-type="time" office:time-value="PT00H00M03.00609727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45.7007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16]-[.A215]" office:value-type="time" office:time-value="PT00H00M03.00874763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48.709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17]-[.A216]" office:value-type="time" office:time-value="PT00H00M03.00868414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52.6870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18]-[.A217]" office:value-type="time" office:time-value="PT00H00M03.97763697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55.690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19]-[.A218]" office:value-type="time" office:time-value="PT00H00M03.003550018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19:58.7005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0]-[.A219]" office:value-type="time" office:time-value="PT00H00M03.009975376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01.7080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1]-[.A220]" office:value-type="time" office:time-value="PT00H00M03.007505438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05.6868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2]-[.A221]" office:value-type="time" office:time-value="PT00H00M03.978804359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08.6929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3]-[.A222]" office:value-type="time" office:time-value="PT00H00M03.006097907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11.7004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4]-[.A223]" office:value-type="time" office:time-value="PT00H00M03.007477778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14.7091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5]-[.A224]" office:value-type="time" office:time-value="PT00H00M03.008721233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18.6867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26]-[.A225]" office:value-type="time" office:time-value="PT00H00M03.977577877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21.6916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27]-[.A226]" office:value-type="time" office:time-value="PT00H00M03.004855081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24.7003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28]-[.A227]" office:value-type="time" office:time-value="PT00H00M03.008713061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27.7090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29]-[.A228]" office:value-type="time" office:time-value="PT00H00M03.00877403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31.6866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30]-[.A229]" office:value-type="time" office:time-value="PT00H00M03.977582906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34.6914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31]-[.A230]" office:value-type="time" office:time-value="PT00H00M03.004807304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37.7028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2]-[.A231]" office:value-type="time" office:time-value="PT00H00M03.011354618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40.7091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33]-[.A232]" office:value-type="time" office:time-value="PT00H00M03.00627518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44.6878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A234]-[.A233]" office:value-type="time" office:time-value="PT00H00M03.978784243S" calcext:value-type="time">
            <text:p>00:00:03.98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47.6926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A235]-[.A234]" office:value-type="time" office:time-value="PT00H00M03.004751983S" calcext:value-type="time">
            <text:p>00:00:03.00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50.7001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A236]-[.A235]" office:value-type="time" office:time-value="PT00H00M03.007456404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53.7100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A237]-[.A236]" office:value-type="time" office:time-value="PT00H00M03.009955259S" calcext:value-type="time">
            <text:p>00:00:03.01</text:p>
          </table:table-cell>
          <table:table-cell/>
        </table:table-row>
        <table:table-row table:style-name="ro1">
          <table:table-cell table:style-name="ce2" office:value-type="string" calcext:value-type="string">
            <text:p>2026-May-11 18:20:57.6926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A238]-[.A237]" office:value-type="time" office:time-value="PT00H00M03.982586903S" calcext:value-type="time">
            <text:p>00:00:03.98</text:p>
          </table:table-cell>
          <table:table-cell/>
        </table:table-row>
        <table:table-row table:style-name="ro1" table:number-rows-repeated="10483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1T18:32:37.247602374</dc:date>
    <dc:creator>jon bird</dc:creator>
    <meta:editing-duration>PT8M55S</meta:editing-duration>
    <meta:editing-cycles>2</meta:editing-cycles>
    <meta:generator>LibreOffice/7.4.7.2$Linux_x86 LibreOffice_project/40$Build-2</meta:generator>
    <meta:document-statistic meta:table-count="1" meta:cell-count="1191" meta:object-count="0"/>
  </office:meta>
</office:document-meta>
</file>