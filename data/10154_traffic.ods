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98cm"/>
    </style:style>
    <style:style style:name="co2" style:family="table-column">
      <style:table-column-properties fo:break-before="auto" style:column-width="1.143cm"/>
    </style:style>
    <style:style style:name="co3" style:family="table-column">
      <style:table-column-properties fo:break-before="auto" style:column-width="1.625cm"/>
    </style:style>
    <style:style style:name="co4" style:family="table-column">
      <style:table-column-properties fo:break-before="auto" style:column-width="1.5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fo:background-color="#ffff00"/>
    </style:style>
    <style:style style:name="ce3" style:family="table-cell" style:parent-style-name="Default">
      <style:table-cell-properties fo:background-color="#ffff00"/>
    </style:style>
    <style:style style:name="ce9" style:family="table-cell" style:parent-style-name="Default" style:data-style-name="N119"/>
    <style:style style:name="ce10" style:family="table-cell" style:parent-style-name="Default" style:data-style-name="N119">
      <style:table-cell-properties fo:background-color="#ffff00"/>
    </style:style>
    <style:style style:name="ce4" style:family="table-cell" style:parent-style-name="Default" style:data-style-name="N61"/>
    <style:style style:name="ce5" style:family="table-cell" style:parent-style-name="Default" style:data-style-name="N61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2026-03-29_20-10-3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9"/>
        <table:table-column table:style-name="co5" table:default-cell-style-name="ce4"/>
        <table:table-column table:style-name="co5" table:number-columns-repeated="1017" table:default-cell-style-name="Default"/>
        <table:table-column table:style-name="co5" table:number-columns-repeated="15360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Slave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Address</text:p>
          </table:table-cell>
          <table:table-cell table:number-columns-repeated="1020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10:31.4724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72" calcext:value-type="float">
            <text:p>3072</text:p>
          </table:table-cell>
          <table:table-cell table:number-columns-repeated="1020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10:32.2532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481" calcext:value-type="float">
            <text:p>43481</text:p>
          </table:table-cell>
          <table:table-cell/>
          <table:table-cell table:formula="of:=[.A3]-[.A2]" office:value-type="time" office:time-value="PT00H00M00.780799426S" calcext:value-type="time">
            <text:p>00:00:00.78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10:32.5611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141" calcext:value-type="float">
            <text:p>43141</text:p>
          </table:table-cell>
          <table:table-cell/>
          <table:table-cell table:formula="of:=[.A4]-[.A3]" office:value-type="time" office:time-value="PT00H00M00.307902927S" calcext:value-type="time">
            <text:p>00:00:00.308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10:33.02326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5]-[.A4]" office:value-type="time" office:time-value="PT00H00M00.462082587S" calcext:value-type="time">
            <text:p>00:00:00.46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2" office:value-type="string" calcext:value-type="string">
            <text:p>2026-Mar-29 20:13:54.16040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3000" calcext:value-type="float">
            <text:p>33000</text:p>
          </table:table-cell>
          <table:table-cell table:style-name="ce3"/>
          <table:table-cell table:style-name="ce10" table:formula="of:=[.A6]-[.A5]" office:value-type="time" office:time-value="PT00H03M21.137141394S" calcext:value-type="time">
            <text:p>00:03:21.137</text:p>
          </table:table-cell>
          <table:table-cell table:style-name="ce5"/>
          <table:table-cell table:style-name="ce3" table:number-columns-repeated="1017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13:54.41400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25" calcext:value-type="float">
            <text:p>33025</text:p>
          </table:table-cell>
          <table:table-cell/>
          <table:table-cell table:formula="of:=[.A7]-[.A6]" office:value-type="time" office:time-value="PT00H00M00.253600138S" calcext:value-type="time">
            <text:p>00:00:00.254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13:54.61840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/>
          <table:table-cell table:formula="of:=[.A8]-[.A7]" office:value-type="time" office:time-value="PT00H00M00.204401929S" calcext:value-type="time">
            <text:p>00:00:00.204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13:54.8219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/>
          <table:table-cell table:formula="of:=[.A9]-[.A8]" office:value-type="time" office:time-value="PT00H00M00.203518686S" calcext:value-type="time">
            <text:p>00:00:00.204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13:55.04732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/>
          <table:table-cell table:formula="of:=[.A10]-[.A9]" office:value-type="time" office:time-value="PT00H00M00.225401111S" calcext:value-type="time">
            <text:p>00:00:00.225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13:55.2239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/>
          <table:table-cell table:formula="of:=[.A11]-[.A10]" office:value-type="time" office:time-value="PT00H00M00.176576944S" calcext:value-type="time">
            <text:p>00:00:00.177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13:55.42888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/>
          <table:table-cell table:formula="of:=[.A12]-[.A11]" office:value-type="time" office:time-value="PT00H00M00.204982166S" calcext:value-type="time">
            <text:p>00:00:00.205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13:55.62629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/>
          <table:table-cell table:formula="of:=[.A13]-[.A12]" office:value-type="time" office:time-value="PT00H00M00.197413936S" calcext:value-type="time">
            <text:p>00:00:00.197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13:55.83389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38" calcext:value-type="float">
            <text:p>33238</text:p>
          </table:table-cell>
          <table:table-cell/>
          <table:table-cell table:formula="of:=[.A14]-[.A13]" office:value-type="time" office:time-value="PT00H00M00.207599835S" calcext:value-type="time">
            <text:p>00:00:00.208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13:56.032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/>
          <table:table-cell table:formula="of:=[.A15]-[.A14]" office:value-type="time" office:time-value="PT00H00M00.198517204S" calcext:value-type="time">
            <text:p>00:00:00.199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13:56.2308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75" calcext:value-type="float">
            <text:p>33275</text:p>
          </table:table-cell>
          <table:table-cell/>
          <table:table-cell table:formula="of:=[.A16]-[.A15]" office:value-type="time" office:time-value="PT00H00M00.198434223S" calcext:value-type="time">
            <text:p>00:00:00.198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13:56.43512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17]-[.A16]" office:value-type="time" office:time-value="PT00H00M00.2042718S" calcext:value-type="time">
            <text:p>00:00:00.204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13:57.16212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18]-[.A17]" office:value-type="time" office:time-value="PT00H00M00.727005838S" calcext:value-type="time">
            <text:p>00:00:00.727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14:00.17346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19]-[.A18]" office:value-type="time" office:time-value="PT00H00M03.011338902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14:03.18504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20]-[.A19]" office:value-type="time" office:time-value="PT00H00M03.0115759S" calcext:value-type="time">
            <text:p>00:00:03.01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14:09.25743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21]-[.A20]" office:value-type="time" office:time-value="PT00H00M06.072394014S" calcext:value-type="time">
            <text:p>00:00:06.07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14:13.1810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22]-[.A21]" office:value-type="time" office:time-value="PT00H00M03.923586267S" calcext:value-type="time">
            <text:p>00:00:03.924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14:16.19238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23]-[.A22]" office:value-type="time" office:time-value="PT00H00M03.011359018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14:19.20105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24]-[.A23]" office:value-type="time" office:time-value="PT00H00M03.008677228S" calcext:value-type="time">
            <text:p>00:00:03.009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14:25.27303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25]-[.A24]" office:value-type="time" office:time-value="PT00H00M06.071975967S" calcext:value-type="time">
            <text:p>00:00:06.07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14:29.19304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26]-[.A25]" office:value-type="time" office:time-value="PT00H00M03.920009919S" calcext:value-type="time">
            <text:p>00:00:03.92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14:32.20460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27]-[.A26]" office:value-type="time" office:time-value="PT00H00M03.011560813S" calcext:value-type="time">
            <text:p>00:00:03.01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14:35.2130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28]-[.A27]" office:value-type="time" office:time-value="PT00H00M03.008405026S" calcext:value-type="time">
            <text:p>00:00:03.008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14:41.28509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29]-[.A28]" office:value-type="time" office:time-value="PT00H00M06.072084722S" calcext:value-type="time">
            <text:p>00:00:06.07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14:45.20837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30]-[.A29]" office:value-type="time" office:time-value="PT00H00M03.923281375S" calcext:value-type="time">
            <text:p>00:00:03.923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14:48.21707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31]-[.A30]" office:value-type="time" office:time-value="PT00H00M03.008694202S" calcext:value-type="time">
            <text:p>00:00:03.009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14:51.22849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32]-[.A31]" office:value-type="time" office:time-value="PT00H00M03.011424397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14:57.30129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33]-[.A32]" office:value-type="time" office:time-value="PT00H00M06.072798232S" calcext:value-type="time">
            <text:p>00:00:06.073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15:01.22109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34]-[.A33]" office:value-type="time" office:time-value="PT00H00M03.919796809S" calcext:value-type="time">
            <text:p>00:00:03.92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15:04.23330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35]-[.A34]" office:value-type="time" office:time-value="PT00H00M03.012213344S" calcext:value-type="time">
            <text:p>00:00:03.01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15:07.24109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36]-[.A35]" office:value-type="time" office:time-value="PT00H00M03.007790213S" calcext:value-type="time">
            <text:p>00:00:03.008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15:13.31314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37]-[.A36]" office:value-type="time" office:time-value="PT00H00M06.072049518S" calcext:value-type="time">
            <text:p>00:00:06.07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15:17.23706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38]-[.A37]" office:value-type="time" office:time-value="PT00H00M03.923924477S" calcext:value-type="time">
            <text:p>00:00:03.924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15:20.24842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39]-[.A38]" office:value-type="time" office:time-value="PT00H00M03.011356504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15:23.25979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40]-[.A39]" office:value-type="time" office:time-value="PT00H00M03.011374106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15:29.32909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41]-[.A40]" office:value-type="time" office:time-value="PT00H00M06.06929292S" calcext:value-type="time">
            <text:p>00:00:06.069</text:p>
          </table:table-cell>
          <table:table-cell/>
          <table:table-cell office:value-type="string" calcext:value-type="string">
            <text:p>we may be just coming out of a reset here</text:p>
          </table:table-cell>
          <table:table-cell table:number-columns-repeated="1016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15:33.2521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22" calcext:value-type="float">
            <text:p>33022</text:p>
          </table:table-cell>
          <table:table-cell/>
          <table:table-cell table:formula="of:=[.A42]-[.A41]" office:value-type="time" office:time-value="PT00H00M03.923072037S" calcext:value-type="time">
            <text:p>00:00:03.923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15:33.5822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07" calcext:value-type="float">
            <text:p>43007</text:p>
          </table:table-cell>
          <table:table-cell/>
          <table:table-cell table:formula="of:=[.A43]-[.A42]" office:value-type="time" office:time-value="PT00H00M00.330041209S" calcext:value-type="time">
            <text:p>00:00:00.33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15:33.9725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74" calcext:value-type="float">
            <text:p>43074</text:p>
          </table:table-cell>
          <table:table-cell/>
          <table:table-cell table:formula="of:=[.A44]-[.A43]" office:value-type="time" office:time-value="PT00H00M00.390323647S" calcext:value-type="time">
            <text:p>00:00:00.39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15:34.37244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481" calcext:value-type="float">
            <text:p>43481</text:p>
          </table:table-cell>
          <table:table-cell/>
          <table:table-cell table:formula="of:=[.A45]-[.A44]" office:value-type="time" office:time-value="PT00H00M00.399917993S" calcext:value-type="time">
            <text:p>00:00:00.40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15:34.5803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141" calcext:value-type="float">
            <text:p>43141</text:p>
          </table:table-cell>
          <table:table-cell/>
          <table:table-cell table:formula="of:=[.A46]-[.A45]" office:value-type="time" office:time-value="PT00H00M00.207867008S" calcext:value-type="time">
            <text:p>00:00:00.208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15:34.94187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47]-[.A46]" office:value-type="time" office:time-value="PT00H00M00.361561356S" calcext:value-type="time">
            <text:p>00:00:00.36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2" office:value-type="string" calcext:value-type="string">
            <text:p>2026-Mar-29 20:18:54.37858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3000" calcext:value-type="float">
            <text:p>33000</text:p>
          </table:table-cell>
          <table:table-cell table:style-name="ce3"/>
          <table:table-cell table:style-name="ce10" table:formula="of:=[.A48]-[.A47]" office:value-type="time" office:time-value="PT00H03M19.43671308S" calcext:value-type="time">
            <text:p>00:03:19.437</text:p>
          </table:table-cell>
          <table:table-cell table:style-name="ce5" table:formula="of:=[.A48]-[.A6]" office:value-type="time" office:time-value="PT00H05M00.218184013S" calcext:value-type="time">
            <text:p>00:05:00</text:p>
          </table:table-cell>
          <table:table-cell table:style-name="ce3" table:number-columns-repeated="1017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18:54.53304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25" calcext:value-type="float">
            <text:p>33025</text:p>
          </table:table-cell>
          <table:table-cell/>
          <table:table-cell table:formula="of:=[.A49]-[.A48]" office:value-type="time" office:time-value="PT00H00M00.154460664S" calcext:value-type="time">
            <text:p>00:00:00.154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18:54.73706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/>
          <table:table-cell table:formula="of:=[.A50]-[.A49]" office:value-type="time" office:time-value="PT00H00M00.204014056S" calcext:value-type="time">
            <text:p>00:00:00.204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18:54.9410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/>
          <table:table-cell table:formula="of:=[.A51]-[.A50]" office:value-type="time" office:time-value="PT00H00M00.204003998S" calcext:value-type="time">
            <text:p>00:00:00.204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18:55.1458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/>
          <table:table-cell table:formula="of:=[.A52]-[.A51]" office:value-type="time" office:time-value="PT00H00M00.20479043S" calcext:value-type="time">
            <text:p>00:00:00.205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18:55.34369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/>
          <table:table-cell table:formula="of:=[.A53]-[.A52]" office:value-type="time" office:time-value="PT00H00M00.197840785S" calcext:value-type="time">
            <text:p>00:00:00.198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18:55.54757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/>
          <table:table-cell table:formula="of:=[.A54]-[.A53]" office:value-type="time" office:time-value="PT00H00M00.203877641S" calcext:value-type="time">
            <text:p>00:00:00.204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18:55.74567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/>
          <table:table-cell table:formula="of:=[.A55]-[.A54]" office:value-type="time" office:time-value="PT00H00M00.198096014S" calcext:value-type="time">
            <text:p>00:00:00.198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18:55.95587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38" calcext:value-type="float">
            <text:p>33238</text:p>
          </table:table-cell>
          <table:table-cell/>
          <table:table-cell table:formula="of:=[.A56]-[.A55]" office:value-type="time" office:time-value="PT00H00M00.210198015S" calcext:value-type="time">
            <text:p>00:00:00.21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18:56.13907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/>
          <table:table-cell table:formula="of:=[.A57]-[.A56]" office:value-type="time" office:time-value="PT00H00M00.18320221S" calcext:value-type="time">
            <text:p>00:00:00.183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18:56.352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75" calcext:value-type="float">
            <text:p>33275</text:p>
          </table:table-cell>
          <table:table-cell/>
          <table:table-cell table:formula="of:=[.A58]-[.A57]" office:value-type="time" office:time-value="PT00H00M00.213427981S" calcext:value-type="time">
            <text:p>00:00:00.213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18:56.55669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59]-[.A58]" office:value-type="time" office:time-value="PT00H00M00.204196363S" calcext:value-type="time">
            <text:p>00:00:00.204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18:57.38586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60]-[.A59]" office:value-type="time" office:time-value="PT00H00M00.829168456S" calcext:value-type="time">
            <text:p>00:00:00.829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19:00.39700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61]-[.A60]" office:value-type="time" office:time-value="PT00H00M03.011136479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19:03.40736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62]-[.A61]" office:value-type="time" office:time-value="PT00H00M03.01036262S" calcext:value-type="time">
            <text:p>00:00:03.01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19:09.47709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63]-[.A62]" office:value-type="time" office:time-value="PT00H00M06.069726055S" calcext:value-type="time">
            <text:p>00:00:06.07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19:13.40104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64]-[.A63]" office:value-type="time" office:time-value="PT00H00M03.923952137S" calcext:value-type="time">
            <text:p>00:00:03.924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19:16.4124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65]-[.A64]" office:value-type="time" office:time-value="PT00H00M03.011369077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19:19.42100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66]-[.A65]" office:value-type="time" office:time-value="PT00H00M03.008593619S" calcext:value-type="time">
            <text:p>00:00:03.009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19:25.49395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67]-[.A66]" office:value-type="time" office:time-value="PT00H00M06.072950363S" calcext:value-type="time">
            <text:p>00:00:06.073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19:29.41704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68]-[.A67]" office:value-type="time" office:time-value="PT00H00M03.923087125S" calcext:value-type="time">
            <text:p>00:00:03.923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19:32.4286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69]-[.A68]" office:value-type="time" office:time-value="PT00H00M03.0115715S" calcext:value-type="time">
            <text:p>00:00:03.01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19:35.43794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70]-[.A69]" office:value-type="time" office:time-value="PT00H00M03.009325988S" calcext:value-type="time">
            <text:p>00:00:03.009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19:41.50902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71]-[.A70]" office:value-type="time" office:time-value="PT00H00M06.071083294S" calcext:value-type="time">
            <text:p>00:00:06.07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19:45.42905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72]-[.A71]" office:value-type="time" office:time-value="PT00H00M03.920028149S" calcext:value-type="time">
            <text:p>00:00:03.92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19:48.44051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73]-[.A72]" office:value-type="time" office:time-value="PT00H00M03.011467773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19:51.45033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74]-[.A73]" office:value-type="time" office:time-value="PT00H00M03.009815072S" calcext:value-type="time">
            <text:p>00:00:03.01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19:57.52105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75]-[.A74]" office:value-type="time" office:time-value="PT00H00M06.070718681S" calcext:value-type="time">
            <text:p>00:00:06.07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20:01.44436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76]-[.A75]" office:value-type="time" office:time-value="PT00H00M03.923315322S" calcext:value-type="time">
            <text:p>00:00:03.923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20:04.45573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77]-[.A76]" office:value-type="time" office:time-value="PT00H00M03.011367191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20:07.46673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78]-[.A77]" office:value-type="time" office:time-value="PT00H00M03.010995663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20:13.54019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79]-[.A78]" office:value-type="time" office:time-value="PT00H00M06.073462078S" calcext:value-type="time">
            <text:p>00:00:06.073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20:17.46106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80]-[.A79]" office:value-type="time" office:time-value="PT00H00M03.920876188S" calcext:value-type="time">
            <text:p>00:00:03.92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20:20.47195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81]-[.A80]" office:value-type="time" office:time-value="PT00H00M03.010883764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20:23.48117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82]-[.A81]" office:value-type="time" office:time-value="PT00H00M03.00922289S" calcext:value-type="time">
            <text:p>00:00:03.009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20:29.55303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83]-[.A82]" office:value-type="time" office:time-value="PT00H00M06.071859039S" calcext:value-type="time">
            <text:p>00:00:06.07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20:33.47303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84]-[.A83]" office:value-type="time" office:time-value="PT00H00M03.91999546S" calcext:value-type="time">
            <text:p>00:00:03.92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20:36.48434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22" calcext:value-type="float">
            <text:p>33022</text:p>
          </table:table-cell>
          <table:table-cell/>
          <table:table-cell table:formula="of:=[.A85]-[.A84]" office:value-type="time" office:time-value="PT00H00M03.011317528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20:37.00464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86]-[.A85]" office:value-type="time" office:time-value="PT00H00M00.52029239S" calcext:value-type="time">
            <text:p>00:00:00.52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20:37.19416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87]-[.A86]" office:value-type="time" office:time-value="PT00H00M00.189520069S" calcext:value-type="time">
            <text:p>00:00:00.19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20:40.20519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88]-[.A87]" office:value-type="time" office:time-value="PT00H00M03.011036525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20:43.21650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89]-[.A88]" office:value-type="time" office:time-value="PT00H00M03.011306212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20:46.22505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22" calcext:value-type="float">
            <text:p>33022</text:p>
          </table:table-cell>
          <table:table-cell/>
          <table:table-cell table:formula="of:=[.A90]-[.A89]" office:value-type="time" office:time-value="PT00H00M03.008552128S" calcext:value-type="time">
            <text:p>00:00:03.009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20:46.41316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07" calcext:value-type="float">
            <text:p>43007</text:p>
          </table:table-cell>
          <table:table-cell/>
          <table:table-cell table:formula="of:=[.A91]-[.A90]" office:value-type="time" office:time-value="PT00H00M00.188105623S" calcext:value-type="time">
            <text:p>00:00:00.188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20:46.70319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74" calcext:value-type="float">
            <text:p>43074</text:p>
          </table:table-cell>
          <table:table-cell/>
          <table:table-cell table:formula="of:=[.A92]-[.A91]" office:value-type="time" office:time-value="PT00H00M00.290036271S" calcext:value-type="time">
            <text:p>00:00:00.29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20:47.0040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481" calcext:value-type="float">
            <text:p>43481</text:p>
          </table:table-cell>
          <table:table-cell/>
          <table:table-cell table:formula="of:=[.A93]-[.A92]" office:value-type="time" office:time-value="PT00H00M00.300821266S" calcext:value-type="time">
            <text:p>00:00:00.30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20:47.2119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141" calcext:value-type="float">
            <text:p>43141</text:p>
          </table:table-cell>
          <table:table-cell/>
          <table:table-cell table:formula="of:=[.A94]-[.A93]" office:value-type="time" office:time-value="PT00H00M00.207963819S" calcext:value-type="time">
            <text:p>00:00:00.208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20:47.57303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95]-[.A94]" office:value-type="time" office:time-value="PT00H00M00.361052155S" calcext:value-type="time">
            <text:p>00:00:00.36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2" office:value-type="string" calcext:value-type="string">
            <text:p>2026-Mar-29 20:23:54.60449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3000" calcext:value-type="float">
            <text:p>33000</text:p>
          </table:table-cell>
          <table:table-cell table:style-name="ce3"/>
          <table:table-cell table:style-name="ce10" table:formula="of:=[.A96]-[.A95]" office:value-type="time" office:time-value="PT00H03M07.031455734S" calcext:value-type="time">
            <text:p>00:03:07.031</text:p>
          </table:table-cell>
          <table:table-cell table:style-name="ce5" table:formula="of:=[.A96]-[.A48]" office:value-type="time" office:time-value="PT00H05M00.22590186S" calcext:value-type="time">
            <text:p>00:05:00</text:p>
          </table:table-cell>
          <table:table-cell table:style-name="ce3" table:number-columns-repeated="1017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23:54.85945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25" calcext:value-type="float">
            <text:p>33025</text:p>
          </table:table-cell>
          <table:table-cell/>
          <table:table-cell table:formula="of:=[.A97]-[.A96]" office:value-type="time" office:time-value="PT00H00M00.254961778S" calcext:value-type="time">
            <text:p>00:00:00.255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23:55.06344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/>
          <table:table-cell table:formula="of:=[.A98]-[.A97]" office:value-type="time" office:time-value="PT00H00M00.203991425S" calcext:value-type="time">
            <text:p>00:00:00.204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23:55.26683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/>
          <table:table-cell table:formula="of:=[.A99]-[.A98]" office:value-type="time" office:time-value="PT00H00M00.203388557S" calcext:value-type="time">
            <text:p>00:00:00.203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23:55.4802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/>
          <table:table-cell table:formula="of:=[.A100]-[.A99]" office:value-type="time" office:time-value="PT00H00M00.213417923S" calcext:value-type="time">
            <text:p>00:00:00.213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23:55.66898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/>
          <table:table-cell table:formula="of:=[.A101]-[.A100]" office:value-type="time" office:time-value="PT00H00M00.188735523S" calcext:value-type="time">
            <text:p>00:00:00.189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23:55.87568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/>
          <table:table-cell table:formula="of:=[.A102]-[.A101]" office:value-type="time" office:time-value="PT00H00M00.206697732S" calcext:value-type="time">
            <text:p>00:00:00.207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23:56.0753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/>
          <table:table-cell table:formula="of:=[.A103]-[.A102]" office:value-type="time" office:time-value="PT00H00M00.199641217S" calcext:value-type="time">
            <text:p>00:00:00.20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23:56.2836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38" calcext:value-type="float">
            <text:p>33238</text:p>
          </table:table-cell>
          <table:table-cell/>
          <table:table-cell table:formula="of:=[.A104]-[.A103]" office:value-type="time" office:time-value="PT00H00M00.208331575S" calcext:value-type="time">
            <text:p>00:00:00.208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23:56.4812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/>
          <table:table-cell table:formula="of:=[.A105]-[.A104]" office:value-type="time" office:time-value="PT00H00M00.197547209S" calcext:value-type="time">
            <text:p>00:00:00.198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23:56.68073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75" calcext:value-type="float">
            <text:p>33275</text:p>
          </table:table-cell>
          <table:table-cell/>
          <table:table-cell table:formula="of:=[.A106]-[.A105]" office:value-type="time" office:time-value="PT00H00M00.199529319S" calcext:value-type="time">
            <text:p>00:00:00.20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23:56.88417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107]-[.A106]" office:value-type="time" office:time-value="PT00H00M00.203441991S" calcext:value-type="time">
            <text:p>00:00:00.203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23:57.61543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108]-[.A107]" office:value-type="time" office:time-value="PT00H00M00.731256721S" calcext:value-type="time">
            <text:p>00:00:00.73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24:00.62647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109]-[.A108]" office:value-type="time" office:time-value="PT00H00M03.011042182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24:03.63700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110]-[.A109]" office:value-type="time" office:time-value="PT00H00M03.010536125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24:09.7091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111]-[.A110]" office:value-type="time" office:time-value="PT00H00M06.072110496S" calcext:value-type="time">
            <text:p>00:00:06.07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24:13.62918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112]-[.A111]" office:value-type="time" office:time-value="PT00H00M03.920066496S" calcext:value-type="time">
            <text:p>00:00:03.92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24:16.64067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113]-[.A112]" office:value-type="time" office:time-value="PT00H00M03.01148789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24:19.64914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114]-[.A113]" office:value-type="time" office:time-value="PT00H00M03.00846789S" calcext:value-type="time">
            <text:p>00:00:03.008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24:25.72126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115]-[.A114]" office:value-type="time" office:time-value="PT00H00M06.072121812S" calcext:value-type="time">
            <text:p>00:00:06.07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24:29.64123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116]-[.A115]" office:value-type="time" office:time-value="PT00H00M03.9199722S" calcext:value-type="time">
            <text:p>00:00:03.92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24:32.65086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117]-[.A116]" office:value-type="time" office:time-value="PT00H00M03.009632137S" calcext:value-type="time">
            <text:p>00:00:03.01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24:35.66216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118]-[.A117]" office:value-type="time" office:time-value="PT00H00M03.011293011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24:41.73447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119]-[.A118]" office:value-type="time" office:time-value="PT00H00M06.072309776S" calcext:value-type="time">
            <text:p>00:00:06.07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24:45.65705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120]-[.A119]" office:value-type="time" office:time-value="PT00H00M03.922584211S" calcext:value-type="time">
            <text:p>00:00:03.923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24:48.66565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121]-[.A120]" office:value-type="time" office:time-value="PT00H00M03.008598019S" calcext:value-type="time">
            <text:p>00:00:03.009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24:51.6770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122]-[.A121]" office:value-type="time" office:time-value="PT00H00M03.011366562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24:57.74907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123]-[.A122]" office:value-type="time" office:time-value="PT00H00M06.072053919S" calcext:value-type="time">
            <text:p>00:00:06.07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25:01.6730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124]-[.A123]" office:value-type="time" office:time-value="PT00H00M03.923940193S" calcext:value-type="time">
            <text:p>00:00:03.924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25:04.68436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125]-[.A124]" office:value-type="time" office:time-value="PT00H00M03.011347074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25:07.69474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126]-[.A125]" office:value-type="time" office:time-value="PT00H00M03.010385251S" calcext:value-type="time">
            <text:p>00:00:03.01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25:13.76505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127]-[.A126]" office:value-type="time" office:time-value="PT00H00M06.070310064S" calcext:value-type="time">
            <text:p>00:00:06.07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25:17.68632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128]-[.A127]" office:value-type="time" office:time-value="PT00H00M03.921266575S" calcext:value-type="time">
            <text:p>00:00:03.92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25:20.69701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129]-[.A128]" office:value-type="time" office:time-value="PT00H00M03.010693914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25:23.7083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130]-[.A129]" office:value-type="time" office:time-value="PT00H00M03.011293011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25:29.78038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131]-[.A130]" office:value-type="time" office:time-value="PT00H00M06.072071521S" calcext:value-type="time">
            <text:p>00:00:06.07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25:33.70101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132]-[.A131]" office:value-type="time" office:time-value="PT00H00M03.920637933S" calcext:value-type="time">
            <text:p>00:00:03.92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25:36.71255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133]-[.A132]" office:value-type="time" office:time-value="PT00H00M03.011531895S" calcext:value-type="time">
            <text:p>00:00:03.01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25:39.72378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134]-[.A133]" office:value-type="time" office:time-value="PT00H00M03.011237062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25:45.79376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22" calcext:value-type="float">
            <text:p>33022</text:p>
          </table:table-cell>
          <table:table-cell/>
          <table:table-cell table:formula="of:=[.A135]-[.A134]" office:value-type="time" office:time-value="PT00H00M06.06997374S" calcext:value-type="time">
            <text:p>00:00:06.07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25:48.4412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07" calcext:value-type="float">
            <text:p>43007</text:p>
          </table:table-cell>
          <table:table-cell/>
          <table:table-cell table:formula="of:=[.A136]-[.A135]" office:value-type="time" office:time-value="PT00H00M02.647447167S" calcext:value-type="time">
            <text:p>00:00:02.647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25:48.7332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74" calcext:value-type="float">
            <text:p>43074</text:p>
          </table:table-cell>
          <table:table-cell/>
          <table:table-cell table:formula="of:=[.A137]-[.A136]" office:value-type="time" office:time-value="PT00H00M00.292005809S" calcext:value-type="time">
            <text:p>00:00:00.29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25:49.1334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481" calcext:value-type="float">
            <text:p>43481</text:p>
          </table:table-cell>
          <table:table-cell/>
          <table:table-cell table:formula="of:=[.A138]-[.A137]" office:value-type="time" office:time-value="PT00H00M00.400234829S" calcext:value-type="time">
            <text:p>00:00:00.40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25:49.34144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141" calcext:value-type="float">
            <text:p>43141</text:p>
          </table:table-cell>
          <table:table-cell/>
          <table:table-cell table:formula="of:=[.A139]-[.A138]" office:value-type="time" office:time-value="PT00H00M00.207996508S" calcext:value-type="time">
            <text:p>00:00:00.208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25:49.8040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140]-[.A139]" office:value-type="time" office:time-value="PT00H00M00.462573557S" calcext:value-type="time">
            <text:p>00:00:00.463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2" office:value-type="string" calcext:value-type="string">
            <text:p>2026-Mar-29 20:28:54.83839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3000" calcext:value-type="float">
            <text:p>33000</text:p>
          </table:table-cell>
          <table:table-cell table:style-name="ce3"/>
          <table:table-cell table:style-name="ce10" table:formula="of:=[.A141]-[.A140]" office:value-type="time" office:time-value="PT00H03M05.034379084S" calcext:value-type="time">
            <text:p>00:03:05.034</text:p>
          </table:table-cell>
          <table:table-cell table:style-name="ce5"/>
          <table:table-cell table:style-name="ce3" table:number-columns-repeated="16377"/>
        </table:table-row>
        <table:table-row table:style-name="ro1">
          <table:table-cell table:style-name="ce1" office:value-type="string" calcext:value-type="string">
            <text:p>2026-Mar-29 20:28:55.09319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25" calcext:value-type="float">
            <text:p>33025</text:p>
          </table:table-cell>
          <table:table-cell/>
          <table:table-cell table:formula="of:=[.A142]-[.A141]" office:value-type="time" office:time-value="PT00H00M00.25479896S" calcext:value-type="time">
            <text:p>00:00:00.255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28:55.2979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/>
          <table:table-cell table:formula="of:=[.A143]-[.A142]" office:value-type="time" office:time-value="PT00H00M00.204716879S" calcext:value-type="time">
            <text:p>00:00:00.205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28:55.52850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/>
          <table:table-cell table:formula="of:=[.A144]-[.A143]" office:value-type="time" office:time-value="PT00H00M00.230589299S" calcext:value-type="time">
            <text:p>00:00:00.23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28:55.80528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/>
          <table:table-cell table:formula="of:=[.A145]-[.A144]" office:value-type="time" office:time-value="PT00H00M00.276776939S" calcext:value-type="time">
            <text:p>00:00:00.277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28:56.00152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/>
          <table:table-cell table:formula="of:=[.A146]-[.A145]" office:value-type="time" office:time-value="PT00H00M00.196245289S" calcext:value-type="time">
            <text:p>00:00:00.196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28:56.2060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/>
          <table:table-cell table:formula="of:=[.A147]-[.A146]" office:value-type="time" office:time-value="PT00H00M00.204538973S" calcext:value-type="time">
            <text:p>00:00:00.205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28:56.4024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/>
          <table:table-cell table:formula="of:=[.A148]-[.A147]" office:value-type="time" office:time-value="PT00H00M00.196356559S" calcext:value-type="time">
            <text:p>00:00:00.196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28:56.6117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38" calcext:value-type="float">
            <text:p>33238</text:p>
          </table:table-cell>
          <table:table-cell/>
          <table:table-cell table:formula="of:=[.A149]-[.A148]" office:value-type="time" office:time-value="PT00H00M00.209292141S" calcext:value-type="time">
            <text:p>00:00:00.209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28:56.79532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/>
          <table:table-cell table:formula="of:=[.A150]-[.A149]" office:value-type="time" office:time-value="PT00H00M00.183607056S" calcext:value-type="time">
            <text:p>00:00:00.184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28:57.00862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75" calcext:value-type="float">
            <text:p>33275</text:p>
          </table:table-cell>
          <table:table-cell/>
          <table:table-cell table:formula="of:=[.A151]-[.A150]" office:value-type="time" office:time-value="PT00H00M00.213306025S" calcext:value-type="time">
            <text:p>00:00:00.213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28:57.2124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152]-[.A151]" office:value-type="time" office:time-value="PT00H00M00.203833007S" calcext:value-type="time">
            <text:p>00:00:00.204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28:57.84520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153]-[.A152]" office:value-type="time" office:time-value="PT00H00M00.632742117S" calcext:value-type="time">
            <text:p>00:00:00.633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29:00.85658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154]-[.A153]" office:value-type="time" office:time-value="PT00H00M03.011377878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29:03.86886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155]-[.A154]" office:value-type="time" office:time-value="PT00H00M03.012285009S" calcext:value-type="time">
            <text:p>00:00:03.01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29:09.93704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156]-[.A155]" office:value-type="time" office:time-value="PT00H00M06.068180222S" calcext:value-type="time">
            <text:p>00:00:06.068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29:13.85720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157]-[.A156]" office:value-type="time" office:time-value="PT00H00M03.92016205S" calcext:value-type="time">
            <text:p>00:00:03.92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29:16.86852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158]-[.A157]" office:value-type="time" office:time-value="PT00H00M03.011320671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29:19.88025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159]-[.A158]" office:value-type="time" office:time-value="PT00H00M03.011728032S" calcext:value-type="time">
            <text:p>00:00:03.01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29:25.95314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160]-[.A159]" office:value-type="time" office:time-value="PT00H00M06.072888756S" calcext:value-type="time">
            <text:p>00:00:06.073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29:29.87710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161]-[.A160]" office:value-type="time" office:time-value="PT00H00M03.923964081S" calcext:value-type="time">
            <text:p>00:00:03.924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29:32.8884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162]-[.A161]" office:value-type="time" office:time-value="PT00H00M03.011382907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29:35.89986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163]-[.A162]" office:value-type="time" office:time-value="PT00H00M03.011370962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29:41.97064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164]-[.A163]" office:value-type="time" office:time-value="PT00H00M06.07078406S" calcext:value-type="time">
            <text:p>00:00:06.07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29:45.89346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165]-[.A164]" office:value-type="time" office:time-value="PT00H00M03.922822466S" calcext:value-type="time">
            <text:p>00:00:03.923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29:48.90487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166]-[.A165]" office:value-type="time" office:time-value="PT00H00M03.011400509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29:51.91619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167]-[.A166]" office:value-type="time" office:time-value="PT00H00M03.011326957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29:57.98504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168]-[.A167]" office:value-type="time" office:time-value="PT00H00M06.06884344S" calcext:value-type="time">
            <text:p>00:00:06.069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30:01.90507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169]-[.A168]" office:value-type="time" office:time-value="PT00H00M03.920031921S" calcext:value-type="time">
            <text:p>00:00:03.92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30:04.91643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170]-[.A169]" office:value-type="time" office:time-value="PT00H00M03.011364676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30:07.92502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171]-[.A170]" office:value-type="time" office:time-value="PT00H00M03.008587961S" calcext:value-type="time">
            <text:p>00:00:03.009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30:13.99704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172]-[.A171]" office:value-type="time" office:time-value="PT00H00M06.072020601S" calcext:value-type="time">
            <text:p>00:00:06.07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30:17.91714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173]-[.A172]" office:value-type="time" office:time-value="PT00H00M03.920100443S" calcext:value-type="time">
            <text:p>00:00:03.92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30:20.92852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174]-[.A173]" office:value-type="time" office:time-value="PT00H00M03.011377249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30:23.93703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175]-[.A174]" office:value-type="time" office:time-value="PT00H00M03.008513153S" calcext:value-type="time">
            <text:p>00:00:03.009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30:30.00904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176]-[.A175]" office:value-type="time" office:time-value="PT00H00M06.072013057S" calcext:value-type="time">
            <text:p>00:00:06.07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30:33.92905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177]-[.A176]" office:value-type="time" office:time-value="PT00H00M03.920003003S" calcext:value-type="time">
            <text:p>00:00:03.92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30:36.94039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178]-[.A177]" office:value-type="time" office:time-value="PT00H00M03.011338902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30:39.94907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179]-[.A178]" office:value-type="time" office:time-value="PT00H00M03.008686029S" calcext:value-type="time">
            <text:p>00:00:03.009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30:46.02110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180]-[.A179]" office:value-type="time" office:time-value="PT00H00M06.07203003S" calcext:value-type="time">
            <text:p>00:00:06.07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30:49.94532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22" calcext:value-type="float">
            <text:p>33022</text:p>
          </table:table-cell>
          <table:table-cell/>
          <table:table-cell table:formula="of:=[.A181]-[.A180]" office:value-type="time" office:time-value="PT00H00M03.924218682S" calcext:value-type="time">
            <text:p>00:00:03.924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30:50.26929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07" calcext:value-type="float">
            <text:p>43007</text:p>
          </table:table-cell>
          <table:table-cell/>
          <table:table-cell table:formula="of:=[.A182]-[.A181]" office:value-type="time" office:time-value="PT00H00M00.323965377S" calcext:value-type="time">
            <text:p>00:00:00.324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30:50.6602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74" calcext:value-type="float">
            <text:p>43074</text:p>
          </table:table-cell>
          <table:table-cell/>
          <table:table-cell table:formula="of:=[.A183]-[.A182]" office:value-type="time" office:time-value="PT00H00M00.391001953S" calcext:value-type="time">
            <text:p>00:00:00.39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30:50.9611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481" calcext:value-type="float">
            <text:p>43481</text:p>
          </table:table-cell>
          <table:table-cell/>
          <table:table-cell table:formula="of:=[.A184]-[.A183]" office:value-type="time" office:time-value="PT00H00M00.300840125S" calcext:value-type="time">
            <text:p>00:00:00.30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30:51.2694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141" calcext:value-type="float">
            <text:p>43141</text:p>
          </table:table-cell>
          <table:table-cell/>
          <table:table-cell table:formula="of:=[.A185]-[.A184]" office:value-type="time" office:time-value="PT00H00M00.308348006S" calcext:value-type="time">
            <text:p>00:00:00.308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30:51.73074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186]-[.A185]" office:value-type="time" office:time-value="PT00H00M00.461262837S" calcext:value-type="time">
            <text:p>00:00:00.46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2" office:value-type="string" calcext:value-type="string">
            <text:p>2026-Mar-29 20:33:55.06849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3000" calcext:value-type="float">
            <text:p>33000</text:p>
          </table:table-cell>
          <table:table-cell table:style-name="ce3"/>
          <table:table-cell table:style-name="ce10" table:formula="of:=[.A187]-[.A186]" office:value-type="time" office:time-value="PT00H03M03.337745885S" calcext:value-type="time">
            <text:p>00:03:03.338</text:p>
          </table:table-cell>
          <table:table-cell table:style-name="ce5"/>
          <table:table-cell table:style-name="ce3" table:number-columns-repeated="16377"/>
        </table:table-row>
        <table:table-row table:style-name="ro1">
          <table:table-cell table:style-name="ce1" office:value-type="string" calcext:value-type="string">
            <text:p>2026-Mar-29 20:33:55.22267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25" calcext:value-type="float">
            <text:p>33025</text:p>
          </table:table-cell>
          <table:table-cell/>
          <table:table-cell table:formula="of:=[.A188]-[.A187]" office:value-type="time" office:time-value="PT00H00M00.154184061S" calcext:value-type="time">
            <text:p>00:00:00.154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33:55.42604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/>
          <table:table-cell table:formula="of:=[.A189]-[.A188]" office:value-type="time" office:time-value="PT00H00M00.203372212S" calcext:value-type="time">
            <text:p>00:00:00.203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33:55.6294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/>
          <table:table-cell table:formula="of:=[.A190]-[.A189]" office:value-type="time" office:time-value="PT00H00M00.20337787S" calcext:value-type="time">
            <text:p>00:00:00.203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33:55.83295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/>
          <table:table-cell table:formula="of:=[.A191]-[.A190]" office:value-type="time" office:time-value="PT00H00M00.203535031S" calcext:value-type="time">
            <text:p>00:00:00.204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33:56.0303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/>
          <table:table-cell table:formula="of:=[.A192]-[.A191]" office:value-type="time" office:time-value="PT00H00M00.197368674S" calcext:value-type="time">
            <text:p>00:00:00.197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33:56.23415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/>
          <table:table-cell table:formula="of:=[.A193]-[.A192]" office:value-type="time" office:time-value="PT00H00M00.203824835S" calcext:value-type="time">
            <text:p>00:00:00.204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33:56.43229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/>
          <table:table-cell table:formula="of:=[.A194]-[.A193]" office:value-type="time" office:time-value="PT00H00M00.198140019S" calcext:value-type="time">
            <text:p>00:00:00.198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33:56.6415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38" calcext:value-type="float">
            <text:p>33238</text:p>
          </table:table-cell>
          <table:table-cell/>
          <table:table-cell table:formula="of:=[.A195]-[.A194]" office:value-type="time" office:time-value="PT00H00M00.209265109S" calcext:value-type="time">
            <text:p>00:00:00.209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33:56.8258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/>
          <table:table-cell table:formula="of:=[.A196]-[.A195]" office:value-type="time" office:time-value="PT00H00M00.184258958S" calcext:value-type="time">
            <text:p>00:00:00.184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33:57.03814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75" calcext:value-type="float">
            <text:p>33275</text:p>
          </table:table-cell>
          <table:table-cell/>
          <table:table-cell table:formula="of:=[.A197]-[.A196]" office:value-type="time" office:time-value="PT00H00M00.212325971S" calcext:value-type="time">
            <text:p>00:00:00.21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33:57.24289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198]-[.A197]" office:value-type="time" office:time-value="PT00H00M00.20474894S" calcext:value-type="time">
            <text:p>00:00:00.205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33:58.07738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199]-[.A198]" office:value-type="time" office:time-value="PT00H00M00.834491174S" calcext:value-type="time">
            <text:p>00:00:00.834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34:01.08872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200]-[.A199]" office:value-type="time" office:time-value="PT00H00M03.011343302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34:04.10050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201]-[.A200]" office:value-type="time" office:time-value="PT00H00M03.011774551S" calcext:value-type="time">
            <text:p>00:00:03.01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34:10.1691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202]-[.A201]" office:value-type="time" office:time-value="PT00H00M06.068610214S" calcext:value-type="time">
            <text:p>00:00:06.069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34:14.08954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203]-[.A202]" office:value-type="time" office:time-value="PT00H00M03.920436138S" calcext:value-type="time">
            <text:p>00:00:03.92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34:17.10102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204]-[.A203]" office:value-type="time" office:time-value="PT00H00M03.011480975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34:20.11231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205]-[.A204]" office:value-type="time" office:time-value="PT00H00M03.011289868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34:26.18104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206]-[.A205]" office:value-type="time" office:time-value="PT00H00M06.068729027S" calcext:value-type="time">
            <text:p>00:00:06.069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34:30.10099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207]-[.A206]" office:value-type="time" office:time-value="PT00H00M03.919950197S" calcext:value-type="time">
            <text:p>00:00:03.92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34:33.11237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208]-[.A207]" office:value-type="time" office:time-value="PT00H00M03.011375992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34:36.12268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209]-[.A208]" office:value-type="time" office:time-value="PT00H00M03.010312957S" calcext:value-type="time">
            <text:p>00:00:03.01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34:42.19307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210]-[.A209]" office:value-type="time" office:time-value="PT00H00M06.070391787S" calcext:value-type="time">
            <text:p>00:00:06.07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34:46.11304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211]-[.A210]" office:value-type="time" office:time-value="PT00H00M03.919969057S" calcext:value-type="time">
            <text:p>00:00:03.92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34:49.12537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212]-[.A211]" office:value-type="time" office:time-value="PT00H00M03.012327757S" calcext:value-type="time">
            <text:p>00:00:03.01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34:52.13540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213]-[.A212]" office:value-type="time" office:time-value="PT00H00M03.010034468S" calcext:value-type="time">
            <text:p>00:00:03.01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34:58.20506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214]-[.A213]" office:value-type="time" office:time-value="PT00H00M06.069653132S" calcext:value-type="time">
            <text:p>00:00:06.07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35:02.12565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215]-[.A214]" office:value-type="time" office:time-value="PT00H00M03.920587641S" calcext:value-type="time">
            <text:p>00:00:03.92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35:05.1370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216]-[.A215]" office:value-type="time" office:time-value="PT00H00M03.011374106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35:08.14833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217]-[.A216]" office:value-type="time" office:time-value="PT00H00M03.011306841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35:14.21705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218]-[.A217]" office:value-type="time" office:time-value="PT00H00M06.068720855S" calcext:value-type="time">
            <text:p>00:00:06.069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35:18.14031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219]-[.A218]" office:value-type="time" office:time-value="PT00H00M03.923264402S" calcext:value-type="time">
            <text:p>00:00:03.923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35:21.15165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220]-[.A219]" office:value-type="time" office:time-value="PT00H00M03.011337644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35:24.16301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221]-[.A220]" office:value-type="time" office:time-value="PT00H00M03.01135839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35:30.23620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222]-[.A221]" office:value-type="time" office:time-value="PT00H00M06.073193648S" calcext:value-type="time">
            <text:p>00:00:06.073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35:34.15706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223]-[.A222]" office:value-type="time" office:time-value="PT00H00M03.920860472S" calcext:value-type="time">
            <text:p>00:00:03.92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35:37.1684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224]-[.A223]" office:value-type="time" office:time-value="PT00H00M03.01134896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35:40.17721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225]-[.A224]" office:value-type="time" office:time-value="PT00H00M03.008796042S" calcext:value-type="time">
            <text:p>00:00:03.009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35:46.24906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226]-[.A225]" office:value-type="time" office:time-value="PT00H00M06.071854639S" calcext:value-type="time">
            <text:p>00:00:06.07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35:50.16903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227]-[.A226]" office:value-type="time" office:time-value="PT00H00M03.919972829S" calcext:value-type="time">
            <text:p>00:00:03.92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35:53.18040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22" calcext:value-type="float">
            <text:p>33022</text:p>
          </table:table-cell>
          <table:table-cell/>
          <table:table-cell table:formula="of:=[.A228]-[.A227]" office:value-type="time" office:time-value="PT00H00M03.011363419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35:53.69466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229]-[.A228]" office:value-type="time" office:time-value="PT00H00M00.514263078S" calcext:value-type="time">
            <text:p>00:00:00.514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35:53.87917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230]-[.A229]" office:value-type="time" office:time-value="PT00H00M00.184513559S" calcext:value-type="time">
            <text:p>00:00:00.185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35:56.88902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231]-[.A230]" office:value-type="time" office:time-value="PT00H00M03.009849018S" calcext:value-type="time">
            <text:p>00:00:03.01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35:59.90035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232]-[.A231]" office:value-type="time" office:time-value="PT00H00M03.011331358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36:02.91167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22" calcext:value-type="float">
            <text:p>33022</text:p>
          </table:table-cell>
          <table:table-cell/>
          <table:table-cell table:formula="of:=[.A233]-[.A232]" office:value-type="time" office:time-value="PT00H00M03.011317528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36:03.1046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07" calcext:value-type="float">
            <text:p>43007</text:p>
          </table:table-cell>
          <table:table-cell/>
          <table:table-cell table:formula="of:=[.A234]-[.A233]" office:value-type="time" office:time-value="PT00H00M00.193006522S" calcext:value-type="time">
            <text:p>00:00:00.193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36:03.6961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74" calcext:value-type="float">
            <text:p>43074</text:p>
          </table:table-cell>
          <table:table-cell/>
          <table:table-cell table:formula="of:=[.A235]-[.A234]" office:value-type="time" office:time-value="PT00H00M00.591448462S" calcext:value-type="time">
            <text:p>00:00:00.59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36:04.1101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481" calcext:value-type="float">
            <text:p>43481</text:p>
          </table:table-cell>
          <table:table-cell/>
          <table:table-cell table:formula="of:=[.A236]-[.A235]" office:value-type="time" office:time-value="PT00H00M00.414054282S" calcext:value-type="time">
            <text:p>00:00:00.414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36:04.40414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141" calcext:value-type="float">
            <text:p>43141</text:p>
          </table:table-cell>
          <table:table-cell/>
          <table:table-cell table:formula="of:=[.A237]-[.A236]" office:value-type="time" office:time-value="PT00H00M00.293957745S" calcext:value-type="time">
            <text:p>00:00:00.294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36:04.76530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238]-[.A237]" office:value-type="time" office:time-value="PT00H00M00.361161539S" calcext:value-type="time">
            <text:p>00:00:00.36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2" office:value-type="string" calcext:value-type="string">
            <text:p>2026-Mar-29 20:38:55.4029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3000" calcext:value-type="float">
            <text:p>33000</text:p>
          </table:table-cell>
          <table:table-cell table:style-name="ce3"/>
          <table:table-cell table:style-name="ce10" table:formula="of:=[.A239]-[.A238]" office:value-type="time" office:time-value="PT00H02M50.637630578S" calcext:value-type="time">
            <text:p>00:02:50.638</text:p>
          </table:table-cell>
          <table:table-cell table:style-name="ce5"/>
          <table:table-cell table:style-name="ce3" table:number-columns-repeated="16377"/>
        </table:table-row>
        <table:table-row table:style-name="ro1">
          <table:table-cell table:style-name="ce1" office:value-type="string" calcext:value-type="string">
            <text:p>2026-Mar-29 20:38:55.65686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25" calcext:value-type="float">
            <text:p>33025</text:p>
          </table:table-cell>
          <table:table-cell/>
          <table:table-cell table:formula="of:=[.A240]-[.A239]" office:value-type="time" office:time-value="PT00H00M00.253927032S" calcext:value-type="time">
            <text:p>00:00:00.254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38:55.86154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/>
          <table:table-cell table:formula="of:=[.A241]-[.A240]" office:value-type="time" office:time-value="PT00H00M00.20467916S" calcext:value-type="time">
            <text:p>00:00:00.205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38:56.06529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/>
          <table:table-cell table:formula="of:=[.A242]-[.A241]" office:value-type="time" office:time-value="PT00H00M00.20375317S" calcext:value-type="time">
            <text:p>00:00:00.204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38:56.2687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/>
          <table:table-cell table:formula="of:=[.A243]-[.A242]" office:value-type="time" office:time-value="PT00H00M00.203422504S" calcext:value-type="time">
            <text:p>00:00:00.203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38:56.46775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/>
          <table:table-cell table:formula="of:=[.A244]-[.A243]" office:value-type="time" office:time-value="PT00H00M00.199034577S" calcext:value-type="time">
            <text:p>00:00:00.199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38:56.67174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/>
          <table:table-cell table:formula="of:=[.A245]-[.A244]" office:value-type="time" office:time-value="PT00H00M00.203990797S" calcext:value-type="time">
            <text:p>00:00:00.204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38:56.8689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/>
          <table:table-cell table:formula="of:=[.A246]-[.A245]" office:value-type="time" office:time-value="PT00H00M00.197178824S" calcext:value-type="time">
            <text:p>00:00:00.197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38:57.0775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38" calcext:value-type="float">
            <text:p>33238</text:p>
          </table:table-cell>
          <table:table-cell/>
          <table:table-cell table:formula="of:=[.A247]-[.A246]" office:value-type="time" office:time-value="PT00H00M00.208628923S" calcext:value-type="time">
            <text:p>00:00:00.209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38:57.26267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/>
          <table:table-cell table:formula="of:=[.A248]-[.A247]" office:value-type="time" office:time-value="PT00H00M00.185122085S" calcext:value-type="time">
            <text:p>00:00:00.185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38:57.4748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75" calcext:value-type="float">
            <text:p>33275</text:p>
          </table:table-cell>
          <table:table-cell/>
          <table:table-cell table:formula="of:=[.A249]-[.A248]" office:value-type="time" office:time-value="PT00H00M00.212176982S" calcext:value-type="time">
            <text:p>00:00:00.21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38:57.67920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250]-[.A249]" office:value-type="time" office:time-value="PT00H00M00.204351009S" calcext:value-type="time">
            <text:p>00:00:00.204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38:58.31614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251]-[.A250]" office:value-type="time" office:time-value="PT00H00M00.636943965S" calcext:value-type="time">
            <text:p>00:00:00.637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39:01.32557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252]-[.A251]" office:value-type="time" office:time-value="PT00H00M03.009430342S" calcext:value-type="time">
            <text:p>00:00:03.009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39:04.33718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253]-[.A252]" office:value-type="time" office:time-value="PT00H00M03.011613619S" calcext:value-type="time">
            <text:p>00:00:03.01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39:10.40931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254]-[.A253]" office:value-type="time" office:time-value="PT00H00M06.072129984S" calcext:value-type="time">
            <text:p>00:00:06.07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39:14.3291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255]-[.A254]" office:value-type="time" office:time-value="PT00H00M03.919801209S" calcext:value-type="time">
            <text:p>00:00:03.92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39:17.3404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256]-[.A255]" office:value-type="time" office:time-value="PT00H00M03.01133513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39:20.35047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257]-[.A256]" office:value-type="time" office:time-value="PT00H00M03.010021895S" calcext:value-type="time">
            <text:p>00:00:03.01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39:26.42109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258]-[.A257]" office:value-type="time" office:time-value="PT00H00M06.070613698S" calcext:value-type="time">
            <text:p>00:00:06.07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39:30.34297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259]-[.A258]" office:value-type="time" office:time-value="PT00H00M03.921886417S" calcext:value-type="time">
            <text:p>00:00:03.92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39:33.35305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260]-[.A259]" office:value-type="time" office:time-value="PT00H00M03.010081616S" calcext:value-type="time">
            <text:p>00:00:03.01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39:36.36436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261]-[.A260]" office:value-type="time" office:time-value="PT00H00M03.011309355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39:42.4330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262]-[.A261]" office:value-type="time" office:time-value="PT00H00M06.068644789S" calcext:value-type="time">
            <text:p>00:00:06.069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39:46.35557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263]-[.A262]" office:value-type="time" office:time-value="PT00H00M03.922557808S" calcext:value-type="time">
            <text:p>00:00:03.923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39:49.36519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264]-[.A263]" office:value-type="time" office:time-value="PT00H00M03.009623964S" calcext:value-type="time">
            <text:p>00:00:03.01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39:52.37637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265]-[.A264]" office:value-type="time" office:time-value="PT00H00M03.011181112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39:58.4450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266]-[.A265]" office:value-type="time" office:time-value="PT00H00M06.068637874S" calcext:value-type="time">
            <text:p>00:00:06.069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40:02.36827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267]-[.A266]" office:value-type="time" office:time-value="PT00H00M03.923264402S" calcext:value-type="time">
            <text:p>00:00:03.923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40:05.37705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268]-[.A267]" office:value-type="time" office:time-value="PT00H00M03.008772153S" calcext:value-type="time">
            <text:p>00:00:03.009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40:08.38840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269]-[.A268]" office:value-type="time" office:time-value="PT00H00M03.011356504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40:14.45700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270]-[.A269]" office:value-type="time" office:time-value="PT00H00M06.068601413S" calcext:value-type="time">
            <text:p>00:00:06.069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40:18.38025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271]-[.A270]" office:value-type="time" office:time-value="PT00H00M03.923241771S" calcext:value-type="time">
            <text:p>00:00:03.923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40:21.38904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272]-[.A271]" office:value-type="time" office:time-value="PT00H00M03.008796042S" calcext:value-type="time">
            <text:p>00:00:03.009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40:24.40041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273]-[.A272]" office:value-type="time" office:time-value="PT00H00M03.01137222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40:30.46909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274]-[.A273]" office:value-type="time" office:time-value="PT00H00M06.068674964S" calcext:value-type="time">
            <text:p>00:00:06.069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40:34.39263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275]-[.A274]" office:value-type="time" office:time-value="PT00H00M03.923541005S" calcext:value-type="time">
            <text:p>00:00:03.924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40:37.4049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276]-[.A275]" office:value-type="time" office:time-value="PT00H00M03.012265521S" calcext:value-type="time">
            <text:p>00:00:03.01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40:40.41624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277]-[.A276]" office:value-type="time" office:time-value="PT00H00M03.011348331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40:46.48866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278]-[.A277]" office:value-type="time" office:time-value="PT00H00M06.072412245S" calcext:value-type="time">
            <text:p>00:00:06.07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40:50.40924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279]-[.A278]" office:value-type="time" office:time-value="PT00H00M03.920580726S" calcext:value-type="time">
            <text:p>00:00:03.92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40:53.42048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280]-[.A279]" office:value-type="time" office:time-value="PT00H00M03.011243977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40:56.43121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281]-[.A280]" office:value-type="time" office:time-value="PT00H00M03.010725975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41:02.50143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22" calcext:value-type="float">
            <text:p>33022</text:p>
          </table:table-cell>
          <table:table-cell/>
          <table:table-cell table:formula="of:=[.A282]-[.A281]" office:value-type="time" office:time-value="PT00H00M06.070223311S" calcext:value-type="time">
            <text:p>00:00:06.07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41:05.74305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07" calcext:value-type="float">
            <text:p>43007</text:p>
          </table:table-cell>
          <table:table-cell/>
          <table:table-cell table:formula="of:=[.A283]-[.A282]" office:value-type="time" office:time-value="PT00H00M03.241617652S" calcext:value-type="time">
            <text:p>00:00:03.24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41:06.1346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74" calcext:value-type="float">
            <text:p>43074</text:p>
          </table:table-cell>
          <table:table-cell/>
          <table:table-cell table:formula="of:=[.A284]-[.A283]" office:value-type="time" office:time-value="PT00H00M00.391551387S" calcext:value-type="time">
            <text:p>00:00:00.39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41:06.4347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481" calcext:value-type="float">
            <text:p>43481</text:p>
          </table:table-cell>
          <table:table-cell/>
          <table:table-cell table:formula="of:=[.A285]-[.A284]" office:value-type="time" office:time-value="PT00H00M00.300131645S" calcext:value-type="time">
            <text:p>00:00:00.30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41:06.6426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141" calcext:value-type="float">
            <text:p>43141</text:p>
          </table:table-cell>
          <table:table-cell/>
          <table:table-cell table:formula="of:=[.A286]-[.A285]" office:value-type="time" office:time-value="PT00H00M00.207880838S" calcext:value-type="time">
            <text:p>00:00:00.208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41:07.40496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287]-[.A286]" office:value-type="time" office:time-value="PT00H00M00.762346247S" calcext:value-type="time">
            <text:p>00:00:00.76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2" office:value-type="string" calcext:value-type="string">
            <text:p>2026-Mar-29 20:43:55.6417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3000" calcext:value-type="float">
            <text:p>33000</text:p>
          </table:table-cell>
          <table:table-cell table:style-name="ce3"/>
          <table:table-cell table:style-name="ce10" table:formula="of:=[.A288]-[.A287]" office:value-type="time" office:time-value="PT00H02M48.236749666S" calcext:value-type="time">
            <text:p>00:02:48.237</text:p>
          </table:table-cell>
          <table:table-cell table:style-name="ce5"/>
          <table:table-cell table:style-name="ce3" table:number-columns-repeated="16377"/>
        </table:table-row>
        <table:table-row table:style-name="ro1">
          <table:table-cell table:style-name="ce1" office:value-type="string" calcext:value-type="string">
            <text:p>2026-Mar-29 20:43:55.79717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25" calcext:value-type="float">
            <text:p>33025</text:p>
          </table:table-cell>
          <table:table-cell/>
          <table:table-cell table:formula="of:=[.A289]-[.A288]" office:value-type="time" office:time-value="PT00H00M00.155462092S" calcext:value-type="time">
            <text:p>00:00:00.155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43:56.00184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/>
          <table:table-cell table:formula="of:=[.A290]-[.A289]" office:value-type="time" office:time-value="PT00H00M00.204667216S" calcext:value-type="time">
            <text:p>00:00:00.205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43:56.2056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/>
          <table:table-cell table:formula="of:=[.A291]-[.A290]" office:value-type="time" office:time-value="PT00H00M00.203777687S" calcext:value-type="time">
            <text:p>00:00:00.204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43:56.4237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/>
          <table:table-cell table:formula="of:=[.A292]-[.A291]" office:value-type="time" office:time-value="PT00H00M00.218103197S" calcext:value-type="time">
            <text:p>00:00:00.218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43:56.60682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/>
          <table:table-cell table:formula="of:=[.A293]-[.A292]" office:value-type="time" office:time-value="PT00H00M00.183107285S" calcext:value-type="time">
            <text:p>00:00:00.183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43:56.8103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/>
          <table:table-cell table:formula="of:=[.A294]-[.A293]" office:value-type="time" office:time-value="PT00H00M00.203537545S" calcext:value-type="time">
            <text:p>00:00:00.204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43:57.01025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/>
          <table:table-cell table:formula="of:=[.A295]-[.A294]" office:value-type="time" office:time-value="PT00H00M00.199887017S" calcext:value-type="time">
            <text:p>00:00:00.20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43:57.2181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38" calcext:value-type="float">
            <text:p>33238</text:p>
          </table:table-cell>
          <table:table-cell/>
          <table:table-cell table:formula="of:=[.A296]-[.A295]" office:value-type="time" office:time-value="PT00H00M00.207883352S" calcext:value-type="time">
            <text:p>00:00:00.208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43:57.41543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/>
          <table:table-cell table:formula="of:=[.A297]-[.A296]" office:value-type="time" office:time-value="PT00H00M00.197297637S" calcext:value-type="time">
            <text:p>00:00:00.197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43:57.6138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75" calcext:value-type="float">
            <text:p>33275</text:p>
          </table:table-cell>
          <table:table-cell/>
          <table:table-cell table:formula="of:=[.A298]-[.A297]" office:value-type="time" office:time-value="PT00H00M00.198415364S" calcext:value-type="time">
            <text:p>00:00:00.198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43:57.8170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299]-[.A298]" office:value-type="time" office:time-value="PT00H00M00.203160988S" calcext:value-type="time">
            <text:p>00:00:00.203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43:58.55564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300]-[.A299]" office:value-type="time" office:time-value="PT00H00M00.738633843S" calcext:value-type="time">
            <text:p>00:00:00.739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44:01.56522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301]-[.A300]" office:value-type="time" office:time-value="PT00H00M03.009576816S" calcext:value-type="time">
            <text:p>00:00:03.01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44:04.57465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302]-[.A301]" office:value-type="time" office:time-value="PT00H00M03.009433486S" calcext:value-type="time">
            <text:p>00:00:03.009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44:10.6468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303]-[.A302]" office:value-type="time" office:time-value="PT00H00M06.072154501S" calcext:value-type="time">
            <text:p>00:00:06.07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44:14.5690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304]-[.A303]" office:value-type="time" office:time-value="PT00H00M03.922215197S" calcext:value-type="time">
            <text:p>00:00:03.92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44:17.58051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305]-[.A304]" office:value-type="time" office:time-value="PT00H00M03.011492291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44:20.59169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306]-[.A305]" office:value-type="time" office:time-value="PT00H00M03.011177969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44:26.66197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307]-[.A306]" office:value-type="time" office:time-value="PT00H00M06.070278003S" calcext:value-type="time">
            <text:p>00:00:06.07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44:30.58526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308]-[.A307]" office:value-type="time" office:time-value="PT00H00M03.923287033S" calcext:value-type="time">
            <text:p>00:00:03.923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44:33.59683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309]-[.A308]" office:value-type="time" office:time-value="PT00H00M03.011572757S" calcext:value-type="time">
            <text:p>00:00:03.01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44:36.60592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310]-[.A309]" office:value-type="time" office:time-value="PT00H00M03.009094018S" calcext:value-type="time">
            <text:p>00:00:03.009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44:42.67794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311]-[.A310]" office:value-type="time" office:time-value="PT00H00M06.072013057S" calcext:value-type="time">
            <text:p>00:00:06.07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44:46.60101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312]-[.A311]" office:value-type="time" office:time-value="PT00H00M03.923078952S" calcext:value-type="time">
            <text:p>00:00:03.923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44:49.61154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313]-[.A312]" office:value-type="time" office:time-value="PT00H00M03.010524809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44:52.62138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314]-[.A313]" office:value-type="time" office:time-value="PT00H00M03.009841475S" calcext:value-type="time">
            <text:p>00:00:03.01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44:58.69321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315]-[.A314]" office:value-type="time" office:time-value="PT00H00M06.071832636S" calcext:value-type="time">
            <text:p>00:00:06.07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45:02.61326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316]-[.A315]" office:value-type="time" office:time-value="PT00H00M03.920041979S" calcext:value-type="time">
            <text:p>00:00:03.92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45:05.62169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317]-[.A316]" office:value-type="time" office:time-value="PT00H00M03.00843583S" calcext:value-type="time">
            <text:p>00:00:03.008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45:08.63306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318]-[.A317]" office:value-type="time" office:time-value="PT00H00M03.011367191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45:14.70507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319]-[.A318]" office:value-type="time" office:time-value="PT00H00M06.07200677S" calcext:value-type="time">
            <text:p>00:00:06.07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45:18.62519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320]-[.A319]" office:value-type="time" office:time-value="PT00H00M03.920123074S" calcext:value-type="time">
            <text:p>00:00:03.92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45:21.63358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321]-[.A320]" office:value-type="time" office:time-value="PT00H00M03.008388053S" calcext:value-type="time">
            <text:p>00:00:03.008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45:24.64494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322]-[.A321]" office:value-type="time" office:time-value="PT00H00M03.011368448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45:30.71701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323]-[.A322]" office:value-type="time" office:time-value="PT00H00M06.072061462S" calcext:value-type="time">
            <text:p>00:00:06.07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45:34.63843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324]-[.A323]" office:value-type="time" office:time-value="PT00H00M03.921419336S" calcext:value-type="time">
            <text:p>00:00:03.92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45:37.64918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325]-[.A324]" office:value-type="time" office:time-value="PT00H00M03.010753007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45:40.65981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326]-[.A325]" office:value-type="time" office:time-value="PT00H00M03.010636079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45:46.72940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327]-[.A326]" office:value-type="time" office:time-value="PT00H00M06.069580838S" calcext:value-type="time">
            <text:p>00:00:06.07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45:50.64910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328]-[.A327]" office:value-type="time" office:time-value="PT00H00M03.919706913S" calcext:value-type="time">
            <text:p>00:00:03.92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45:53.66046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329]-[.A328]" office:value-type="time" office:time-value="PT00H00M03.011355875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45:56.6718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330]-[.A329]" office:value-type="time" office:time-value="PT00H00M03.011350217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46:02.74104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331]-[.A330]" office:value-type="time" office:time-value="PT00H00M06.069235713S" calcext:value-type="time">
            <text:p>00:00:06.069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46:06.6614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22" calcext:value-type="float">
            <text:p>33022</text:p>
          </table:table-cell>
          <table:table-cell/>
          <table:table-cell table:formula="of:=[.A332]-[.A331]" office:value-type="time" office:time-value="PT00H00M03.920364473S" calcext:value-type="time">
            <text:p>00:00:03.92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46:08.1814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07" calcext:value-type="float">
            <text:p>43007</text:p>
          </table:table-cell>
          <table:table-cell/>
          <table:table-cell table:formula="of:=[.A333]-[.A332]" office:value-type="time" office:time-value="PT00H00M01.520082029S" calcext:value-type="time">
            <text:p>00:00:01.52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46:08.47194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74" calcext:value-type="float">
            <text:p>43074</text:p>
          </table:table-cell>
          <table:table-cell/>
          <table:table-cell table:formula="of:=[.A334]-[.A333]" office:value-type="time" office:time-value="PT00H00M00.29045369S" calcext:value-type="time">
            <text:p>00:00:00.29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46:08.77096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481" calcext:value-type="float">
            <text:p>43481</text:p>
          </table:table-cell>
          <table:table-cell/>
          <table:table-cell table:formula="of:=[.A335]-[.A334]" office:value-type="time" office:time-value="PT00H00M00.299017061S" calcext:value-type="time">
            <text:p>00:00:00.299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46:09.0800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141" calcext:value-type="float">
            <text:p>43141</text:p>
          </table:table-cell>
          <table:table-cell/>
          <table:table-cell table:formula="of:=[.A336]-[.A335]" office:value-type="time" office:time-value="PT00H00M00.309079117S" calcext:value-type="time">
            <text:p>00:00:00.309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46:09.55618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337]-[.A336]" office:value-type="time" office:time-value="PT00H00M00.476142182S" calcext:value-type="time">
            <text:p>00:00:00.476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2" office:value-type="string" calcext:value-type="string">
            <text:p>2026-Mar-29 20:48:55.8527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3000" calcext:value-type="float">
            <text:p>33000</text:p>
          </table:table-cell>
          <table:table-cell table:style-name="ce3"/>
          <table:table-cell table:style-name="ce10" table:formula="of:=[.A338]-[.A337]" office:value-type="time" office:time-value="PT00H02M46.296540666S" calcext:value-type="time">
            <text:p>00:02:46.297</text:p>
          </table:table-cell>
          <table:table-cell table:style-name="ce5"/>
          <table:table-cell table:style-name="ce3" table:number-columns-repeated="16377"/>
        </table:table-row>
        <table:table-row table:style-name="ro1">
          <table:table-cell table:style-name="ce1" office:value-type="string" calcext:value-type="string">
            <text:p>2026-Mar-29 20:48:56.1072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25" calcext:value-type="float">
            <text:p>33025</text:p>
          </table:table-cell>
          <table:table-cell/>
          <table:table-cell table:formula="of:=[.A339]-[.A338]" office:value-type="time" office:time-value="PT00H00M00.254522357S" calcext:value-type="time">
            <text:p>00:00:00.255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48:56.31060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/>
          <table:table-cell table:formula="of:=[.A340]-[.A339]" office:value-type="time" office:time-value="PT00H00M00.203351467S" calcext:value-type="time">
            <text:p>00:00:00.203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48:56.51410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/>
          <table:table-cell table:formula="of:=[.A341]-[.A340]" office:value-type="time" office:time-value="PT00H00M00.20350737S" calcext:value-type="time">
            <text:p>00:00:00.204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48:56.71755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/>
          <table:table-cell table:formula="of:=[.A342]-[.A341]" office:value-type="time" office:time-value="PT00H00M00.20344262S" calcext:value-type="time">
            <text:p>00:00:00.203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48:56.9150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/>
          <table:table-cell table:formula="of:=[.A343]-[.A342]" office:value-type="time" office:time-value="PT00H00M00.197459199S" calcext:value-type="time">
            <text:p>00:00:00.197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48:57.1191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/>
          <table:table-cell table:formula="of:=[.A344]-[.A343]" office:value-type="time" office:time-value="PT00H00M00.204139156S" calcext:value-type="time">
            <text:p>00:00:00.204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48:57.31727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/>
          <table:table-cell table:formula="of:=[.A345]-[.A344]" office:value-type="time" office:time-value="PT00H00M00.198123045S" calcext:value-type="time">
            <text:p>00:00:00.198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48:57.5255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38" calcext:value-type="float">
            <text:p>33238</text:p>
          </table:table-cell>
          <table:table-cell/>
          <table:table-cell table:formula="of:=[.A346]-[.A345]" office:value-type="time" office:time-value="PT00H00M00.208285055S" calcext:value-type="time">
            <text:p>00:00:00.208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48:57.70996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/>
          <table:table-cell table:formula="of:=[.A347]-[.A346]" office:value-type="time" office:time-value="PT00H00M00.184402918S" calcext:value-type="time">
            <text:p>00:00:00.184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48:57.92340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75" calcext:value-type="float">
            <text:p>33275</text:p>
          </table:table-cell>
          <table:table-cell/>
          <table:table-cell table:formula="of:=[.A348]-[.A347]" office:value-type="time" office:time-value="PT00H00M00.213443069S" calcext:value-type="time">
            <text:p>00:00:00.213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48:58.12763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349]-[.A348]" office:value-type="time" office:time-value="PT00H00M00.20423471S" calcext:value-type="time">
            <text:p>00:00:00.204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48:58.76894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350]-[.A349]" office:value-type="time" office:time-value="PT00H00M00.641301088S" calcext:value-type="time">
            <text:p>00:00:00.64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49:01.7805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351]-[.A350]" office:value-type="time" office:time-value="PT00H00M03.011570871S" calcext:value-type="time">
            <text:p>00:00:03.01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49:04.7921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352]-[.A351]" office:value-type="time" office:time-value="PT00H00M03.011604189S" calcext:value-type="time">
            <text:p>00:00:03.01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49:10.86103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353]-[.A352]" office:value-type="time" office:time-value="PT00H00M06.068916991S" calcext:value-type="time">
            <text:p>00:00:06.069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49:14.78103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354]-[.A353]" office:value-type="time" office:time-value="PT00H00M03.920006147S" calcext:value-type="time">
            <text:p>00:00:03.92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49:17.79260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355]-[.A354]" office:value-type="time" office:time-value="PT00H00M03.011567728S" calcext:value-type="time">
            <text:p>00:00:03.01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49:20.80102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356]-[.A355]" office:value-type="time" office:time-value="PT00H00M03.008421999S" calcext:value-type="time">
            <text:p>00:00:03.008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49:26.87369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357]-[.A356]" office:value-type="time" office:time-value="PT00H00M06.072669988S" calcext:value-type="time">
            <text:p>00:00:06.073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49:30.79699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358]-[.A357]" office:value-type="time" office:time-value="PT00H00M03.923298977S" calcext:value-type="time">
            <text:p>00:00:03.923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49:33.80833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359]-[.A358]" office:value-type="time" office:time-value="PT00H00M03.011337016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49:36.81967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360]-[.A359]" office:value-type="time" office:time-value="PT00H00M03.011341416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49:42.88903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361]-[.A360]" office:value-type="time" office:time-value="PT00H00M06.069362699S" calcext:value-type="time">
            <text:p>00:00:06.069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49:46.81158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362]-[.A361]" office:value-type="time" office:time-value="PT00H00M03.922550892S" calcext:value-type="time">
            <text:p>00:00:03.923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49:49.82424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363]-[.A362]" office:value-type="time" office:time-value="PT00H00M03.012653394S" calcext:value-type="time">
            <text:p>00:00:03.013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49:52.8331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364]-[.A363]" office:value-type="time" office:time-value="PT00H00M03.008867707S" calcext:value-type="time">
            <text:p>00:00:03.009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49:58.90504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365]-[.A364]" office:value-type="time" office:time-value="PT00H00M06.071933219S" calcext:value-type="time">
            <text:p>00:00:06.07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50:02.82514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366]-[.A365]" office:value-type="time" office:time-value="PT00H00M03.920103586S" calcext:value-type="time">
            <text:p>00:00:03.92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50:05.83703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367]-[.A366]" office:value-type="time" office:time-value="PT00H00M03.011883306S" calcext:value-type="time">
            <text:p>00:00:03.01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50:08.8486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368]-[.A367]" office:value-type="time" office:time-value="PT00H00M03.011579672S" calcext:value-type="time">
            <text:p>00:00:03.01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50:14.91706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369]-[.A368]" office:value-type="time" office:time-value="PT00H00M06.068459339S" calcext:value-type="time">
            <text:p>00:00:06.068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50:18.83708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370]-[.A369]" office:value-type="time" office:time-value="PT00H00M03.920019977S" calcext:value-type="time">
            <text:p>00:00:03.92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50:21.84842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371]-[.A370]" office:value-type="time" office:time-value="PT00H00M03.011340159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50:24.86004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372]-[.A371]" office:value-type="time" office:time-value="PT00H00M03.01161299S" calcext:value-type="time">
            <text:p>00:00:03.01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50:30.92931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373]-[.A372]" office:value-type="time" office:time-value="PT00H00M06.069276575S" calcext:value-type="time">
            <text:p>00:00:06.069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50:34.85326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374]-[.A373]" office:value-type="time" office:time-value="PT00H00M03.923946479S" calcext:value-type="time">
            <text:p>00:00:03.924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50:37.86122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375]-[.A374]" office:value-type="time" office:time-value="PT00H00M03.007957432S" calcext:value-type="time">
            <text:p>00:00:03.008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50:40.87343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376]-[.A375]" office:value-type="time" office:time-value="PT00H00M03.012211458S" calcext:value-type="time">
            <text:p>00:00:03.01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50:46.94505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377]-[.A376]" office:value-type="time" office:time-value="PT00H00M06.071620784S" calcext:value-type="time">
            <text:p>00:00:06.07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50:50.86528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378]-[.A377]" office:value-type="time" office:time-value="PT00H00M03.920226172S" calcext:value-type="time">
            <text:p>00:00:03.92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50:53.87649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379]-[.A378]" office:value-type="time" office:time-value="PT00H00M03.011213802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50:56.88697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380]-[.A379]" office:value-type="time" office:time-value="PT00H00M03.010483948S" calcext:value-type="time">
            <text:p>00:00:03.01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51:02.96044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381]-[.A380]" office:value-type="time" office:time-value="PT00H00M06.073465222S" calcext:value-type="time">
            <text:p>00:00:06.073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51:06.88126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382]-[.A381]" office:value-type="time" office:time-value="PT00H00M03.92081961S" calcext:value-type="time">
            <text:p>00:00:03.92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51:09.8925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22" calcext:value-type="float">
            <text:p>33022</text:p>
          </table:table-cell>
          <table:table-cell/>
          <table:table-cell table:formula="of:=[.A383]-[.A382]" office:value-type="time" office:time-value="PT00H00M03.01124712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51:10.40073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07" calcext:value-type="float">
            <text:p>43007</text:p>
          </table:table-cell>
          <table:table-cell/>
          <table:table-cell table:formula="of:=[.A384]-[.A383]" office:value-type="time" office:time-value="PT00H00M00.50822685S" calcext:value-type="time">
            <text:p>00:00:00.508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51:10.80138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74" calcext:value-type="float">
            <text:p>43074</text:p>
          </table:table-cell>
          <table:table-cell/>
          <table:table-cell table:formula="of:=[.A385]-[.A384]" office:value-type="time" office:time-value="PT00H00M00.400650362S" calcext:value-type="time">
            <text:p>00:00:00.40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51:11.0919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481" calcext:value-type="float">
            <text:p>43481</text:p>
          </table:table-cell>
          <table:table-cell/>
          <table:table-cell table:formula="of:=[.A386]-[.A385]" office:value-type="time" office:time-value="PT00H00M00.290597649S" calcext:value-type="time">
            <text:p>00:00:00.29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51:11.4012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141" calcext:value-type="float">
            <text:p>43141</text:p>
          </table:table-cell>
          <table:table-cell/>
          <table:table-cell table:formula="of:=[.A387]-[.A386]" office:value-type="time" office:time-value="PT00H00M00.309279026S" calcext:value-type="time">
            <text:p>00:00:00.309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51:11.86250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388]-[.A387]" office:value-type="time" office:time-value="PT00H00M00.461243349S" calcext:value-type="time">
            <text:p>00:00:00.46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2" office:value-type="string" calcext:value-type="string">
            <text:p>2026-Mar-29 20:53:56.0996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3000" calcext:value-type="float">
            <text:p>33000</text:p>
          </table:table-cell>
          <table:table-cell table:style-name="ce3"/>
          <table:table-cell table:style-name="ce10" table:formula="of:=[.A389]-[.A388]" office:value-type="time" office:time-value="PT00H02M44.237112715S" calcext:value-type="time">
            <text:p>00:02:44.237</text:p>
          </table:table-cell>
          <table:table-cell table:style-name="ce5"/>
          <table:table-cell table:style-name="ce3" table:number-columns-repeated="16377"/>
        </table:table-row>
        <table:table-row table:style-name="ro1">
          <table:table-cell table:style-name="ce1" office:value-type="string" calcext:value-type="string">
            <text:p>2026-Mar-29 20:53:56.35306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25" calcext:value-type="float">
            <text:p>33025</text:p>
          </table:table-cell>
          <table:table-cell/>
          <table:table-cell table:formula="of:=[.A390]-[.A389]" office:value-type="time" office:time-value="PT00H00M00.253442349S" calcext:value-type="time">
            <text:p>00:00:00.253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53:56.55740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/>
          <table:table-cell table:formula="of:=[.A391]-[.A390]" office:value-type="time" office:time-value="PT00H00M00.204344722S" calcext:value-type="time">
            <text:p>00:00:00.204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53:56.7609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/>
          <table:table-cell table:formula="of:=[.A392]-[.A391]" office:value-type="time" office:time-value="PT00H00M00.203558919S" calcext:value-type="time">
            <text:p>00:00:00.204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53:56.9657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/>
          <table:table-cell table:formula="of:=[.A393]-[.A392]" office:value-type="time" office:time-value="PT00H00M00.204755226S" calcext:value-type="time">
            <text:p>00:00:00.205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53:57.16294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/>
          <table:table-cell table:formula="of:=[.A394]-[.A393]" office:value-type="time" office:time-value="PT00H00M00.197220943S" calcext:value-type="time">
            <text:p>00:00:00.197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53:57.36706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/>
          <table:table-cell table:formula="of:=[.A395]-[.A394]" office:value-type="time" office:time-value="PT00H00M00.204125955S" calcext:value-type="time">
            <text:p>00:00:00.204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53:57.56622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/>
          <table:table-cell table:formula="of:=[.A396]-[.A395]" office:value-type="time" office:time-value="PT00H00M00.199154019S" calcext:value-type="time">
            <text:p>00:00:00.199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53:57.7747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38" calcext:value-type="float">
            <text:p>33238</text:p>
          </table:table-cell>
          <table:table-cell/>
          <table:table-cell table:formula="of:=[.A397]-[.A396]" office:value-type="time" office:time-value="PT00H00M00.20849125S" calcext:value-type="time">
            <text:p>00:00:00.208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53:57.95810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/>
          <table:table-cell table:formula="of:=[.A398]-[.A397]" office:value-type="time" office:time-value="PT00H00M00.18339206S" calcext:value-type="time">
            <text:p>00:00:00.183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53:58.1703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75" calcext:value-type="float">
            <text:p>33275</text:p>
          </table:table-cell>
          <table:table-cell/>
          <table:table-cell table:formula="of:=[.A399]-[.A398]" office:value-type="time" office:time-value="PT00H00M00.212218473S" calcext:value-type="time">
            <text:p>00:00:00.21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53:58.3752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400]-[.A399]" office:value-type="time" office:time-value="PT00H00M00.204885355S" calcext:value-type="time">
            <text:p>00:00:00.205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53:59.01814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401]-[.A400]" office:value-type="time" office:time-value="PT00H00M00.642936816S" calcext:value-type="time">
            <text:p>00:00:00.643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54:02.02903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402]-[.A401]" office:value-type="time" office:time-value="PT00H00M03.010888165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54:05.04057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403]-[.A402]" office:value-type="time" office:time-value="PT00H00M03.011543211S" calcext:value-type="time">
            <text:p>00:00:03.01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54:11.11264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404]-[.A403]" office:value-type="time" office:time-value="PT00H00M06.072063977S" calcext:value-type="time">
            <text:p>00:00:06.07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54:15.03301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405]-[.A404]" office:value-type="time" office:time-value="PT00H00M03.920374531S" calcext:value-type="time">
            <text:p>00:00:03.92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54:18.04445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406]-[.A405]" office:value-type="time" office:time-value="PT00H00M03.011435084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54:21.05583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407]-[.A406]" office:value-type="time" office:time-value="PT00H00M03.011379135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54:27.1251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408]-[.A407]" office:value-type="time" office:time-value="PT00H00M06.069282233S" calcext:value-type="time">
            <text:p>00:00:06.069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54:31.04885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409]-[.A408]" office:value-type="time" office:time-value="PT00H00M03.923745942S" calcext:value-type="time">
            <text:p>00:00:03.924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54:34.05709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410]-[.A409]" office:value-type="time" office:time-value="PT00H00M03.008232149S" calcext:value-type="time">
            <text:p>00:00:03.008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54:37.06910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411]-[.A410]" office:value-type="time" office:time-value="PT00H00M03.012014693S" calcext:value-type="time">
            <text:p>00:00:03.01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54:43.13703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412]-[.A411]" office:value-type="time" office:time-value="PT00H00M06.067928765S" calcext:value-type="time">
            <text:p>00:00:06.068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54:47.05710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413]-[.A412]" office:value-type="time" office:time-value="PT00H00M03.92007404S" calcext:value-type="time">
            <text:p>00:00:03.92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54:50.06844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414]-[.A413]" office:value-type="time" office:time-value="PT00H00M03.011337016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54:53.07717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415]-[.A414]" office:value-type="time" office:time-value="PT00H00M03.008725005S" calcext:value-type="time">
            <text:p>00:00:03.009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54:59.1452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416]-[.A415]" office:value-type="time" office:time-value="PT00H00M06.068053236S" calcext:value-type="time">
            <text:p>00:00:06.068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55:03.0656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417]-[.A416]" office:value-type="time" office:time-value="PT00H00M03.920385847S" calcext:value-type="time">
            <text:p>00:00:03.92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55:06.07395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418]-[.A417]" office:value-type="time" office:time-value="PT00H00M03.008342162S" calcext:value-type="time">
            <text:p>00:00:03.008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55:09.08528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419]-[.A418]" office:value-type="time" office:time-value="PT00H00M03.011330101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55:15.15709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420]-[.A419]" office:value-type="time" office:time-value="PT00H00M06.07181692S" calcext:value-type="time">
            <text:p>00:00:06.07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55:19.07906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421]-[.A420]" office:value-type="time" office:time-value="PT00H00M03.921961854S" calcext:value-type="time">
            <text:p>00:00:03.92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55:22.09034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422]-[.A421]" office:value-type="time" office:time-value="PT00H00M03.011282953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55:25.10101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423]-[.A422]" office:value-type="time" office:time-value="PT00H00M03.010675055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55:31.17302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424]-[.A423]" office:value-type="time" office:time-value="PT00H00M06.072006142S" calcext:value-type="time">
            <text:p>00:00:06.07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55:35.09527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425]-[.A424]" office:value-type="time" office:time-value="PT00H00M03.922246001S" calcext:value-type="time">
            <text:p>00:00:03.92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55:38.10509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426]-[.A425]" office:value-type="time" office:time-value="PT00H00M03.009822615S" calcext:value-type="time">
            <text:p>00:00:03.01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55:41.11649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427]-[.A426]" office:value-type="time" office:time-value="PT00H00M03.011403023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55:47.18501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428]-[.A427]" office:value-type="time" office:time-value="PT00H00M06.068518432S" calcext:value-type="time">
            <text:p>00:00:06.069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55:51.10729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429]-[.A428]" office:value-type="time" office:time-value="PT00H00M03.922278062S" calcext:value-type="time">
            <text:p>00:00:03.92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55:54.11699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430]-[.A429]" office:value-type="time" office:time-value="PT00H00M03.009698773S" calcext:value-type="time">
            <text:p>00:00:03.01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55:57.12847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431]-[.A430]" office:value-type="time" office:time-value="PT00H00M03.011479089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56:03.19702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432]-[.A431]" office:value-type="time" office:time-value="PT00H00M06.068558036S" calcext:value-type="time">
            <text:p>00:00:06.069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56:07.11707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433]-[.A432]" office:value-type="time" office:time-value="PT00H00M03.920047637S" calcext:value-type="time">
            <text:p>00:00:03.92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56:10.12840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22" calcext:value-type="float">
            <text:p>33022</text:p>
          </table:table-cell>
          <table:table-cell/>
          <table:table-cell table:formula="of:=[.A434]-[.A433]" office:value-type="time" office:time-value="PT00H00M03.011331987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56:12.437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07" calcext:value-type="float">
            <text:p>43007</text:p>
          </table:table-cell>
          <table:table-cell/>
          <table:table-cell table:formula="of:=[.A435]-[.A434]" office:value-type="time" office:time-value="PT00H00M02.308607474S" calcext:value-type="time">
            <text:p>00:00:02.309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56:12.8271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74" calcext:value-type="float">
            <text:p>43074</text:p>
          </table:table-cell>
          <table:table-cell/>
          <table:table-cell table:formula="of:=[.A436]-[.A435]" office:value-type="time" office:time-value="PT00H00M00.390100479S" calcext:value-type="time">
            <text:p>00:00:00.39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56:13.1268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481" calcext:value-type="float">
            <text:p>43481</text:p>
          </table:table-cell>
          <table:table-cell/>
          <table:table-cell table:formula="of:=[.A437]-[.A436]" office:value-type="time" office:time-value="PT00H00M00.299716112S" calcext:value-type="time">
            <text:p>00:00:00.30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56:13.3347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141" calcext:value-type="float">
            <text:p>43141</text:p>
          </table:table-cell>
          <table:table-cell/>
          <table:table-cell table:formula="of:=[.A438]-[.A437]" office:value-type="time" office:time-value="PT00H00M00.207867008S" calcext:value-type="time">
            <text:p>00:00:00.208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56:13.8979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439]-[.A438]" office:value-type="time" office:time-value="PT00H00M00.563212973S" calcext:value-type="time">
            <text:p>00:00:00.563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58:56.3349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440]-[.A439]" office:value-type="time" office:time-value="PT00H02M42.43698732S" calcext:value-type="time">
            <text:p>00:02:42.437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58:56.58938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25" calcext:value-type="float">
            <text:p>33025</text:p>
          </table:table-cell>
          <table:table-cell/>
          <table:table-cell table:formula="of:=[.A441]-[.A440]" office:value-type="time" office:time-value="PT00H00M00.254487782S" calcext:value-type="time">
            <text:p>00:00:00.254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58:56.7929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/>
          <table:table-cell table:formula="of:=[.A442]-[.A441]" office:value-type="time" office:time-value="PT00H00M00.20352623S" calcext:value-type="time">
            <text:p>00:00:00.204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58:56.9972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/>
          <table:table-cell table:formula="of:=[.A443]-[.A442]" office:value-type="time" office:time-value="PT00H00M00.204354152S" calcext:value-type="time">
            <text:p>00:00:00.204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58:57.20253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/>
          <table:table-cell table:formula="of:=[.A444]-[.A443]" office:value-type="time" office:time-value="PT00H00M00.205266941S" calcext:value-type="time">
            <text:p>00:00:00.205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58:57.39896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/>
          <table:table-cell table:formula="of:=[.A445]-[.A444]" office:value-type="time" office:time-value="PT00H00M00.196425081S" calcext:value-type="time">
            <text:p>00:00:00.196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58:57.6032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/>
          <table:table-cell table:formula="of:=[.A446]-[.A445]" office:value-type="time" office:time-value="PT00H00M00.204253569S" calcext:value-type="time">
            <text:p>00:00:00.204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58:57.80264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/>
          <table:table-cell table:formula="of:=[.A447]-[.A446]" office:value-type="time" office:time-value="PT00H00M00.199426222S" calcext:value-type="time">
            <text:p>00:00:00.199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58:58.01287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38" calcext:value-type="float">
            <text:p>33238</text:p>
          </table:table-cell>
          <table:table-cell/>
          <table:table-cell table:formula="of:=[.A448]-[.A447]" office:value-type="time" office:time-value="PT00H00M00.210236991S" calcext:value-type="time">
            <text:p>00:00:00.21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58:58.19612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/>
          <table:table-cell table:formula="of:=[.A449]-[.A448]" office:value-type="time" office:time-value="PT00H00M00.183249987S" calcext:value-type="time">
            <text:p>00:00:00.183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58:58.40929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75" calcext:value-type="float">
            <text:p>33275</text:p>
          </table:table-cell>
          <table:table-cell/>
          <table:table-cell table:formula="of:=[.A450]-[.A449]" office:value-type="time" office:time-value="PT00H00M00.213167723S" calcext:value-type="time">
            <text:p>00:00:00.213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58:58.61379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451]-[.A450]" office:value-type="time" office:time-value="PT00H00M00.204502512S" calcext:value-type="time">
            <text:p>00:00:00.205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58:59.25878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452]-[.A451]" office:value-type="time" office:time-value="PT00H00M00.644983677S" calcext:value-type="time">
            <text:p>00:00:00.645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59:02.26907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453]-[.A452]" office:value-type="time" office:time-value="PT00H00M03.010297869S" calcext:value-type="time">
            <text:p>00:00:03.01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59:05.27924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454]-[.A453]" office:value-type="time" office:time-value="PT00H00M03.010170255S" calcext:value-type="time">
            <text:p>00:00:03.01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59:11.3493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455]-[.A454]" office:value-type="time" office:time-value="PT00H00M06.070073065S" calcext:value-type="time">
            <text:p>00:00:06.07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59:15.26927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456]-[.A455]" office:value-type="time" office:time-value="PT00H00M03.919953969S" calcext:value-type="time">
            <text:p>00:00:03.92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59:18.28147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457]-[.A456]" office:value-type="time" office:time-value="PT00H00M03.012197628S" calcext:value-type="time">
            <text:p>00:00:03.01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59:21.29307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458]-[.A457]" office:value-type="time" office:time-value="PT00H00M03.011597274S" calcext:value-type="time">
            <text:p>00:00:03.01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59:27.36523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459]-[.A458]" office:value-type="time" office:time-value="PT00H00M06.072162045S" calcext:value-type="time">
            <text:p>00:00:06.07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59:31.28544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460]-[.A459]" office:value-type="time" office:time-value="PT00H00M03.920211713S" calcext:value-type="time">
            <text:p>00:00:03.92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59:34.29654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461]-[.A460]" office:value-type="time" office:time-value="PT00H00M03.011098132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59:37.30897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462]-[.A461]" office:value-type="time" office:time-value="PT00H00M03.01242834S" calcext:value-type="time">
            <text:p>00:00:03.01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59:43.38112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463]-[.A462]" office:value-type="time" office:time-value="PT00H00M06.072157645S" calcext:value-type="time">
            <text:p>00:00:06.07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59:47.30253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464]-[.A463]" office:value-type="time" office:time-value="PT00H00M03.921409277S" calcext:value-type="time">
            <text:p>00:00:03.92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59:50.31304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465]-[.A464]" office:value-type="time" office:time-value="PT00H00M03.01050155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59:53.32441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466]-[.A465]" office:value-type="time" office:time-value="PT00H00M03.011377249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0:59:59.39608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467]-[.A466]" office:value-type="time" office:time-value="PT00H00M06.071671704S" calcext:value-type="time">
            <text:p>00:00:06.07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00:03.31709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468]-[.A467]" office:value-type="time" office:time-value="PT00H00M03.921001288S" calcext:value-type="time">
            <text:p>00:00:03.92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00:06.32840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469]-[.A468]" office:value-type="time" office:time-value="PT00H00M03.011318156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00:09.33973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470]-[.A469]" office:value-type="time" office:time-value="PT00H00M03.011330101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00:15.41288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471]-[.A470]" office:value-type="time" office:time-value="PT00H00M06.073147757S" calcext:value-type="time">
            <text:p>00:00:06.073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00:19.33713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472]-[.A471]" office:value-type="time" office:time-value="PT00H00M03.924250742S" calcext:value-type="time">
            <text:p>00:00:03.924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00:22.34653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473]-[.A472]" office:value-type="time" office:time-value="PT00H00M03.00939451S" calcext:value-type="time">
            <text:p>00:00:03.009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00:25.35701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474]-[.A473]" office:value-type="time" office:time-value="PT00H00M03.010484576S" calcext:value-type="time">
            <text:p>00:00:03.01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00:31.42598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475]-[.A474]" office:value-type="time" office:time-value="PT00H00M06.06896414S" calcext:value-type="time">
            <text:p>00:00:06.069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00:35.34900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476]-[.A475]" office:value-type="time" office:time-value="PT00H00M03.923024889S" calcext:value-type="time">
            <text:p>00:00:03.923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00:38.35928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477]-[.A476]" office:value-type="time" office:time-value="PT00H00M03.010282153S" calcext:value-type="time">
            <text:p>00:00:03.01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00:41.36922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478]-[.A477]" office:value-type="time" office:time-value="PT00H00M03.009935771S" calcext:value-type="time">
            <text:p>00:00:03.01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00:47.43707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479]-[.A478]" office:value-type="time" office:time-value="PT00H00M06.067855214S" calcext:value-type="time">
            <text:p>00:00:06.068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00:51.35836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480]-[.A479]" office:value-type="time" office:time-value="PT00H00M03.921284806S" calcext:value-type="time">
            <text:p>00:00:03.92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00:54.36923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481]-[.A480]" office:value-type="time" office:time-value="PT00H00M03.010868048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00:57.37814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482]-[.A481]" office:value-type="time" office:time-value="PT00H00M03.008914855S" calcext:value-type="time">
            <text:p>00:00:03.009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01:03.44902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483]-[.A482]" office:value-type="time" office:time-value="PT00H00M06.0708815S" calcext:value-type="time">
            <text:p>00:00:06.07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01:07.36923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484]-[.A483]" office:value-type="time" office:time-value="PT00H00M03.920211084S" calcext:value-type="time">
            <text:p>00:00:03.92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01:10.38046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485]-[.A484]" office:value-type="time" office:time-value="PT00H00M03.011228889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01:13.38901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486]-[.A485]" office:value-type="time" office:time-value="PT00H00M03.008548985S" calcext:value-type="time">
            <text:p>00:00:03.009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01:16.4004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22" calcext:value-type="float">
            <text:p>33022</text:p>
          </table:table-cell>
          <table:table-cell/>
          <table:table-cell table:formula="of:=[.A487]-[.A486]" office:value-type="time" office:time-value="PT00H00M03.011403023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01:17.3900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07" calcext:value-type="float">
            <text:p>43007</text:p>
          </table:table-cell>
          <table:table-cell/>
          <table:table-cell table:formula="of:=[.A488]-[.A487]" office:value-type="time" office:time-value="PT00H00M00.989667862S" calcext:value-type="time">
            <text:p>00:00:00.99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01:17.68036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74" calcext:value-type="float">
            <text:p>43074</text:p>
          </table:table-cell>
          <table:table-cell/>
          <table:table-cell table:formula="of:=[.A489]-[.A488]" office:value-type="time" office:time-value="PT00H00M00.290275156S" calcext:value-type="time">
            <text:p>00:00:00.29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01:18.08147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481" calcext:value-type="float">
            <text:p>43481</text:p>
          </table:table-cell>
          <table:table-cell/>
          <table:table-cell table:formula="of:=[.A490]-[.A489]" office:value-type="time" office:time-value="PT00H00M00.401111785S" calcext:value-type="time">
            <text:p>00:00:00.40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01:18.28945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141" calcext:value-type="float">
            <text:p>43141</text:p>
          </table:table-cell>
          <table:table-cell/>
          <table:table-cell table:formula="of:=[.A491]-[.A490]" office:value-type="time" office:time-value="PT00H00M00.207978906S" calcext:value-type="time">
            <text:p>00:00:00.208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01:18.75090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492]-[.A491]" office:value-type="time" office:time-value="PT00H00M00.461448287S" calcext:value-type="time">
            <text:p>00:00:00.46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03:56.58867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493]-[.A492]" office:value-type="time" office:time-value="PT00H02M37.837771671S" calcext:value-type="time">
            <text:p>00:02:37.838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03:56.84427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25" calcext:value-type="float">
            <text:p>33025</text:p>
          </table:table-cell>
          <table:table-cell/>
          <table:table-cell table:formula="of:=[.A494]-[.A493]" office:value-type="time" office:time-value="PT00H00M00.255602994S" calcext:value-type="time">
            <text:p>00:00:00.256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03:57.04778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/>
          <table:table-cell table:formula="of:=[.A495]-[.A494]" office:value-type="time" office:time-value="PT00H00M00.203507999S" calcext:value-type="time">
            <text:p>00:00:00.204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03:57.25158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/>
          <table:table-cell table:formula="of:=[.A496]-[.A495]" office:value-type="time" office:time-value="PT00H00M00.203799061S" calcext:value-type="time">
            <text:p>00:00:00.204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03:57.45515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/>
          <table:table-cell table:formula="of:=[.A497]-[.A496]" office:value-type="time" office:time-value="PT00H00M00.203568977S" calcext:value-type="time">
            <text:p>00:00:00.204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03:57.65294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/>
          <table:table-cell table:formula="of:=[.A498]-[.A497]" office:value-type="time" office:time-value="PT00H00M00.197787979S" calcext:value-type="time">
            <text:p>00:00:00.198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03:57.85670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/>
          <table:table-cell table:formula="of:=[.A499]-[.A498]" office:value-type="time" office:time-value="PT00H00M00.203767S" calcext:value-type="time">
            <text:p>00:00:00.204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03:58.05434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/>
          <table:table-cell table:formula="of:=[.A500]-[.A499]" office:value-type="time" office:time-value="PT00H00M00.19763899S" calcext:value-type="time">
            <text:p>00:00:00.198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03:58.2621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38" calcext:value-type="float">
            <text:p>33238</text:p>
          </table:table-cell>
          <table:table-cell/>
          <table:table-cell table:formula="of:=[.A501]-[.A500]" office:value-type="time" office:time-value="PT00H00M00.207756995S" calcext:value-type="time">
            <text:p>00:00:00.208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03:58.4461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/>
          <table:table-cell table:formula="of:=[.A502]-[.A501]" office:value-type="time" office:time-value="PT00H00M00.184062193S" calcext:value-type="time">
            <text:p>00:00:00.184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03:58.6594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75" calcext:value-type="float">
            <text:p>33275</text:p>
          </table:table-cell>
          <table:table-cell/>
          <table:table-cell table:formula="of:=[.A503]-[.A502]" office:value-type="time" office:time-value="PT00H00M00.213292823S" calcext:value-type="time">
            <text:p>00:00:00.213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03:58.86293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504]-[.A503]" office:value-type="time" office:time-value="PT00H00M00.203475938S" calcext:value-type="time">
            <text:p>00:00:00.203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03:59.50896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505]-[.A504]" office:value-type="time" office:time-value="PT00H00M00.646034139S" calcext:value-type="time">
            <text:p>00:00:00.646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04:02.52045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506]-[.A505]" office:value-type="time" office:time-value="PT00H00M03.01148789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04:05.53136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507]-[.A506]" office:value-type="time" office:time-value="PT00H00M03.01090891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04:11.60109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508]-[.A507]" office:value-type="time" office:time-value="PT00H00M06.069729198S" calcext:value-type="time">
            <text:p>00:00:06.07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04:15.52120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509]-[.A508]" office:value-type="time" office:time-value="PT00H00M03.920107987S" calcext:value-type="time">
            <text:p>00:00:03.92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04:18.53240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510]-[.A509]" office:value-type="time" office:time-value="PT00H00M03.011199972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04:21.54102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511]-[.A510]" office:value-type="time" office:time-value="PT00H00M03.008626308S" calcext:value-type="time">
            <text:p>00:00:03.009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04:27.61303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512]-[.A511]" office:value-type="time" office:time-value="PT00H00M06.072004884S" calcext:value-type="time">
            <text:p>00:00:06.07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04:31.53704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513]-[.A512]" office:value-type="time" office:time-value="PT00H00M03.924008715S" calcext:value-type="time">
            <text:p>00:00:03.924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04:34.5486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514]-[.A513]" office:value-type="time" office:time-value="PT00H00M03.011575271S" calcext:value-type="time">
            <text:p>00:00:03.01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04:37.56025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515]-[.A514]" office:value-type="time" office:time-value="PT00H00M03.011633107S" calcext:value-type="time">
            <text:p>00:00:03.01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04:43.62903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516]-[.A515]" office:value-type="time" office:time-value="PT00H00M06.06878309S" calcext:value-type="time">
            <text:p>00:00:06.069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04:47.5515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517]-[.A516]" office:value-type="time" office:time-value="PT00H00M03.922490543S" calcext:value-type="time">
            <text:p>00:00:03.92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04:50.56139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518]-[.A517]" office:value-type="time" office:time-value="PT00H00M03.009869135S" calcext:value-type="time">
            <text:p>00:00:03.01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04:53.5727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519]-[.A518]" office:value-type="time" office:time-value="PT00H00M03.011318156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04:59.64505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520]-[.A519]" office:value-type="time" office:time-value="PT00H00M06.072338694S" calcext:value-type="time">
            <text:p>00:00:06.07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05:03.5650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521]-[.A520]" office:value-type="time" office:time-value="PT00H00M03.919960256S" calcext:value-type="time">
            <text:p>00:00:03.92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05:06.57630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522]-[.A521]" office:value-type="time" office:time-value="PT00H00M03.011296783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05:09.58506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523]-[.A522]" office:value-type="time" office:time-value="PT00H00M03.008753294S" calcext:value-type="time">
            <text:p>00:00:03.009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05:15.6562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524]-[.A523]" office:value-type="time" office:time-value="PT00H00M06.07114993S" calcext:value-type="time">
            <text:p>00:00:06.07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05:19.57800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525]-[.A524]" office:value-type="time" office:time-value="PT00H00M03.921797778S" calcext:value-type="time">
            <text:p>00:00:03.92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05:22.58926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526]-[.A525]" office:value-type="time" office:time-value="PT00H00M03.011255292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05:25.59939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527]-[.A526]" office:value-type="time" office:time-value="PT00H00M03.010135051S" calcext:value-type="time">
            <text:p>00:00:03.01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05:31.67123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528]-[.A527]" office:value-type="time" office:time-value="PT00H00M06.07183578S" calcext:value-type="time">
            <text:p>00:00:06.07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05:35.5932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529]-[.A528]" office:value-type="time" office:time-value="PT00H00M03.921978199S" calcext:value-type="time">
            <text:p>00:00:03.92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05:38.60466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530]-[.A529]" office:value-type="time" office:time-value="PT00H00M03.011453943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05:41.61577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531]-[.A530]" office:value-type="time" office:time-value="PT00H00M03.011111962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05:47.68524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532]-[.A531]" office:value-type="time" office:time-value="PT00H00M06.069462025S" calcext:value-type="time">
            <text:p>00:00:06.069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05:51.60513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533]-[.A532]" office:value-type="time" office:time-value="PT00H00M03.919896134S" calcext:value-type="time">
            <text:p>00:00:03.92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05:54.61374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534]-[.A533]" office:value-type="time" office:time-value="PT00H00M03.00861185S" calcext:value-type="time">
            <text:p>00:00:03.009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05:57.62503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535]-[.A534]" office:value-type="time" office:time-value="PT00H00M03.011291125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06:03.69699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536]-[.A535]" office:value-type="time" office:time-value="PT00H00M06.071959622S" calcext:value-type="time">
            <text:p>00:00:06.07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06:07.62028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537]-[.A536]" office:value-type="time" office:time-value="PT00H00M03.92328389S" calcext:value-type="time">
            <text:p>00:00:03.923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06:10.63262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538]-[.A537]" office:value-type="time" office:time-value="PT00H00M03.012341587S" calcext:value-type="time">
            <text:p>00:00:03.01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06:13.64104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539]-[.A538]" office:value-type="time" office:time-value="PT00H00M03.008420742S" calcext:value-type="time">
            <text:p>00:00:03.008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06:16.65300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22" calcext:value-type="float">
            <text:p>33022</text:p>
          </table:table-cell>
          <table:table-cell/>
          <table:table-cell table:formula="of:=[.A540]-[.A539]" office:value-type="time" office:time-value="PT00H00M03.011961887S" calcext:value-type="time">
            <text:p>00:00:03.01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06:19.14233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07" calcext:value-type="float">
            <text:p>43007</text:p>
          </table:table-cell>
          <table:table-cell/>
          <table:table-cell table:formula="of:=[.A541]-[.A540]" office:value-type="time" office:time-value="PT00H00M02.48932906S" calcext:value-type="time">
            <text:p>00:00:02.489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06:19.4326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74" calcext:value-type="float">
            <text:p>43074</text:p>
          </table:table-cell>
          <table:table-cell/>
          <table:table-cell table:formula="of:=[.A542]-[.A541]" office:value-type="time" office:time-value="PT00H00M00.29026824S" calcext:value-type="time">
            <text:p>00:00:00.29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06:19.8337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481" calcext:value-type="float">
            <text:p>43481</text:p>
          </table:table-cell>
          <table:table-cell/>
          <table:table-cell table:formula="of:=[.A543]-[.A542]" office:value-type="time" office:time-value="PT00H00M00.401109899S" calcext:value-type="time">
            <text:p>00:00:00.40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06:20.0426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141" calcext:value-type="float">
            <text:p>43141</text:p>
          </table:table-cell>
          <table:table-cell/>
          <table:table-cell table:formula="of:=[.A544]-[.A543]" office:value-type="time" office:time-value="PT00H00M00.208984106S" calcext:value-type="time">
            <text:p>00:00:00.209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06:20.51836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545]-[.A544]" office:value-type="time" office:time-value="PT00H00M00.475663785S" calcext:value-type="time">
            <text:p>00:00:00.476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08:56.83949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546]-[.A545]" office:value-type="time" office:time-value="PT00H02M36.321133976S" calcext:value-type="time">
            <text:p>00:02:36.32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08:57.0929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25" calcext:value-type="float">
            <text:p>33025</text:p>
          </table:table-cell>
          <table:table-cell/>
          <table:table-cell table:formula="of:=[.A547]-[.A546]" office:value-type="time" office:time-value="PT00H00M00.253426004S" calcext:value-type="time">
            <text:p>00:00:00.253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08:57.2977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/>
          <table:table-cell table:formula="of:=[.A548]-[.A547]" office:value-type="time" office:time-value="PT00H00M00.204833806S" calcext:value-type="time">
            <text:p>00:00:00.205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08:57.50112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/>
          <table:table-cell table:formula="of:=[.A549]-[.A548]" office:value-type="time" office:time-value="PT00H00M00.203370955S" calcext:value-type="time">
            <text:p>00:00:00.203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08:57.70470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/>
          <table:table-cell table:formula="of:=[.A550]-[.A549]" office:value-type="time" office:time-value="PT00H00M00.20358155S" calcext:value-type="time">
            <text:p>00:00:00.204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08:57.9023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/>
          <table:table-cell table:formula="of:=[.A551]-[.A550]" office:value-type="time" office:time-value="PT00H00M00.197602529S" calcext:value-type="time">
            <text:p>00:00:00.198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08:58.1058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/>
          <table:table-cell table:formula="of:=[.A552]-[.A551]" office:value-type="time" office:time-value="PT00H00M00.203534402S" calcext:value-type="time">
            <text:p>00:00:00.204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08:58.3035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/>
          <table:table-cell table:formula="of:=[.A553]-[.A552]" office:value-type="time" office:time-value="PT00H00M00.19765785S" calcext:value-type="time">
            <text:p>00:00:00.198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08:58.51123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38" calcext:value-type="float">
            <text:p>33238</text:p>
          </table:table-cell>
          <table:table-cell/>
          <table:table-cell table:formula="of:=[.A554]-[.A553]" office:value-type="time" office:time-value="PT00H00M00.207728078S" calcext:value-type="time">
            <text:p>00:00:00.208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08:58.6966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/>
          <table:table-cell table:formula="of:=[.A555]-[.A554]" office:value-type="time" office:time-value="PT00H00M00.185420061S" calcext:value-type="time">
            <text:p>00:00:00.185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08:58.90905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75" calcext:value-type="float">
            <text:p>33275</text:p>
          </table:table-cell>
          <table:table-cell/>
          <table:table-cell table:formula="of:=[.A556]-[.A555]" office:value-type="time" office:time-value="PT00H00M00.212400779S" calcext:value-type="time">
            <text:p>00:00:00.21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08:59.11427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557]-[.A556]" office:value-type="time" office:time-value="PT00H00M00.205217907S" calcext:value-type="time">
            <text:p>00:00:00.205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08:59.76223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558]-[.A557]" office:value-type="time" office:time-value="PT00H00M00.647965958S" calcext:value-type="time">
            <text:p>00:00:00.648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09:02.77317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559]-[.A558]" office:value-type="time" office:time-value="PT00H00M03.010942857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09:05.78436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560]-[.A559]" office:value-type="time" office:time-value="PT00H00M03.011187399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09:11.85305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561]-[.A560]" office:value-type="time" office:time-value="PT00H00M06.06869068S" calcext:value-type="time">
            <text:p>00:00:06.069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09:15.77304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562]-[.A561]" office:value-type="time" office:time-value="PT00H00M03.919982887S" calcext:value-type="time">
            <text:p>00:00:03.92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09:18.78456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563]-[.A562]" office:value-type="time" office:time-value="PT00H00M03.011522465S" calcext:value-type="time">
            <text:p>00:00:03.01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09:21.79309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564]-[.A563]" office:value-type="time" office:time-value="PT00H00M03.008533898S" calcext:value-type="time">
            <text:p>00:00:03.009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09:27.86507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565]-[.A564]" office:value-type="time" office:time-value="PT00H00M06.071979739S" calcext:value-type="time">
            <text:p>00:00:06.07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09:31.78894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566]-[.A565]" office:value-type="time" office:time-value="PT00H00M03.92386727S" calcext:value-type="time">
            <text:p>00:00:03.924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09:34.80028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567]-[.A566]" office:value-type="time" office:time-value="PT00H00M03.011340159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09:37.8092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568]-[.A567]" office:value-type="time" office:time-value="PT00H00M03.008935601S" calcext:value-type="time">
            <text:p>00:00:03.009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09:43.88119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569]-[.A568]" office:value-type="time" office:time-value="PT00H00M06.071974081S" calcext:value-type="time">
            <text:p>00:00:06.07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09:47.8010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570]-[.A569]" office:value-type="time" office:time-value="PT00H00M03.919823212S" calcext:value-type="time">
            <text:p>00:00:03.92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09:50.81091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571]-[.A570]" office:value-type="time" office:time-value="PT00H00M03.009903082S" calcext:value-type="time">
            <text:p>00:00:03.01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09:53.82120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572]-[.A571]" office:value-type="time" office:time-value="PT00H00M03.010285925S" calcext:value-type="time">
            <text:p>00:00:03.01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09:59.89322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573]-[.A572]" office:value-type="time" office:time-value="PT00H00M06.072018086S" calcext:value-type="time">
            <text:p>00:00:06.07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10:03.81310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574]-[.A573]" office:value-type="time" office:time-value="PT00H00M03.919882933S" calcext:value-type="time">
            <text:p>00:00:03.92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10:06.82445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575]-[.A574]" office:value-type="time" office:time-value="PT00H00M03.011344559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10:09.83393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576]-[.A575]" office:value-type="time" office:time-value="PT00H00M03.009479376S" calcext:value-type="time">
            <text:p>00:00:03.009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10:15.90506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577]-[.A576]" office:value-type="time" office:time-value="PT00H00M06.071131071S" calcext:value-type="time">
            <text:p>00:00:06.07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10:19.82687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578]-[.A577]" office:value-type="time" office:time-value="PT00H00M03.921809723S" calcext:value-type="time">
            <text:p>00:00:03.92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10:22.83706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579]-[.A578]" office:value-type="time" office:time-value="PT00H00M03.010191S" calcext:value-type="time">
            <text:p>00:00:03.01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10:25.84844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580]-[.A579]" office:value-type="time" office:time-value="PT00H00M03.011380392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10:31.92152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581]-[.A580]" office:value-type="time" office:time-value="PT00H00M06.073080492S" calcext:value-type="time">
            <text:p>00:00:06.073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10:35.84104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582]-[.A581]" office:value-type="time" office:time-value="PT00H00M03.919526492S" calcext:value-type="time">
            <text:p>00:00:03.92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10:38.85119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583]-[.A582]" office:value-type="time" office:time-value="PT00H00M03.01014951S" calcext:value-type="time">
            <text:p>00:00:03.01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10:41.86253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584]-[.A583]" office:value-type="time" office:time-value="PT00H00M03.011338273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10:47.93319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585]-[.A584]" office:value-type="time" office:time-value="PT00H00M06.07065896S" calcext:value-type="time">
            <text:p>00:00:06.07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10:51.85321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586]-[.A585]" office:value-type="time" office:time-value="PT00H00M03.920014948S" calcext:value-type="time">
            <text:p>00:00:03.92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10:54.86438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587]-[.A586]" office:value-type="time" office:time-value="PT00H00M03.011177969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10:57.87371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588]-[.A587]" office:value-type="time" office:time-value="PT00H00M03.009322216S" calcext:value-type="time">
            <text:p>00:00:03.009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11:03.94503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589]-[.A588]" office:value-type="time" office:time-value="PT00H00M06.071324064S" calcext:value-type="time">
            <text:p>00:00:06.07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11:07.86519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590]-[.A589]" office:value-type="time" office:time-value="PT00H00M03.920163936S" calcext:value-type="time">
            <text:p>00:00:03.92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11:10.87426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591]-[.A590]" office:value-type="time" office:time-value="PT00H00M03.009067615S" calcext:value-type="time">
            <text:p>00:00:03.009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11:13.88514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592]-[.A591]" office:value-type="time" office:time-value="PT00H00M03.010879364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11:19.95705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22" calcext:value-type="float">
            <text:p>33022</text:p>
          </table:table-cell>
          <table:table-cell/>
          <table:table-cell table:formula="of:=[.A593]-[.A592]" office:value-type="time" office:time-value="PT00H00M06.071906816S" calcext:value-type="time">
            <text:p>00:00:06.07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11:21.1865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07" calcext:value-type="float">
            <text:p>43007</text:p>
          </table:table-cell>
          <table:table-cell/>
          <table:table-cell table:formula="of:=[.A594]-[.A593]" office:value-type="time" office:time-value="PT00H00M01.229473064S" calcext:value-type="time">
            <text:p>00:00:01.229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11:21.5775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74" calcext:value-type="float">
            <text:p>43074</text:p>
          </table:table-cell>
          <table:table-cell/>
          <table:table-cell table:formula="of:=[.A595]-[.A594]" office:value-type="time" office:time-value="PT00H00M00.390979322S" calcext:value-type="time">
            <text:p>00:00:00.39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11:21.8793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481" calcext:value-type="float">
            <text:p>43481</text:p>
          </table:table-cell>
          <table:table-cell/>
          <table:table-cell table:formula="of:=[.A596]-[.A595]" office:value-type="time" office:time-value="PT00H00M00.301806978S" calcext:value-type="time">
            <text:p>00:00:00.30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11:22.1872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141" calcext:value-type="float">
            <text:p>43141</text:p>
          </table:table-cell>
          <table:table-cell/>
          <table:table-cell table:formula="of:=[.A597]-[.A596]" office:value-type="time" office:time-value="PT00H00M00.307918643S" calcext:value-type="time">
            <text:p>00:00:00.308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11:22.55004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598]-[.A597]" office:value-type="time" office:time-value="PT00H00M00.362816127S" calcext:value-type="time">
            <text:p>00:00:00.363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13:57.08536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599]-[.A598]" office:value-type="time" office:time-value="PT00H02M34.535315232S" calcext:value-type="time">
            <text:p>00:02:34.535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13:57.33984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25" calcext:value-type="float">
            <text:p>33025</text:p>
          </table:table-cell>
          <table:table-cell/>
          <table:table-cell table:formula="of:=[.A600]-[.A599]" office:value-type="time" office:time-value="PT00H00M00.254480867S" calcext:value-type="time">
            <text:p>00:00:00.254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13:57.54424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/>
          <table:table-cell table:formula="of:=[.A601]-[.A600]" office:value-type="time" office:time-value="PT00H00M00.204400043S" calcext:value-type="time">
            <text:p>00:00:00.204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13:57.7466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/>
          <table:table-cell table:formula="of:=[.A602]-[.A601]" office:value-type="time" office:time-value="PT00H00M00.202384614S" calcext:value-type="time">
            <text:p>00:00:00.20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13:57.95118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/>
          <table:table-cell table:formula="of:=[.A603]-[.A602]" office:value-type="time" office:time-value="PT00H00M00.204552175S" calcext:value-type="time">
            <text:p>00:00:00.205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13:58.14748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/>
          <table:table-cell table:formula="of:=[.A604]-[.A603]" office:value-type="time" office:time-value="PT00H00M00.196303125S" calcext:value-type="time">
            <text:p>00:00:00.196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13:58.35107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/>
          <table:table-cell table:formula="of:=[.A605]-[.A604]" office:value-type="time" office:time-value="PT00H00M00.203589094S" calcext:value-type="time">
            <text:p>00:00:00.204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13:58.54910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/>
          <table:table-cell table:formula="of:=[.A606]-[.A605]" office:value-type="time" office:time-value="PT00H00M00.198032521S" calcext:value-type="time">
            <text:p>00:00:00.198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13:58.75769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38" calcext:value-type="float">
            <text:p>33238</text:p>
          </table:table-cell>
          <table:table-cell/>
          <table:table-cell table:formula="of:=[.A607]-[.A606]" office:value-type="time" office:time-value="PT00H00M00.208585546S" calcext:value-type="time">
            <text:p>00:00:00.209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13:58.94092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/>
          <table:table-cell table:formula="of:=[.A608]-[.A607]" office:value-type="time" office:time-value="PT00H00M00.183235528S" calcext:value-type="time">
            <text:p>00:00:00.183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13:59.15340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75" calcext:value-type="float">
            <text:p>33275</text:p>
          </table:table-cell>
          <table:table-cell/>
          <table:table-cell table:formula="of:=[.A609]-[.A608]" office:value-type="time" office:time-value="PT00H00M00.212479359S" calcext:value-type="time">
            <text:p>00:00:00.21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13:59.35718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610]-[.A609]" office:value-type="time" office:time-value="PT00H00M00.203782716S" calcext:value-type="time">
            <text:p>00:00:00.204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14:00.00696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611]-[.A610]" office:value-type="time" office:time-value="PT00H00M00.649775821S" calcext:value-type="time">
            <text:p>00:00:00.65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14:03.01708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612]-[.A611]" office:value-type="time" office:time-value="PT00H00M03.010117449S" calcext:value-type="time">
            <text:p>00:00:03.01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14:06.02842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613]-[.A612]" office:value-type="time" office:time-value="PT00H00M03.011340788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14:12.10074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614]-[.A613]" office:value-type="time" office:time-value="PT00H00M06.072321092S" calcext:value-type="time">
            <text:p>00:00:06.07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14:16.02128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615]-[.A614]" office:value-type="time" office:time-value="PT00H00M03.920544893S" calcext:value-type="time">
            <text:p>00:00:03.92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14:19.03262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616]-[.A615]" office:value-type="time" office:time-value="PT00H00M03.011340159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14:22.04524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617]-[.A616]" office:value-type="time" office:time-value="PT00H00M03.012615675S" calcext:value-type="time">
            <text:p>00:00:03.013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14:28.11703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618]-[.A617]" office:value-type="time" office:time-value="PT00H00M06.071790517S" calcext:value-type="time">
            <text:p>00:00:06.07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14:32.0405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619]-[.A618]" office:value-type="time" office:time-value="PT00H00M03.923482541S" calcext:value-type="time">
            <text:p>00:00:03.923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14:35.05210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620]-[.A619]" office:value-type="time" office:time-value="PT00H00M03.01158533S" calcext:value-type="time">
            <text:p>00:00:03.01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14:38.0611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621]-[.A620]" office:value-type="time" office:time-value="PT00H00M03.009021725S" calcext:value-type="time">
            <text:p>00:00:03.009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14:44.12907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622]-[.A621]" office:value-type="time" office:time-value="PT00H00M06.067951396S" calcext:value-type="time">
            <text:p>00:00:06.068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14:48.04910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623]-[.A622]" office:value-type="time" office:time-value="PT00H00M03.920028778S" calcext:value-type="time">
            <text:p>00:00:03.92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14:51.06044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624]-[.A623]" office:value-type="time" office:time-value="PT00H00M03.011337644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14:54.06902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625]-[.A624]" office:value-type="time" office:time-value="PT00H00M03.008585447S" calcext:value-type="time">
            <text:p>00:00:03.009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15:00.1411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626]-[.A625]" office:value-type="time" office:time-value="PT00H00M06.072084722S" calcext:value-type="time">
            <text:p>00:00:06.07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15:04.06443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627]-[.A626]" office:value-type="time" office:time-value="PT00H00M03.92332538S" calcext:value-type="time">
            <text:p>00:00:03.923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15:07.07398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628]-[.A627]" office:value-type="time" office:time-value="PT00H00M03.009544755S" calcext:value-type="time">
            <text:p>00:00:03.01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15:10.08530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629]-[.A628]" office:value-type="time" office:time-value="PT00H00M03.011320042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15:16.15850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630]-[.A629]" office:value-type="time" office:time-value="PT00H00M06.073199934S" calcext:value-type="time">
            <text:p>00:00:06.073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15:20.08102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631]-[.A630]" office:value-type="time" office:time-value="PT00H00M03.922523861S" calcext:value-type="time">
            <text:p>00:00:03.923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15:23.09234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632]-[.A631]" office:value-type="time" office:time-value="PT00H00M03.011319414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15:26.10102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633]-[.A632]" office:value-type="time" office:time-value="PT00H00M03.008681629S" calcext:value-type="time">
            <text:p>00:00:03.009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15:32.17422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634]-[.A633]" office:value-type="time" office:time-value="PT00H00M06.07320182S" calcext:value-type="time">
            <text:p>00:00:06.073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15:36.09750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635]-[.A634]" office:value-type="time" office:time-value="PT00H00M03.92327446S" calcext:value-type="time">
            <text:p>00:00:03.923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15:39.1089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636]-[.A635]" office:value-type="time" office:time-value="PT00H00M03.011418739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15:42.12027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637]-[.A636]" office:value-type="time" office:time-value="PT00H00M03.011348331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15:48.18914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638]-[.A637]" office:value-type="time" office:time-value="PT00H00M06.068869843S" calcext:value-type="time">
            <text:p>00:00:06.069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15:52.11192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639]-[.A638]" office:value-type="time" office:time-value="PT00H00M03.922789148S" calcext:value-type="time">
            <text:p>00:00:03.923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15:55.12109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640]-[.A639]" office:value-type="time" office:time-value="PT00H00M03.009165055S" calcext:value-type="time">
            <text:p>00:00:03.009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15:58.13248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641]-[.A640]" office:value-type="time" office:time-value="PT00H00M03.011388564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16:04.20326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642]-[.A641]" office:value-type="time" office:time-value="PT00H00M06.070780917S" calcext:value-type="time">
            <text:p>00:00:06.07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16:08.12752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643]-[.A642]" office:value-type="time" office:time-value="PT00H00M03.924263315S" calcext:value-type="time">
            <text:p>00:00:03.924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16:11.13707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644]-[.A643]" office:value-type="time" office:time-value="PT00H00M03.009544127S" calcext:value-type="time">
            <text:p>00:00:03.01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16:14.14862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645]-[.A644]" office:value-type="time" office:time-value="PT00H00M03.011552012S" calcext:value-type="time">
            <text:p>00:00:03.01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16:20.22133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22" calcext:value-type="float">
            <text:p>33022</text:p>
          </table:table-cell>
          <table:table-cell/>
          <table:table-cell table:formula="of:=[.A646]-[.A645]" office:value-type="time" office:time-value="PT00H00M06.072714622S" calcext:value-type="time">
            <text:p>00:00:06.073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16:23.4507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07" calcext:value-type="float">
            <text:p>43007</text:p>
          </table:table-cell>
          <table:table-cell/>
          <table:table-cell table:formula="of:=[.A647]-[.A646]" office:value-type="time" office:time-value="PT00H00M03.229432041S" calcext:value-type="time">
            <text:p>00:00:03.229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16:23.8418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74" calcext:value-type="float">
            <text:p>43074</text:p>
          </table:table-cell>
          <table:table-cell/>
          <table:table-cell table:formula="of:=[.A648]-[.A647]" office:value-type="time" office:time-value="PT00H00M00.39105413S" calcext:value-type="time">
            <text:p>00:00:00.39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16:24.1414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481" calcext:value-type="float">
            <text:p>43481</text:p>
          </table:table-cell>
          <table:table-cell/>
          <table:table-cell table:formula="of:=[.A649]-[.A648]" office:value-type="time" office:time-value="PT00H00M00.299658906S" calcext:value-type="time">
            <text:p>00:00:00.30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16:24.35055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141" calcext:value-type="float">
            <text:p>43141</text:p>
          </table:table-cell>
          <table:table-cell/>
          <table:table-cell table:formula="of:=[.A650]-[.A649]" office:value-type="time" office:time-value="PT00H00M00.209075888S" calcext:value-type="time">
            <text:p>00:00:00.209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16:24.71208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651]-[.A650]" office:value-type="time" office:time-value="PT00H00M00.36152238S" calcext:value-type="time">
            <text:p>00:00:00.36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2" office:value-type="string" calcext:value-type="string">
            <text:p>2026-Mar-29 21:18:57.34768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3000" calcext:value-type="float">
            <text:p>33000</text:p>
          </table:table-cell>
          <table:table-cell table:style-name="ce3"/>
          <table:table-cell table:style-name="ce10" table:formula="of:=[.A652]-[.A651]" office:value-type="time" office:time-value="PT00H02M32.635606541S" calcext:value-type="time">
            <text:p>00:02:32.636</text:p>
          </table:table-cell>
          <table:table-cell table:style-name="ce5"/>
          <table:table-cell table:style-name="ce3" table:number-columns-repeated="1017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18:57.50228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25" calcext:value-type="float">
            <text:p>33025</text:p>
          </table:table-cell>
          <table:table-cell/>
          <table:table-cell table:formula="of:=[.A653]-[.A652]" office:value-type="time" office:time-value="PT00H00M00.154596451S" calcext:value-type="time">
            <text:p>00:00:00.155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18:57.7058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/>
          <table:table-cell table:formula="of:=[.A654]-[.A653]" office:value-type="time" office:time-value="PT00H00M00.203537545S" calcext:value-type="time">
            <text:p>00:00:00.204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18:57.9093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/>
          <table:table-cell table:formula="of:=[.A655]-[.A654]" office:value-type="time" office:time-value="PT00H00M00.203498569S" calcext:value-type="time">
            <text:p>00:00:00.203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18:58.12287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/>
          <table:table-cell table:formula="of:=[.A656]-[.A655]" office:value-type="time" office:time-value="PT00H00M00.213552453S" calcext:value-type="time">
            <text:p>00:00:00.214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18:58.4104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/>
          <table:table-cell table:formula="of:=[.A657]-[.A656]" office:value-type="time" office:time-value="PT00H00M00.287583307S" calcext:value-type="time">
            <text:p>00:00:00.288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18:58.6140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/>
          <table:table-cell table:formula="of:=[.A658]-[.A657]" office:value-type="time" office:time-value="PT00H00M00.203558919S" calcext:value-type="time">
            <text:p>00:00:00.204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18:58.8120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/>
          <table:table-cell table:formula="of:=[.A659]-[.A658]" office:value-type="time" office:time-value="PT00H00M00.197997945S" calcext:value-type="time">
            <text:p>00:00:00.198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18:59.0195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38" calcext:value-type="float">
            <text:p>33238</text:p>
          </table:table-cell>
          <table:table-cell/>
          <table:table-cell table:formula="of:=[.A660]-[.A659]" office:value-type="time" office:time-value="PT00H00M00.20753697S" calcext:value-type="time">
            <text:p>00:00:00.208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18:59.20379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/>
          <table:table-cell table:formula="of:=[.A661]-[.A660]" office:value-type="time" office:time-value="PT00H00M00.1842489S" calcext:value-type="time">
            <text:p>00:00:00.184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18:59.4161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75" calcext:value-type="float">
            <text:p>33275</text:p>
          </table:table-cell>
          <table:table-cell/>
          <table:table-cell table:formula="of:=[.A662]-[.A661]" office:value-type="time" office:time-value="PT00H00M00.212323456S" calcext:value-type="time">
            <text:p>00:00:00.21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18:59.61953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663]-[.A662]" office:value-type="time" office:time-value="PT00H00M00.20341496S" calcext:value-type="time">
            <text:p>00:00:00.203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19:00.2715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664]-[.A663]" office:value-type="time" office:time-value="PT00H00M00.651977956S" calcext:value-type="time">
            <text:p>00:00:00.65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19:03.28106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665]-[.A664]" office:value-type="time" office:time-value="PT00H00M03.009549156S" calcext:value-type="time">
            <text:p>00:00:03.01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19:06.2926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666]-[.A665]" office:value-type="time" office:time-value="PT00H00M03.011550754S" calcext:value-type="time">
            <text:p>00:00:03.01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19:12.36329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667]-[.A666]" office:value-type="time" office:time-value="PT00H00M06.070675934S" calcext:value-type="time">
            <text:p>00:00:06.07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19:16.2851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668]-[.A667]" office:value-type="time" office:time-value="PT00H00M03.921829211S" calcext:value-type="time">
            <text:p>00:00:03.92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19:19.29643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669]-[.A668]" office:value-type="time" office:time-value="PT00H00M03.011318785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19:22.3050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670]-[.A669]" office:value-type="time" office:time-value="PT00H00M03.008572874S" calcext:value-type="time">
            <text:p>00:00:03.009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19:28.37658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671]-[.A670]" office:value-type="time" office:time-value="PT00H00M06.07157615S" calcext:value-type="time">
            <text:p>00:00:06.07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19:32.29702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672]-[.A671]" office:value-type="time" office:time-value="PT00H00M03.920434252S" calcext:value-type="time">
            <text:p>00:00:03.92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19:35.3090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673]-[.A672]" office:value-type="time" office:time-value="PT00H00M03.012009664S" calcext:value-type="time">
            <text:p>00:00:03.01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19:38.32054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674]-[.A673]" office:value-type="time" office:time-value="PT00H00M03.011514922S" calcext:value-type="time">
            <text:p>00:00:03.01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19:44.38901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675]-[.A674]" office:value-type="time" office:time-value="PT00H00M06.068471912S" calcext:value-type="time">
            <text:p>00:00:06.068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19:48.31128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676]-[.A675]" office:value-type="time" office:time-value="PT00H00M03.922262345S" calcext:value-type="time">
            <text:p>00:00:03.92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19:51.32107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677]-[.A676]" office:value-type="time" office:time-value="PT00H00M03.009793698S" calcext:value-type="time">
            <text:p>00:00:03.01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19:54.33243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678]-[.A677]" office:value-type="time" office:time-value="PT00H00M03.01135839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20:00.40101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679]-[.A678]" office:value-type="time" office:time-value="PT00H00M06.068580039S" calcext:value-type="time">
            <text:p>00:00:06.069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20:04.32079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680]-[.A679]" office:value-type="time" office:time-value="PT00H00M03.919783607S" calcext:value-type="time">
            <text:p>00:00:03.92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20:07.33317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681]-[.A680]" office:value-type="time" office:time-value="PT00H00M03.012379305S" calcext:value-type="time">
            <text:p>00:00:03.01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20:10.3413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682]-[.A681]" office:value-type="time" office:time-value="PT00H00M03.008124023S" calcext:value-type="time">
            <text:p>00:00:03.008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20:16.41533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683]-[.A682]" office:value-type="time" office:time-value="PT00H00M06.074037915S" calcext:value-type="time">
            <text:p>00:00:06.074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20:20.33875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684]-[.A683]" office:value-type="time" office:time-value="PT00H00M03.923414019S" calcext:value-type="time">
            <text:p>00:00:03.923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20:23.34905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685]-[.A684]" office:value-type="time" office:time-value="PT00H00M03.010301641S" calcext:value-type="time">
            <text:p>00:00:03.01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20:26.36003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686]-[.A685]" office:value-type="time" office:time-value="PT00H00M03.01098309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20:32.42918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687]-[.A686]" office:value-type="time" office:time-value="PT00H00M06.069151475S" calcext:value-type="time">
            <text:p>00:00:06.069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20:36.3492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688]-[.A687]" office:value-type="time" office:time-value="PT00H00M03.920033807S" calcext:value-type="time">
            <text:p>00:00:03.92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20:39.3604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689]-[.A688]" office:value-type="time" office:time-value="PT00H00M03.01121003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20:42.36910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690]-[.A689]" office:value-type="time" office:time-value="PT00H00M03.008670942S" calcext:value-type="time">
            <text:p>00:00:03.009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20:48.43964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691]-[.A690]" office:value-type="time" office:time-value="PT00H00M06.07053889S" calcext:value-type="time">
            <text:p>00:00:06.07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20:52.36105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692]-[.A691]" office:value-type="time" office:time-value="PT00H00M03.92140802S" calcext:value-type="time">
            <text:p>00:00:03.92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20:55.37262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693]-[.A692]" office:value-type="time" office:time-value="PT00H00M03.0115759S" calcext:value-type="time">
            <text:p>00:00:03.01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20:58.3811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694]-[.A693]" office:value-type="time" office:time-value="PT00H00M03.008487378S" calcext:value-type="time">
            <text:p>00:00:03.008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21:04.45304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695]-[.A694]" office:value-type="time" office:time-value="PT00H00M06.071934476S" calcext:value-type="time">
            <text:p>00:00:06.07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21:08.3763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696]-[.A695]" office:value-type="time" office:time-value="PT00H00M03.923252458S" calcext:value-type="time">
            <text:p>00:00:03.923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21:11.38504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697]-[.A696]" office:value-type="time" office:time-value="PT00H00M03.008743864S" calcext:value-type="time">
            <text:p>00:00:03.009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21:14.39636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698]-[.A697]" office:value-type="time" office:time-value="PT00H00M03.011320671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21:20.46501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/>
          <table:table-cell table:formula="of:=[.A699]-[.A698]" office:value-type="time" office:time-value="PT00H00M06.068652333S" calcext:value-type="time">
            <text:p>00:00:06.069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21:24.4797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22" calcext:value-type="float">
            <text:p>33022</text:p>
          </table:table-cell>
          <table:table-cell/>
          <table:table-cell table:formula="of:=[.A700]-[.A699]" office:value-type="time" office:time-value="PT00H00M04.014694202S" calcext:value-type="time">
            <text:p>00:00:04.015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21:25.6948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07" calcext:value-type="float">
            <text:p>43007</text:p>
          </table:table-cell>
          <table:table-cell/>
          <table:table-cell table:formula="of:=[.A701]-[.A700]" office:value-type="time" office:time-value="PT00H00M01.215175842S" calcext:value-type="time">
            <text:p>00:00:01.215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21:26.0864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74" calcext:value-type="float">
            <text:p>43074</text:p>
          </table:table-cell>
          <table:table-cell/>
          <table:table-cell table:formula="of:=[.A702]-[.A701]" office:value-type="time" office:time-value="PT00H00M00.391567103S" calcext:value-type="time">
            <text:p>00:00:00.39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21:26.3867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481" calcext:value-type="float">
            <text:p>43481</text:p>
          </table:table-cell>
          <table:table-cell/>
          <table:table-cell table:formula="of:=[.A703]-[.A702]" office:value-type="time" office:time-value="PT00H00M00.300276862S" calcext:value-type="time">
            <text:p>00:00:00.30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21:27.8974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141" calcext:value-type="float">
            <text:p>43141</text:p>
          </table:table-cell>
          <table:table-cell/>
          <table:table-cell table:formula="of:=[.A704]-[.A703]" office:value-type="time" office:time-value="PT00H00M01.510713995S" calcext:value-type="time">
            <text:p>00:00:01.5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21:28.65930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705]-[.A704]" office:value-type="time" office:time-value="PT00H00M00.761860935S" calcext:value-type="time">
            <text:p>00:00:00.76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2" office:value-type="string" calcext:value-type="string">
            <text:p>2026-Mar-29 21:23:57.59446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3000" calcext:value-type="float">
            <text:p>33000</text:p>
          </table:table-cell>
          <table:table-cell table:style-name="ce3"/>
          <table:table-cell table:style-name="ce10" table:formula="of:=[.A706]-[.A705]" office:value-type="time" office:time-value="PT00H02M28.935155757S" calcext:value-type="time">
            <text:p>00:02:28.935</text:p>
          </table:table-cell>
          <table:table-cell table:style-name="ce5" table:formula="of:=[.A706]-[.A652]" office:value-type="time" office:time-value="PT00H05M00.246774056S" calcext:value-type="time">
            <text:p>00:05:00</text:p>
          </table:table-cell>
          <table:table-cell table:style-name="ce3" table:number-columns-repeated="1017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23:57.84845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25" calcext:value-type="float">
            <text:p>33025</text:p>
          </table:table-cell>
          <table:table-cell/>
          <table:table-cell table:formula="of:=[.A707]-[.A706]" office:value-type="time" office:time-value="PT00H00M00.253992411S" calcext:value-type="time">
            <text:p>00:00:00.254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23:58.05344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/>
          <table:table-cell table:formula="of:=[.A708]-[.A707]" office:value-type="time" office:time-value="PT00H00M00.20498971S" calcext:value-type="time">
            <text:p>00:00:00.205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23:58.2570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/>
          <table:table-cell table:formula="of:=[.A709]-[.A708]" office:value-type="time" office:time-value="PT00H00M00.203568977S" calcext:value-type="time">
            <text:p>00:00:00.204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23:58.46070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/>
          <table:table-cell table:formula="of:=[.A710]-[.A709]" office:value-type="time" office:time-value="PT00H00M00.203695334S" calcext:value-type="time">
            <text:p>00:00:00.204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23:58.6588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/>
          <table:table-cell table:formula="of:=[.A711]-[.A710]" office:value-type="time" office:time-value="PT00H00M00.198169565S" calcext:value-type="time">
            <text:p>00:00:00.198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23:58.86232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/>
          <table:table-cell table:formula="of:=[.A712]-[.A711]" office:value-type="time" office:time-value="PT00H00M00.203448278S" calcext:value-type="time">
            <text:p>00:00:00.203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23:59.0596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/>
          <table:table-cell table:formula="of:=[.A713]-[.A712]" office:value-type="time" office:time-value="PT00H00M00.197310839S" calcext:value-type="time">
            <text:p>00:00:00.197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23:59.26796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38" calcext:value-type="float">
            <text:p>33238</text:p>
          </table:table-cell>
          <table:table-cell/>
          <table:table-cell table:formula="of:=[.A714]-[.A713]" office:value-type="time" office:time-value="PT00H00M00.208325917S" calcext:value-type="time">
            <text:p>00:00:00.208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23:59.45152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/>
          <table:table-cell table:formula="of:=[.A715]-[.A714]" office:value-type="time" office:time-value="PT00H00M00.183563051S" calcext:value-type="time">
            <text:p>00:00:00.184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23:59.66453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75" calcext:value-type="float">
            <text:p>33275</text:p>
          </table:table-cell>
          <table:table-cell/>
          <table:table-cell table:formula="of:=[.A716]-[.A715]" office:value-type="time" office:time-value="PT00H00M00.213007419S" calcext:value-type="time">
            <text:p>00:00:00.213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23:59.86943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717]-[.A716]" office:value-type="time" office:time-value="PT00H00M00.2049017S" calcext:value-type="time">
            <text:p>00:00:00.205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24:00.52256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718]-[.A717]" office:value-type="time" office:time-value="PT00H00M00.65313403S" calcext:value-type="time">
            <text:p>00:00:00.653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24:03.53374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719]-[.A718]" office:value-type="time" office:time-value="PT00H00M03.011172311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24:06.5451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720]-[.A719]" office:value-type="time" office:time-value="PT00H00M03.011382907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24:12.61703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721]-[.A720]" office:value-type="time" office:time-value="PT00H00M06.071910588S" calcext:value-type="time">
            <text:p>00:00:06.07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24:16.54107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722]-[.A721]" office:value-type="time" office:time-value="PT00H00M03.924037004S" calcext:value-type="time">
            <text:p>00:00:03.924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24:19.55123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723]-[.A722]" office:value-type="time" office:time-value="PT00H00M03.010160197S" calcext:value-type="time">
            <text:p>00:00:03.01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24:22.56106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724]-[.A723]" office:value-type="time" office:time-value="PT00H00M03.009828273S" calcext:value-type="time">
            <text:p>00:00:03.01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24:28.63306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725]-[.A724]" office:value-type="time" office:time-value="PT00H00M06.071999855S" calcext:value-type="time">
            <text:p>00:00:06.07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24:32.55568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726]-[.A725]" office:value-type="time" office:time-value="PT00H00M03.922625072S" calcext:value-type="time">
            <text:p>00:00:03.923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24:35.56700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727]-[.A726]" office:value-type="time" office:time-value="PT00H00M03.011323814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24:38.57797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728]-[.A727]" office:value-type="time" office:time-value="PT00H00M03.010969888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24:44.6490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729]-[.A728]" office:value-type="time" office:time-value="PT00H00M06.071043061S" calcext:value-type="time">
            <text:p>00:00:06.07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24:48.57193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730]-[.A729]" office:value-type="time" office:time-value="PT00H00M03.922914877S" calcext:value-type="time">
            <text:p>00:00:03.923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24:51.5812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731]-[.A730]" office:value-type="time" office:time-value="PT00H00M03.009276325S" calcext:value-type="time">
            <text:p>00:00:03.009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24:54.59178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732]-[.A731]" office:value-type="time" office:time-value="PT00H00M03.010567557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25:00.66456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733]-[.A732]" office:value-type="time" office:time-value="PT00H00M06.072786287S" calcext:value-type="time">
            <text:p>00:00:06.073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25:04.58508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734]-[.A733]" office:value-type="time" office:time-value="PT00H00M03.920515976S" calcext:value-type="time">
            <text:p>00:00:03.92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25:07.59639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735]-[.A734]" office:value-type="time" office:time-value="PT00H00M03.011311241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25:10.60774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736]-[.A735]" office:value-type="time" office:time-value="PT00H00M03.01134896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25:16.67700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737]-[.A736]" office:value-type="time" office:time-value="PT00H00M06.069264002S" calcext:value-type="time">
            <text:p>00:00:06.069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25:20.59733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738]-[.A737]" office:value-type="time" office:time-value="PT00H00M03.920323611S" calcext:value-type="time">
            <text:p>00:00:03.92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25:23.60850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739]-[.A738]" office:value-type="time" office:time-value="PT00H00M03.011170425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25:26.61985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740]-[.A739]" office:value-type="time" office:time-value="PT00H00M03.011355875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25:32.69126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741]-[.A740]" office:value-type="time" office:time-value="PT00H00M06.071410817S" calcext:value-type="time">
            <text:p>00:00:06.07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25:36.61338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742]-[.A741]" office:value-type="time" office:time-value="PT00H00M03.922119015S" calcext:value-type="time">
            <text:p>00:00:03.92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25:39.62500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743]-[.A742]" office:value-type="time" office:time-value="PT00H00M03.011614876S" calcext:value-type="time">
            <text:p>00:00:03.01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25:42.63632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744]-[.A743]" office:value-type="time" office:time-value="PT00H00M03.011324443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25:48.70502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745]-[.A744]" office:value-type="time" office:time-value="PT00H00M06.068701996S" calcext:value-type="time">
            <text:p>00:00:06.069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25:52.62503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746]-[.A745]" office:value-type="time" office:time-value="PT00H00M03.920004889S" calcext:value-type="time">
            <text:p>00:00:03.92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25:55.63708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747]-[.A746]" office:value-type="time" office:time-value="PT00H00M03.012054926S" calcext:value-type="time">
            <text:p>00:00:03.01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25:58.64507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748]-[.A747]" office:value-type="time" office:time-value="PT00H00M03.007988236S" calcext:value-type="time">
            <text:p>00:00:03.008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26:04.71700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749]-[.A748]" office:value-type="time" office:time-value="PT00H00M06.071926933S" calcext:value-type="time">
            <text:p>00:00:06.07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26:08.63701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750]-[.A749]" office:value-type="time" office:time-value="PT00H00M03.920013062S" calcext:value-type="time">
            <text:p>00:00:03.92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26:11.64837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751]-[.A750]" office:value-type="time" office:time-value="PT00H00M03.011360904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26:14.65705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752]-[.A751]" office:value-type="time" office:time-value="PT00H00M03.0086766S" calcext:value-type="time">
            <text:p>00:00:03.009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26:20.72904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/>
          <table:table-cell table:formula="of:=[.A753]-[.A752]" office:value-type="time" office:time-value="PT00H00M06.071990426S" calcext:value-type="time">
            <text:p>00:00:06.07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26:24.74147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22" calcext:value-type="float">
            <text:p>33022</text:p>
          </table:table-cell>
          <table:table-cell/>
          <table:table-cell table:formula="of:=[.A754]-[.A753]" office:value-type="time" office:time-value="PT00H00M04.012427945S" calcext:value-type="time">
            <text:p>00:00:04.01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26:29.05859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07" calcext:value-type="float">
            <text:p>43007</text:p>
          </table:table-cell>
          <table:table-cell/>
          <table:table-cell table:formula="of:=[.A755]-[.A754]" office:value-type="time" office:time-value="PT00H00M04.317124793S" calcext:value-type="time">
            <text:p>00:00:04.317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26:29.4490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74" calcext:value-type="float">
            <text:p>43074</text:p>
          </table:table-cell>
          <table:table-cell/>
          <table:table-cell table:formula="of:=[.A756]-[.A755]" office:value-type="time" office:time-value="PT00H00M00.390407257S" calcext:value-type="time">
            <text:p>00:00:00.39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26:29.85017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481" calcext:value-type="float">
            <text:p>43481</text:p>
          </table:table-cell>
          <table:table-cell/>
          <table:table-cell table:formula="of:=[.A757]-[.A756]" office:value-type="time" office:time-value="PT00H00M00.401168992S" calcext:value-type="time">
            <text:p>00:00:00.40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26:30.0595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141" calcext:value-type="float">
            <text:p>43141</text:p>
          </table:table-cell>
          <table:table-cell/>
          <table:table-cell table:formula="of:=[.A758]-[.A757]" office:value-type="time" office:time-value="PT00H00M00.209418498S" calcext:value-type="time">
            <text:p>00:00:00.209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26:30.42137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759]-[.A758]" office:value-type="time" office:time-value="PT00H00M00.361780124S" calcext:value-type="time">
            <text:p>00:00:00.36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28:57.84900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760]-[.A759]" office:value-type="time" office:time-value="PT00H02M27.427628981S" calcext:value-type="time">
            <text:p>00:02:27.428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28:58.1045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25" calcext:value-type="float">
            <text:p>33025</text:p>
          </table:table-cell>
          <table:table-cell/>
          <table:table-cell table:formula="of:=[.A761]-[.A760]" office:value-type="time" office:time-value="PT00H00M00.255523156S" calcext:value-type="time">
            <text:p>00:00:00.256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28:58.30929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/>
          <table:table-cell table:formula="of:=[.A762]-[.A761]" office:value-type="time" office:time-value="PT00H00M00.2047722S" calcext:value-type="time">
            <text:p>00:00:00.205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28:58.51176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/>
          <table:table-cell table:formula="of:=[.A763]-[.A762]" office:value-type="time" office:time-value="PT00H00M00.202472624S" calcext:value-type="time">
            <text:p>00:00:00.20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28:58.7162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/>
          <table:table-cell table:formula="of:=[.A764]-[.A763]" office:value-type="time" office:time-value="PT00H00M00.204499369S" calcext:value-type="time">
            <text:p>00:00:00.204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28:58.91457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/>
          <table:table-cell table:formula="of:=[.A765]-[.A764]" office:value-type="time" office:time-value="PT00H00M00.19830598S" calcext:value-type="time">
            <text:p>00:00:00.198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28:59.1186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/>
          <table:table-cell table:formula="of:=[.A766]-[.A765]" office:value-type="time" office:time-value="PT00H00M00.204055547S" calcext:value-type="time">
            <text:p>00:00:00.204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28:59.31783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/>
          <table:table-cell table:formula="of:=[.A767]-[.A766]" office:value-type="time" office:time-value="PT00H00M00.199206197S" calcext:value-type="time">
            <text:p>00:00:00.199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28:59.52522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38" calcext:value-type="float">
            <text:p>33238</text:p>
          </table:table-cell>
          <table:table-cell/>
          <table:table-cell table:formula="of:=[.A768]-[.A767]" office:value-type="time" office:time-value="PT00H00M00.207391125S" calcext:value-type="time">
            <text:p>00:00:00.207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28:59.70923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/>
          <table:table-cell table:formula="of:=[.A769]-[.A768]" office:value-type="time" office:time-value="PT00H00M00.184004987S" calcext:value-type="time">
            <text:p>00:00:00.184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28:59.92158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75" calcext:value-type="float">
            <text:p>33275</text:p>
          </table:table-cell>
          <table:table-cell/>
          <table:table-cell table:formula="of:=[.A770]-[.A769]" office:value-type="time" office:time-value="PT00H00M00.212347973S" calcext:value-type="time">
            <text:p>00:00:00.21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29:00.12518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771]-[.A770]" office:value-type="time" office:time-value="PT00H00M00.203607325S" calcext:value-type="time">
            <text:p>00:00:00.204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29:00.78104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772]-[.A771]" office:value-type="time" office:time-value="PT00H00M00.655855425S" calcext:value-type="time">
            <text:p>00:00:00.656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29:03.79258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773]-[.A772]" office:value-type="time" office:time-value="PT00H00M03.011538181S" calcext:value-type="time">
            <text:p>00:00:03.01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29:06.8010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774]-[.A773]" office:value-type="time" office:time-value="PT00H00M03.008469148S" calcext:value-type="time">
            <text:p>00:00:03.008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29:12.87375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775]-[.A774]" office:value-type="time" office:time-value="PT00H00M06.072700163S" calcext:value-type="time">
            <text:p>00:00:06.073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29:16.79701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776]-[.A775]" office:value-type="time" office:time-value="PT00H00M03.923265659S" calcext:value-type="time">
            <text:p>00:00:03.923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29:19.80836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777]-[.A776]" office:value-type="time" office:time-value="PT00H00M03.011343931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29:22.81701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778]-[.A777]" office:value-type="time" office:time-value="PT00H00M03.008658369S" calcext:value-type="time">
            <text:p>00:00:03.009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29:28.8890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779]-[.A778]" office:value-type="time" office:time-value="PT00H00M06.07199294S" calcext:value-type="time">
            <text:p>00:00:06.07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29:32.80906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780]-[.A779]" office:value-type="time" office:time-value="PT00H00M03.920053924S" calcext:value-type="time">
            <text:p>00:00:03.92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29:35.8204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781]-[.A780]" office:value-type="time" office:time-value="PT00H00M03.011367191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29:38.83054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782]-[.A781]" office:value-type="time" office:time-value="PT00H00M03.010115563S" calcext:value-type="time">
            <text:p>00:00:03.01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29:44.9010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783]-[.A782]" office:value-type="time" office:time-value="PT00H00M06.070465338S" calcext:value-type="time">
            <text:p>00:00:06.07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29:48.82328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784]-[.A783]" office:value-type="time" office:time-value="PT00H00M03.922276176S" calcext:value-type="time">
            <text:p>00:00:03.92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29:51.83299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785]-[.A784]" office:value-type="time" office:time-value="PT00H00M03.009703802S" calcext:value-type="time">
            <text:p>00:00:03.01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29:54.84507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786]-[.A785]" office:value-type="time" office:time-value="PT00H00M03.012081957S" calcext:value-type="time">
            <text:p>00:00:03.01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30:00.91700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787]-[.A786]" office:value-type="time" office:time-value="PT00H00M06.07192819S" calcext:value-type="time">
            <text:p>00:00:06.07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30:04.84109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788]-[.A787]" office:value-type="time" office:time-value="PT00H00M03.924088553S" calcext:value-type="time">
            <text:p>00:00:03.924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30:07.85243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789]-[.A788]" office:value-type="time" office:time-value="PT00H00M03.011343931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30:10.86391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790]-[.A789]" office:value-type="time" office:time-value="PT00H00M03.011477203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30:16.93308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791]-[.A790]" office:value-type="time" office:time-value="PT00H00M06.069175364S" calcext:value-type="time">
            <text:p>00:00:06.069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30:20.85302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792]-[.A791]" office:value-type="time" office:time-value="PT00H00M03.919931967S" calcext:value-type="time">
            <text:p>00:00:03.92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30:23.86433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793]-[.A792]" office:value-type="time" office:time-value="PT00H00M03.011318785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30:26.87304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794]-[.A793]" office:value-type="time" office:time-value="PT00H00M03.008708032S" calcext:value-type="time">
            <text:p>00:00:03.009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30:32.94510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795]-[.A794]" office:value-type="time" office:time-value="PT00H00M06.072055805S" calcext:value-type="time">
            <text:p>00:00:06.07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30:36.86837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796]-[.A795]" office:value-type="time" office:time-value="PT00H00M03.923276346S" calcext:value-type="time">
            <text:p>00:00:03.923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30:39.87706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797]-[.A796]" office:value-type="time" office:time-value="PT00H00M03.008684772S" calcext:value-type="time">
            <text:p>00:00:03.009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30:42.88837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798]-[.A797]" office:value-type="time" office:time-value="PT00H00M03.01131187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30:48.95722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799]-[.A798]" office:value-type="time" office:time-value="PT00H00M06.068850984S" calcext:value-type="time">
            <text:p>00:00:06.069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30:52.87839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800]-[.A799]" office:value-type="time" office:time-value="PT00H00M03.921172279S" calcext:value-type="time">
            <text:p>00:00:03.92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30:55.88903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801]-[.A800]" office:value-type="time" office:time-value="PT00H00M03.01063105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30:58.90055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802]-[.A801]" office:value-type="time" office:time-value="PT00H00M03.011523094S" calcext:value-type="time">
            <text:p>00:00:03.01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31:04.96903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803]-[.A802]" office:value-type="time" office:time-value="PT00H00M06.068482599S" calcext:value-type="time">
            <text:p>00:00:06.068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31:08.88904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804]-[.A803]" office:value-type="time" office:time-value="PT00H00M03.92000929S" calcext:value-type="time">
            <text:p>00:00:03.92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31:11.89882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805]-[.A804]" office:value-type="time" office:time-value="PT00H00M03.009776725S" calcext:value-type="time">
            <text:p>00:00:03.01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31:14.90923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806]-[.A805]" office:value-type="time" office:time-value="PT00H00M03.010414797S" calcext:value-type="time">
            <text:p>00:00:03.01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31:20.98113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/>
          <table:table-cell table:formula="of:=[.A807]-[.A806]" office:value-type="time" office:time-value="PT00H00M06.071898015S" calcext:value-type="time">
            <text:p>00:00:06.07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31:24.9914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22" calcext:value-type="float">
            <text:p>33022</text:p>
          </table:table-cell>
          <table:table-cell/>
          <table:table-cell table:formula="of:=[.A808]-[.A807]" office:value-type="time" office:time-value="PT00H00M04.010295589S" calcext:value-type="time">
            <text:p>00:00:04.01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31:31.21142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07" calcext:value-type="float">
            <text:p>43007</text:p>
          </table:table-cell>
          <table:table-cell/>
          <table:table-cell table:formula="of:=[.A809]-[.A808]" office:value-type="time" office:time-value="PT00H00M06.219996815S" calcext:value-type="time">
            <text:p>00:00:06.22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31:31.6024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74" calcext:value-type="float">
            <text:p>43074</text:p>
          </table:table-cell>
          <table:table-cell/>
          <table:table-cell table:formula="of:=[.A810]-[.A809]" office:value-type="time" office:time-value="PT00H00M00.391012011S" calcext:value-type="time">
            <text:p>00:00:00.39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31:31.90137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481" calcext:value-type="float">
            <text:p>43481</text:p>
          </table:table-cell>
          <table:table-cell/>
          <table:table-cell table:formula="of:=[.A811]-[.A810]" office:value-type="time" office:time-value="PT00H00M00.298931566S" calcext:value-type="time">
            <text:p>00:00:00.299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31:32.2103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141" calcext:value-type="float">
            <text:p>43141</text:p>
          </table:table-cell>
          <table:table-cell/>
          <table:table-cell table:formula="of:=[.A812]-[.A811]" office:value-type="time" office:time-value="PT00H00M00.308932015S" calcext:value-type="time">
            <text:p>00:00:00.309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31:32.6714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813]-[.A812]" office:value-type="time" office:time-value="PT00H00M00.461116992S" calcext:value-type="time">
            <text:p>00:00:00.46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33:58.10656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814]-[.A813]" office:value-type="time" office:time-value="PT00H02M25.435143309S" calcext:value-type="time">
            <text:p>00:02:25.435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33:58.26120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25" calcext:value-type="float">
            <text:p>33025</text:p>
          </table:table-cell>
          <table:table-cell/>
          <table:table-cell table:formula="of:=[.A815]-[.A814]" office:value-type="time" office:time-value="PT00H00M00.154646114S" calcext:value-type="time">
            <text:p>00:00:00.155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33:58.46463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/>
          <table:table-cell table:formula="of:=[.A816]-[.A815]" office:value-type="time" office:time-value="PT00H00M00.203423761S" calcext:value-type="time">
            <text:p>00:00:00.203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33:58.66807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/>
          <table:table-cell table:formula="of:=[.A817]-[.A816]" office:value-type="time" office:time-value="PT00H00M00.203438848S" calcext:value-type="time">
            <text:p>00:00:00.203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33:58.8864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/>
          <table:table-cell table:formula="of:=[.A818]-[.A817]" office:value-type="time" office:time-value="PT00H00M00.218392373S" calcext:value-type="time">
            <text:p>00:00:00.218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33:59.1697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/>
          <table:table-cell table:formula="of:=[.A819]-[.A818]" office:value-type="time" office:time-value="PT00H00M00.283263903S" calcext:value-type="time">
            <text:p>00:00:00.283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33:59.37398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/>
          <table:table-cell table:formula="of:=[.A820]-[.A819]" office:value-type="time" office:time-value="PT00H00M00.204254198S" calcext:value-type="time">
            <text:p>00:00:00.204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33:59.57186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/>
          <table:table-cell table:formula="of:=[.A821]-[.A820]" office:value-type="time" office:time-value="PT00H00M00.197881018S" calcext:value-type="time">
            <text:p>00:00:00.198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33:59.77948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38" calcext:value-type="float">
            <text:p>33238</text:p>
          </table:table-cell>
          <table:table-cell/>
          <table:table-cell table:formula="of:=[.A822]-[.A821]" office:value-type="time" office:time-value="PT00H00M00.207618065S" calcext:value-type="time">
            <text:p>00:00:00.208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33:59.9637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/>
          <table:table-cell table:formula="of:=[.A823]-[.A822]" office:value-type="time" office:time-value="PT00H00M00.184282847S" calcext:value-type="time">
            <text:p>00:00:00.184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34:00.17667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75" calcext:value-type="float">
            <text:p>33275</text:p>
          </table:table-cell>
          <table:table-cell/>
          <table:table-cell table:formula="of:=[.A824]-[.A823]" office:value-type="time" office:time-value="PT00H00M00.212906837S" calcext:value-type="time">
            <text:p>00:00:00.213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34:00.38020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825]-[.A824]" office:value-type="time" office:time-value="PT00H00M00.203531887S" calcext:value-type="time">
            <text:p>00:00:00.204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34:01.03706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826]-[.A825]" office:value-type="time" office:time-value="PT00H00M00.65685811S" calcext:value-type="time">
            <text:p>00:00:00.657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34:04.04858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827]-[.A826]" office:value-type="time" office:time-value="PT00H00M03.011523723S" calcext:value-type="time">
            <text:p>00:00:03.01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34:07.06098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828]-[.A827]" office:value-type="time" office:time-value="PT00H00M03.012400051S" calcext:value-type="time">
            <text:p>00:00:03.01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34:13.1342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829]-[.A828]" office:value-type="time" office:time-value="PT00H00M06.073239539S" calcext:value-type="time">
            <text:p>00:00:06.073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34:17.05705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830]-[.A829]" office:value-type="time" office:time-value="PT00H00M03.92283001S" calcext:value-type="time">
            <text:p>00:00:03.923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34:20.06615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831]-[.A830]" office:value-type="time" office:time-value="PT00H00M03.009096533S" calcext:value-type="time">
            <text:p>00:00:03.009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34:23.07709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832]-[.A831]" office:value-type="time" office:time-value="PT00H00M03.010940971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34:29.14909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833]-[.A832]" office:value-type="time" office:time-value="PT00H00M06.072002999S" calcext:value-type="time">
            <text:p>00:00:06.07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34:33.07259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834]-[.A833]" office:value-type="time" office:time-value="PT00H00M03.923495114S" calcext:value-type="time">
            <text:p>00:00:03.923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34:36.08434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835]-[.A834]" office:value-type="time" office:time-value="PT00H00M03.011753177S" calcext:value-type="time">
            <text:p>00:00:03.01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34:39.0944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836]-[.A835]" office:value-type="time" office:time-value="PT00H00M03.010070929S" calcext:value-type="time">
            <text:p>00:00:03.01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34:45.16506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837]-[.A836]" office:value-type="time" office:time-value="PT00H00M06.070648902S" calcext:value-type="time">
            <text:p>00:00:06.07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34:49.08833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838]-[.A837]" office:value-type="time" office:time-value="PT00H00M03.923271317S" calcext:value-type="time">
            <text:p>00:00:03.923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34:52.0970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839]-[.A838]" office:value-type="time" office:time-value="PT00H00M03.008687915S" calcext:value-type="time">
            <text:p>00:00:03.009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34:55.10725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840]-[.A839]" office:value-type="time" office:time-value="PT00H00M03.010235005S" calcext:value-type="time">
            <text:p>00:00:03.01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35:01.17708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841]-[.A840]" office:value-type="time" office:time-value="PT00H00M06.069822866S" calcext:value-type="time">
            <text:p>00:00:06.07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35:05.09710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842]-[.A841]" office:value-type="time" office:time-value="PT00H00M03.92002312S" calcext:value-type="time">
            <text:p>00:00:03.92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35:08.10859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843]-[.A842]" office:value-type="time" office:time-value="PT00H00M03.011492919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35:11.11706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844]-[.A843]" office:value-type="time" office:time-value="PT00H00M03.00846789S" calcext:value-type="time">
            <text:p>00:00:03.008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35:17.1891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845]-[.A844]" office:value-type="time" office:time-value="PT00H00M06.072045746S" calcext:value-type="time">
            <text:p>00:00:06.07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35:21.10904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846]-[.A845]" office:value-type="time" office:time-value="PT00H00M03.919930081S" calcext:value-type="time">
            <text:p>00:00:03.92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35:24.12052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847]-[.A846]" office:value-type="time" office:time-value="PT00H00M03.011482232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35:27.13035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848]-[.A847]" office:value-type="time" office:time-value="PT00H00M03.009833302S" calcext:value-type="time">
            <text:p>00:00:03.01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35:33.201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849]-[.A848]" office:value-type="time" office:time-value="PT00H00M06.070665875S" calcext:value-type="time">
            <text:p>00:00:06.07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35:37.12106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850]-[.A849]" office:value-type="time" office:time-value="PT00H00M03.920040722S" calcext:value-type="time">
            <text:p>00:00:03.92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35:40.13267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851]-[.A850]" office:value-type="time" office:time-value="PT00H00M03.01161299S" calcext:value-type="time">
            <text:p>00:00:03.01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35:43.141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852]-[.A851]" office:value-type="time" office:time-value="PT00H00M03.008347191S" calcext:value-type="time">
            <text:p>00:00:03.008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35:49.21310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853]-[.A852]" office:value-type="time" office:time-value="PT00H00M06.072079064S" calcext:value-type="time">
            <text:p>00:00:06.07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35:53.13302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854]-[.A853]" office:value-type="time" office:time-value="PT00H00M03.91992568S" calcext:value-type="time">
            <text:p>00:00:03.92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35:56.14504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855]-[.A854]" office:value-type="time" office:time-value="PT00H00M03.012020979S" calcext:value-type="time">
            <text:p>00:00:03.01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35:59.15637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856]-[.A855]" office:value-type="time" office:time-value="PT00H00M03.011326957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36:05.22504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857]-[.A856]" office:value-type="time" office:time-value="PT00H00M06.068672449S" calcext:value-type="time">
            <text:p>00:00:06.069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36:09.14500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858]-[.A857]" office:value-type="time" office:time-value="PT00H00M03.919954598S" calcext:value-type="time">
            <text:p>00:00:03.92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36:12.15648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859]-[.A858]" office:value-type="time" office:time-value="PT00H00M03.011480975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36:15.16505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860]-[.A859]" office:value-type="time" office:time-value="PT00H00M03.008570359S" calcext:value-type="time">
            <text:p>00:00:03.009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36:21.23346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/>
          <table:table-cell table:formula="of:=[.A861]-[.A860]" office:value-type="time" office:time-value="PT00H00M06.068407791S" calcext:value-type="time">
            <text:p>00:00:06.068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36:25.24136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22" calcext:value-type="float">
            <text:p>33022</text:p>
          </table:table-cell>
          <table:table-cell/>
          <table:table-cell table:formula="of:=[.A862]-[.A861]" office:value-type="time" office:time-value="PT00H00M04.007899831S" calcext:value-type="time">
            <text:p>00:00:04.008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36:33.4561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07" calcext:value-type="float">
            <text:p>43007</text:p>
          </table:table-cell>
          <table:table-cell/>
          <table:table-cell table:formula="of:=[.A863]-[.A862]" office:value-type="time" office:time-value="PT00H00M08.214752516S" calcext:value-type="time">
            <text:p>00:00:08.215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36:33.8471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74" calcext:value-type="float">
            <text:p>43074</text:p>
          </table:table-cell>
          <table:table-cell/>
          <table:table-cell table:formula="of:=[.A864]-[.A863]" office:value-type="time" office:time-value="PT00H00M00.391018926S" calcext:value-type="time">
            <text:p>00:00:00.39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36:34.1470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481" calcext:value-type="float">
            <text:p>43481</text:p>
          </table:table-cell>
          <table:table-cell/>
          <table:table-cell table:formula="of:=[.A865]-[.A864]" office:value-type="time" office:time-value="PT00H00M00.299943052S" calcext:value-type="time">
            <text:p>00:00:00.30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36:34.35608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141" calcext:value-type="float">
            <text:p>43141</text:p>
          </table:table-cell>
          <table:table-cell/>
          <table:table-cell table:formula="of:=[.A866]-[.A865]" office:value-type="time" office:time-value="PT00H00M00.209013023S" calcext:value-type="time">
            <text:p>00:00:00.209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36:34.7182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867]-[.A866]" office:value-type="time" office:time-value="PT00H00M00.362131535S" calcext:value-type="time">
            <text:p>00:00:00.36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38:58.35149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868]-[.A867]" office:value-type="time" office:time-value="PT00H02M23.633275316S" calcext:value-type="time">
            <text:p>00:02:23.633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38:58.60587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25" calcext:value-type="float">
            <text:p>33025</text:p>
          </table:table-cell>
          <table:table-cell/>
          <table:table-cell table:formula="of:=[.A869]-[.A868]" office:value-type="time" office:time-value="PT00H00M00.254384056S" calcext:value-type="time">
            <text:p>00:00:00.254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38:58.8093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/>
          <table:table-cell table:formula="of:=[.A870]-[.A869]" office:value-type="time" office:time-value="PT00H00M00.203436962S" calcext:value-type="time">
            <text:p>00:00:00.203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38:59.01410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/>
          <table:table-cell table:formula="of:=[.A871]-[.A870]" office:value-type="time" office:time-value="PT00H00M00.204787916S" calcext:value-type="time">
            <text:p>00:00:00.205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38:59.21768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/>
          <table:table-cell table:formula="of:=[.A872]-[.A871]" office:value-type="time" office:time-value="PT00H00M00.203580922S" calcext:value-type="time">
            <text:p>00:00:00.204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38:59.41433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/>
          <table:table-cell table:formula="of:=[.A873]-[.A872]" office:value-type="time" office:time-value="PT00H00M00.196646992S" calcext:value-type="time">
            <text:p>00:00:00.197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38:59.61964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/>
          <table:table-cell table:formula="of:=[.A874]-[.A873]" office:value-type="time" office:time-value="PT00H00M00.20531409S" calcext:value-type="time">
            <text:p>00:00:00.205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38:59.81614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/>
          <table:table-cell table:formula="of:=[.A875]-[.A874]" office:value-type="time" office:time-value="PT00H00M00.196494232S" calcext:value-type="time">
            <text:p>00:00:00.196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39:00.0257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38" calcext:value-type="float">
            <text:p>33238</text:p>
          </table:table-cell>
          <table:table-cell/>
          <table:table-cell table:formula="of:=[.A876]-[.A875]" office:value-type="time" office:time-value="PT00H00M00.209610863S" calcext:value-type="time">
            <text:p>00:00:00.21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39:00.20904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/>
          <table:table-cell table:formula="of:=[.A877]-[.A876]" office:value-type="time" office:time-value="PT00H00M00.183290849S" calcext:value-type="time">
            <text:p>00:00:00.183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39:00.421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75" calcext:value-type="float">
            <text:p>33275</text:p>
          </table:table-cell>
          <table:table-cell/>
          <table:table-cell table:formula="of:=[.A878]-[.A877]" office:value-type="time" office:time-value="PT00H00M00.212322827S" calcext:value-type="time">
            <text:p>00:00:00.21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39:00.62555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879]-[.A878]" office:value-type="time" office:time-value="PT00H00M00.20419322S" calcext:value-type="time">
            <text:p>00:00:00.204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39:01.28589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880]-[.A879]" office:value-type="time" office:time-value="PT00H00M00.66033199S" calcext:value-type="time">
            <text:p>00:00:00.66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39:04.29714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881]-[.A880]" office:value-type="time" office:time-value="PT00H00M03.011254035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39:07.30832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882]-[.A881]" office:value-type="time" office:time-value="PT00H00M03.011176712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39:13.37724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883]-[.A882]" office:value-type="time" office:time-value="PT00H00M06.068923278S" calcext:value-type="time">
            <text:p>00:00:06.069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39:17.30056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884]-[.A883]" office:value-type="time" office:time-value="PT00H00M03.92332098S" calcext:value-type="time">
            <text:p>00:00:03.923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39:20.31173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885]-[.A884]" office:value-type="time" office:time-value="PT00H00M03.011169168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39:23.32107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886]-[.A885]" office:value-type="time" office:time-value="PT00H00M03.009344847S" calcext:value-type="time">
            <text:p>00:00:03.009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39:29.39314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887]-[.A886]" office:value-type="time" office:time-value="PT00H00M06.07206272S" calcext:value-type="time">
            <text:p>00:00:06.07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39:33.3130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888]-[.A887]" office:value-type="time" office:time-value="PT00H00M03.919872246S" calcext:value-type="time">
            <text:p>00:00:03.92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39:36.32440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889]-[.A888]" office:value-type="time" office:time-value="PT00H00M03.011392965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39:39.33596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890]-[.A889]" office:value-type="time" office:time-value="PT00H00M03.011555155S" calcext:value-type="time">
            <text:p>00:00:03.01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39:45.40669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891]-[.A890]" office:value-type="time" office:time-value="PT00H00M06.070728111S" calcext:value-type="time">
            <text:p>00:00:06.07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39:49.32905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892]-[.A891]" office:value-type="time" office:time-value="PT00H00M03.922359785S" calcext:value-type="time">
            <text:p>00:00:03.92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39:52.34123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893]-[.A892]" office:value-type="time" office:time-value="PT00H00M03.012183798S" calcext:value-type="time">
            <text:p>00:00:03.01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39:55.3499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894]-[.A893]" office:value-type="time" office:time-value="PT00H00M03.008677857S" calcext:value-type="time">
            <text:p>00:00:03.009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40:01.42105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895]-[.A894]" office:value-type="time" office:time-value="PT00H00M06.071144273S" calcext:value-type="time">
            <text:p>00:00:06.07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40:05.34505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896]-[.A895]" office:value-type="time" office:time-value="PT00H00M03.923999285S" calcext:value-type="time">
            <text:p>00:00:03.924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40:08.35639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897]-[.A896]" office:value-type="time" office:time-value="PT00H00M03.011342674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40:11.36503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898]-[.A897]" office:value-type="time" office:time-value="PT00H00M03.008631966S" calcext:value-type="time">
            <text:p>00:00:03.009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40:17.43702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899]-[.A898]" office:value-type="time" office:time-value="PT00H00M06.071991054S" calcext:value-type="time">
            <text:p>00:00:06.07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40:21.35700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900]-[.A899]" office:value-type="time" office:time-value="PT00H00M03.919987916S" calcext:value-type="time">
            <text:p>00:00:03.92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40:24.36834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901]-[.A900]" office:value-type="time" office:time-value="PT00H00M03.011340159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40:27.37945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902]-[.A901]" office:value-type="time" office:time-value="PT00H00M03.011110076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40:33.44909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903]-[.A902]" office:value-type="time" office:time-value="PT00H00M06.069638673S" calcext:value-type="time">
            <text:p>00:00:06.07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40:37.369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904]-[.A903]" office:value-type="time" office:time-value="PT00H00M03.919924423S" calcext:value-type="time">
            <text:p>00:00:03.92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40:40.38035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905]-[.A904]" office:value-type="time" office:time-value="PT00H00M03.011327586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40:43.38924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906]-[.A905]" office:value-type="time" office:time-value="PT00H00M03.008893481S" calcext:value-type="time">
            <text:p>00:00:03.009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40:49.46104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907]-[.A906]" office:value-type="time" office:time-value="PT00H00M06.071797432S" calcext:value-type="time">
            <text:p>00:00:06.07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40:53.38106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908]-[.A907]" office:value-type="time" office:time-value="PT00H00M03.920019348S" calcext:value-type="time">
            <text:p>00:00:03.92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40:56.39241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909]-[.A908]" office:value-type="time" office:time-value="PT00H00M03.011359018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40:59.40106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910]-[.A909]" office:value-type="time" office:time-value="PT00H00M03.008645168S" calcext:value-type="time">
            <text:p>00:00:03.009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41:05.47303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911]-[.A910]" office:value-type="time" office:time-value="PT00H00M06.071967795S" calcext:value-type="time">
            <text:p>00:00:06.072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41:09.39307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912]-[.A911]" office:value-type="time" office:time-value="PT00H00M03.920045123S" calcext:value-type="time">
            <text:p>00:00:03.920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41:12.40442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913]-[.A912]" office:value-type="time" office:time-value="PT00H00M03.011344559S" calcext:value-type="time">
            <text:p>00:00:03.011</text:p>
          </table:table-cell>
          <table:table-cell table:number-columns-repeated="1018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2026-Mar-29 21:41:15.41300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914]-[.A913]" office:value-type="time" office:time-value="PT00H00M03.008585447S" calcext:value-type="time">
            <text:p>00:00:03.009</text:p>
          </table:table-cell>
          <table:table-cell table:number-columns-repeated="1018"/>
          <table:table-cell table:style-name="Default" table:number-columns-repeated="15360"/>
        </table:table-row>
        <table:table-row table:style-name="ro1" table:number-rows-repeated="1047661">
          <table:table-cell table:number-columns-repeated="1024"/>
          <table:table-cell table:style-name="Default" table:number-columns-repeated="15360"/>
        </table:table-row>
        <table:table-row table:style-name="ro1">
          <table:table-cell table:number-columns-repeated="1024"/>
          <table:table-cell table:style-name="Default" table:number-columns-repeated="1536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9">
      <number:hours number:style="long"/>
      <number:text>:</number:text>
      <number:minutes number:style="long"/>
      <number:text>:</number:text>
      <number:seconds number:style="long" number:decimal-places="3"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5-20T20:43:30.278796900</dc:date>
    <meta:editing-duration>PT25M36S</meta:editing-duration>
    <meta:editing-cycles>6</meta:editing-cycles>
    <meta:generator>LibreOffice/25.2.7.2$Windows_X86_64 LibreOffice_project/5cbfd1ab6520636bb5f7b99185aa69bd7456825d</meta:generator>
    <meta:document-statistic meta:table-count="1" meta:cell-count="4572" meta:object-count="0"/>
  </office:meta>
</office:document-meta>
</file>