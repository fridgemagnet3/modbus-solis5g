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7.433cm"/>
    </style:style>
    <style:style style:name="co8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 style:data-style-name="N111"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 style:data-style-name="N111">
      <style:text-properties fo:color="#c9211e"/>
    </style:style>
    <style:style style:name="ce9" style:family="table-cell" style:parent-style-name="Default" style:data-style-name="N111">
      <style:table-cell-properties fo:background-color="#ff860d"/>
    </style:style>
    <style:style style:name="ce10" style:family="table-cell" style:parent-style-name="Default" style:data-style-name="N111">
      <style:table-cell-properties fo:background-color="#ffbf00"/>
    </style:style>
    <style:style style:name="ce11" style:family="table-cell" style:parent-style-name="Default" style:data-style-name="N111">
      <style:table-cell-properties fo:background-color="#ffbf00"/>
      <style:text-properties fo:color="#c9211e"/>
    </style:style>
    <style:style style:name="ce12" style:family="table-cell" style:parent-style-name="Default" style:data-style-name="N111">
      <style:table-cell-properties fo:background-color="#ffff00"/>
      <style:text-properties fo:color="#c9211e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fo:color="#3465a4"/>
    </style:style>
    <style:style style:name="ce16" style:family="table-cell" style:parent-style-name="Default">
      <style:table-cell-properties fo:wrap-option="wrap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6-05-18_22-10-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5" table:number-columns-repeated="1637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ddress</text:p>
          </table:table-cell>
          <table:table-cell table:style-name="ce6" office:value-type="string" calcext:value-type="string">
            <text:p>Delta</text:p>
          </table:table-cell>
          <table:table-cell table:style-name="ce13" office:value-type="string" calcext:value-type="string">
            <text:p>Register</text:p>
          </table:table-cell>
          <table:table-cell table:style-name="ce13" office:value-type="string" calcext:value-type="string">
            <text:p>Comments</text:p>
          </table:table-cell>
          <table:table-cell table:style-name="ce13" office:value-type="string" calcext:value-type="string">
            <text:p>Impl thoughts</text:p>
          </table:table-cell>
          <table:table-cell table:style-name="ce1" table:number-columns-repeated="16376"/>
        </table:table-row>
        <table:table-row table:style-name="ro1">
          <table:table-cell table:style-name="ce2" office:value-type="string" calcext:value-type="string">
            <text:p>2026-May-19 05:56:11.2590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2026-May-19 05:56:20.1777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3]-[.A2]" office:value-type="time" office:time-value="PT00H00M08.918739972S" calcext:value-type="time">
            <text:p>00:00:08.92</text:p>
          </table:table-cell>
          <table:table-cell/>
          <table:table-cell office:value-type="string" calcext:value-type="string">
            <text:p>Possibly false starts due to inverter just starting up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026-May-19 05:56:44.1067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5000" calcext:value-type="float">
            <text:p>35000</text:p>
          </table:table-cell>
          <table:table-cell table:formula="of:=[.A4]-[.A3]" office:value-type="time" office:time-value="PT00H00M23.928936291S" calcext:value-type="time">
            <text:p>00:00:23.93</text:p>
          </table:table-cell>
          <table:table-cell/>
          <table:table-cell office:value-type="string" calcext:value-type="string">
            <text:p>Not read on every cycle - presumed to be inverter model no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5:56:44.224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formula="of:=[.A5]-[.A4]" office:value-type="time" office:time-value="PT00H00M00.117465667S" calcext:value-type="time">
            <text:p>00:00:00.12</text:p>
          </table:table-cell>
          <table:table-cell/>
          <table:table-cell office:value-type="string" calcext:value-type="string">
            <text:p>Not read on every cycl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5:56:44.3742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25" calcext:value-type="float">
            <text:p>33025</text:p>
          </table:table-cell>
          <table:table-cell/>
          <table:table-cell office:value-type="string" calcext:value-type="string">
            <text:p>System time</text:p>
          </table:table-cell>
          <table:table-cell office:value-type="string" calcext:value-type="string">
            <text:p>Not read on every cycl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5:56:44.5848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050" calcext:value-type="float">
            <text:p>33050</text:p>
          </table:table-cell>
          <table:table-cell table:number-columns-repeated="2"/>
          <table:table-cell office:value-type="string" calcext:value-type="string">
            <text:p>“normal” slave 1 transaction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5:56:44.7942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4.9997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5.185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5.3946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5.605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5.7818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5.995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6.1993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6.384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6.5047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6.7153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6.894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7.0748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7.2816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7.4608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7.6410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7.7951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7.943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8.065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8.1850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8.394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8.6012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8.780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8.9948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9.173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9.4149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9.5335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9.6534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9.7746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49.922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0.014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0.1948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0.341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0.4940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0.6744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0.8233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0.940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1.0946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1.2410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1.327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6:52.2245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48]-[.A47]" office:value-type="time" office:time-value="PT00H00M00.897447229S" calcext:value-type="time">
            <text:p>00:00:00.9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6:55.2293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49]-[.A48]" office:value-type="time" office:time-value="PT00H00M03.004806046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6:58.2393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50]-[.A49]" office:value-type="time" office:time-value="PT00H00M03.009986063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01.2480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51]-[.A50]" office:value-type="time" office:time-value="PT00H00M03.008691687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05.2246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52]-[.A51]" office:value-type="time" office:time-value="PT00H00M03.976680175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08.2296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53]-[.A52]" office:value-type="time" office:time-value="PT00H00M03.004990867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11.238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54]-[.A53]" office:value-type="time" office:time-value="PT00H00M03.008826217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14.2457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55]-[.A54]" office:value-type="time" office:time-value="PT00H00M03.007292957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18.2247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56]-[.A55]" office:value-type="time" office:time-value="PT00H00M03.979004896S" calcext:value-type="time">
            <text:p>00:00:03.98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2026-May-19 05:57:34.637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5000" calcext:value-type="float">
            <text:p>35000</text:p>
          </table:table-cell>
          <table:table-cell table:style-name="ce8" table:formula="of:=[.A57]-[.A56]" office:value-type="time" office:time-value="PT00H00M16.412844742S" calcext:value-type="time">
            <text:p>00:00:16.41</text:p>
          </table:table-cell>
          <table:table-cell/>
          <table:table-cell office:value-type="string" calcext:value-type="string">
            <text:p>Slave transaction aborts mid way through, restarts</text:p>
          </table:table-cell>
          <table:table-cell table:style-name="ce15" office:value-type="string" calcext:value-type="string">
            <text:p>Extend idle time if we don’t see requests for slave 1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05:57:43.5637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style-name="ce8" table:formula="of:=[.A58]-[.A57]" office:value-type="time" office:time-value="PT00H00M08.92614224S" calcext:value-type="time">
            <text:p>00:00:08.93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46.8763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25" calcext:value-type="float">
            <text:p>33025</text:p>
          </table:table-cell>
          <table:table-cell table:style-name="ce8" table:formula="of:=[.A59]-[.A58]" office:value-type="time" office:time-value="PT00H00M03.312534839S" calcext:value-type="time">
            <text:p>00:00:03.3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7:47.0818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office:value-type="string" calcext:value-type="string">
            <text:p>Normal poll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5:57:47.296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7.5032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7.6862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7.896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8.0760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8.2851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8.495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8.70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8.8856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9.0963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9.3005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9.5137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9.6955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49.8760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0.0563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0.2027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0.3857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0.5359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0.6848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0.8955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1.076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1.2853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1.4961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1.6765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1.8556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0020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1256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2392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4221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5157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6356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783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2.929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3.086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3.2953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3.4405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3.5353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3.716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3.8291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3.9250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4.1256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7:57.1305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00.1380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03.1466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07.1255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10.1291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13.1391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16.1491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20.1254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23.1302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2026-May-19 05:58:35.6395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5000" calcext:value-type="float">
            <text:p>35000</text:p>
          </table:table-cell>
          <table:table-cell table:style-name="ce8" table:formula="of:=[.A111]-[.A109]" office:value-type="time" office:time-value="PT00H00M15.514142113S" calcext:value-type="time">
            <text:p>00:00:15.51</text:p>
          </table:table-cell>
          <table:table-cell/>
          <table:table-cell office:value-type="string" calcext:value-type="string">
            <text:p>Similarly again aborts</text:p>
          </table:table-cell>
          <table:table-cell table:style-name="ce15" office:value-type="string" calcext:value-type="string">
            <text:p>Extend idle time if we don’t see requests for slave 1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05:58:40.561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formula="of:=[.A112]-[.A111]" office:value-type="time" office:time-value="PT00H00M04.922400252S" calcext:value-type="time">
            <text:p>00:00:04.9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8:43.7992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25" calcext:value-type="float">
            <text:p>33025</text:p>
          </table:table-cell>
          <table:table-cell table:formula="of:=[.A113]-[.A112]" office:value-type="time" office:time-value="PT00H00M03.237231611S" calcext:value-type="time">
            <text:p>00:00:03.2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8:44.0059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4.1901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4.3944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4.6101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4.7894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5.0001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5.1767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5.3898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5.5940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5.7795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5.9901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6.2261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6.4091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6.5882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6.8000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6.9489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7.1282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7.3098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7.4852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7.6695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7.7881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8.0001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8.2095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8.3895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8.5991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8.7796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0203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1376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2589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380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439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528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709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828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49.9794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50.1876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50.335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50.459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50.609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50.729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50.849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5:58:51.1292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office:value-type="string" calcext:value-type="string">
            <text:p>Normal slave poll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5:58:54.1324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56]-[.A155]" office:value-type="time" office:time-value="PT00H00M03.0032621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8:57.1412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57]-[.A156]" office:value-type="time" office:time-value="PT00H00M03.008789127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00.1499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58]-[.A157]" office:value-type="time" office:time-value="PT00H00M03.008696088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04.1288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59]-[.A158]" office:value-type="time" office:time-value="PT00H00M03.978865966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07.1336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60]-[.A159]" office:value-type="time" office:time-value="PT00H00M03.004784673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10.1411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61]-[.A160]" office:value-type="time" office:time-value="PT00H00M03.007488465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13.1523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62]-[.A161]" office:value-type="time" office:time-value="PT00H00M03.011254035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17.1287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63]-[.A162]" office:value-type="time" office:time-value="PT00H00M03.976383456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20.134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64]-[.A163]" office:value-type="time" office:time-value="PT00H00M03.006011155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23.1438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65]-[.A164]" office:value-type="time" office:time-value="PT00H00M03.009127965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26.1521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66]-[.A165]" office:value-type="time" office:time-value="PT00H00M03.008311358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30.1298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67]-[.A166]" office:value-type="time" office:time-value="PT00H00M03.977632569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33.1334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68]-[.A167]" office:value-type="time" office:time-value="PT00H00M03.003607225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36.1433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69]-[.A168]" office:value-type="time" office:time-value="PT00H00M03.00995023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39.1508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70]-[.A169]" office:value-type="time" office:time-value="PT00H00M03.007435659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43.1297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71]-[.A170]" office:value-type="time" office:time-value="PT00H00M03.978911857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46.1345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72]-[.A171]" office:value-type="time" office:time-value="PT00H00M03.004773357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49.1432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73]-[.A172]" office:value-type="time" office:time-value="PT00H00M03.008772782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52.1519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74]-[.A173]" office:value-type="time" office:time-value="PT00H00M03.008677228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56.1294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75]-[.A174]" office:value-type="time" office:time-value="PT00H00M03.977528843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5:59:59.13300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76]-[.A175]" office:value-type="time" office:time-value="PT00H00M03.00352613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02.1443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77]-[.A176]" office:value-type="time" office:time-value="PT00H00M03.011347074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05.1529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78]-[.A177]" office:value-type="time" office:time-value="PT00H00M03.008623794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09.1293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79]-[.A178]" office:value-type="time" office:time-value="PT00H00M03.976360825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12.1342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80]-[.A179]" office:value-type="time" office:time-value="PT00H00M03.004885255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15.1429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81]-[.A180]" office:value-type="time" office:time-value="PT00H00M03.008703631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18.1528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82]-[.A181]" office:value-type="time" office:time-value="PT00H00M03.009919426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22.1306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83]-[.A182]" office:value-type="time" office:time-value="PT00H00M03.977764584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25.1341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84]-[.A183]" office:value-type="time" office:time-value="PT00H00M03.003553161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28.14295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85]-[.A184]" office:value-type="time" office:time-value="PT00H00M03.008791013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31.1515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86]-[.A185]" office:value-type="time" office:time-value="PT00H00M03.008643282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35.1303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87]-[.A186]" office:value-type="time" office:time-value="PT00H00M03.97875784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38.1351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88]-[.A187]" office:value-type="time" office:time-value="PT00H00M03.004824906S" calcext:value-type="time">
            <text:p>00:00:03.0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41.1440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89]-[.A188]" office:value-type="time" office:time-value="PT00H00M03.00889411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44.1514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90]-[.A189]" office:value-type="time" office:time-value="PT00H00M03.007413028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00:48.1353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191]-[.A190]" office:value-type="time" office:time-value="PT00H00M03.983900137S" calcext:value-type="time">
            <text:p>00:00:03.98</text:p>
          </table:table-cell>
          <table:table-cell/>
          <table:table-cell office:value-type="string" calcext:value-type="string">
            <text:p>Cycle normally ends with a write here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2026-May-19 06:00:52.1072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9" table:formula="of:=[.A192]-[.A191]" office:value-type="time" office:time-value="PT00H00M03.971854085S" calcext:value-type="time">
            <text:p>00:00:03.97</text:p>
          </table:table-cell>
          <table:table-cell/>
          <table:table-cell office:value-type="string" calcext:value-type="string">
            <text:p>Next poll starts much quicker than usual here</text:p>
          </table:table-cell>
          <table:table-cell table:style-name="ce15" office:value-type="string" calcext:value-type="string">
            <text:p>this should be ok as we’ll just sit in loop consuming dat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06:00:52.2913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2.4415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2.591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2.8022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3.0065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3.1907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3.4013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3.6107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3.7874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4.00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4.2101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4.3906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4.5056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4.6923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4.8713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5.0214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5.1966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5.3469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5.5009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5.6813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5.8906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6.1014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6.3069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6.5214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6.669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6.8221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6.93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7.0617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7.1818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7.3268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7.451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7.6019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7.7507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7.9019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8.082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8.225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8.350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8.5274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8.6511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8.7370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0:59.1304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02.1353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05.1491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08.1527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12.1304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15.1352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18.1452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21.1527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25.1315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28.1364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31.1450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34.1536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38.1312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41.1350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44.1437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47.1524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51.1312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54.1373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1:57.1448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00.1523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04.1325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07.1373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10.1460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13.1534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17.1323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20.1371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23.1458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26.1558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30.1322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33.1358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36.1457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39.1557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43.1320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46.1383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49.1482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52.1556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2:56.1383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2026-May-19 06:03:00.0915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9" table:formula="of:=[.A270]-[.A269]" office:value-type="time" office:time-value="PT00H00M03.953131847S" calcext:value-type="time">
            <text:p>00:00:03.95</text:p>
          </table:table-cell>
          <table:table-cell/>
          <table:table-cell office:value-type="string" calcext:value-type="string">
            <text:p>and here</text:p>
          </table:table-cell>
          <table:table-cell table:style-name="ce15" office:value-type="string" calcext:value-type="string">
            <text:p>this should be ok as we’ll just sit in loop consuming dat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06:03:00.3034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0.511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0.6944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0.903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1.084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1.2934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1.5041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1.7120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1.8887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2.1044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2.3099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2.5245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2.7035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2.9091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3.0630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3.2119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3.3936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3.5425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3.6939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3.9045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4.0837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4.2943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4.503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4.7091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4.8631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0097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1271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248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4314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5486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6435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792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5.938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6.0890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6.3035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6.4536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6.543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6.7238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6.837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6.9333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07.132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10.1374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13.1461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16.1549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20.1337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23.137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26.1473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29.1547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3.1336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5000" calcext:value-type="float">
            <text:p>35000</text:p>
          </table:table-cell>
          <table:table-cell table:formula="of:=[.A319]-[.A318]" office:value-type="time" office:time-value="PT00H00M03.978867223S" calcext:value-type="time">
            <text:p>00:00:03.98</text:p>
          </table:table-cell>
          <table:table-cell/>
          <table:table-cell office:value-type="string" calcext:value-type="string">
            <text:p>another abort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6:03:33.2434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3.4540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25" calcext:value-type="float">
            <text:p>33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3.604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office:value-type="string" calcext:value-type="string">
            <text:p>normal poll agai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6:03:33.8097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3.9951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4.1981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4.4100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4.5905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4.7747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4.8934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5.1041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5.2845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5.4939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5.7045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5.8849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6.089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6.3047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6.4839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6.7247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6.9051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7.0540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7.1751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7.2887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7.5045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7.711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7.8904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8.105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8.2841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8.525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8.6411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8.7635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8.8847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9.033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9.1486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9.3038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9.4527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9.604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9.7847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39.933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40.0522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40.204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40.384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40.4436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41.1329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44.1378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47.1477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50.155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54.1340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3:57.1388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00.1475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03.1550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07.1338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10.1387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13.1474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16.1549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20.1337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23.1386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26.1473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29.1560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33.1349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36.1398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39.1472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42.15597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46.1348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49.1396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52.1484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55.1571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4:59.1345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02.1382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05.1493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08.15809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12.1345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15.1406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18.1480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21.1567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25.1355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28.1392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31.1491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34.1565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38.140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2026-May-19 06:05:42.091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10" table:formula="of:=[.A400]-[.A399]" office:value-type="time" office:time-value="PT00H00M03.951067384S" calcext:value-type="time">
            <text:p>00:00:03.95</text:p>
          </table:table-cell>
          <table:table-cell/>
          <table:table-cell office:value-type="string" calcext:value-type="string">
            <text:p>again, next poll starts very quickly</text:p>
          </table:table-cell>
          <table:table-cell table:style-name="ce15" office:value-type="string" calcext:value-type="string">
            <text:p>this should be ok as we’ll just sit in loop consuming dat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06:05:42.3069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2.5136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2.6978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2.906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3.0865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3.2944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3.5063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3.7118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3.889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4.1068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4.3109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4.5241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4.704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4.8862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5.0666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5.2129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5.397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5.5461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5.6949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5.9057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6.086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6.2957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6.4448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6.5938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6.776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6.9269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7.0467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7.165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7.2867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7.4659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7.5253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7.707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7.8519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8.004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8.1866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8.335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8.4526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8.6067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8.7520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8.8392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49.1358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52.1408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55.1491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5:58.1583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02.1354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05.1403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08.1491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11.1579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15.1355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18.1403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21.1489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24.1589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28.1365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31.1413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34.1487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37.1574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41.1364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44.1412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47.1512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50.1599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54.13637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6:57.1423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00.1510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03.15967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07.1373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10.1433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13.1495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16.1583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20.1372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23.1407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26.1520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29.1594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33.1370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36.1419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39.1506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42.1581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7:46.1419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2026-May-19 06:08:26.5898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11" table:formula="of:=[.A478]-[.A477]" office:value-type="time" office:time-value="PT00H00M40.447890898S" calcext:value-type="time">
            <text:p>00:00:40.45</text:p>
          </table:table-cell>
          <table:table-cell/>
          <table:table-cell office:value-type="string" calcext:value-type="string">
            <text:p>slightly longer delay but still shorter than usual</text:p>
          </table:table-cell>
          <table:table-cell table:style-name="ce16" office:value-type="string" calcext:value-type="string">
            <text:p>can’t currently deal with thi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06:08:26.794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7.0099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7.2141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7.460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7.6077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7.7895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7.9938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8.2095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8.3899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8.5085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8.719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8.8996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9.105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9.289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9.4684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9.6136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9.7979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29.9468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0.0946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0.3052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0.5197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0.6963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0.907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1.089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1.2690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1.419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1.5378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1.6591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1.7790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1.9240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2.0489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2.1928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2.344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2.506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2.7061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2.8285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2.948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3.1275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3.242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3.338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4.1324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37.1423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40.151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43.1598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47.1386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50.1422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53.1523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8:56.1609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00.1385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03.1421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06.152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09.1607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13.1396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16.1432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19.1519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22.1607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26.13955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29.1431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32.1518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35.1604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39.1394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42.14309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45.1517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48.1604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52.1405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55.14416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09:58.1516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01.1607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05.1404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08.1444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11.1514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14.1618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18.1403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21.1443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24.1526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0:27.1605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2026-May-19 06:10:31.1452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style-name="ce12" table:formula="of:=[.A555]-[.A2]" office:value-type="time" office:time-value="PT00H14M19.886207362S" calcext:value-type="time">
            <text:p>00:14:19.89</text:p>
          </table:table-cell>
          <table:table-cell/>
          <table:table-cell office:value-type="string" calcext:value-type="string">
            <text:p>This figure is basically how long the logger has sat, almost continually on the bu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6:13:26.5040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556]-[.A555]" office:value-type="time" office:time-value="PT00H02M55.358813605S" calcext:value-type="time">
            <text:p>00:02:55.36</text:p>
          </table:table-cell>
          <table:table-cell/>
          <table:table-cell office:value-type="string" calcext:value-type="string">
            <text:p>This is now the usual delay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06:13:26.7108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6.895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7.099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7.3111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7.4941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7.6745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7.7945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8.0052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8.1843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8.454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8.6043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8.784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8.9901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9.2046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9.3535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9.5314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9.7143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9.863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29.9781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0.1900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0.4045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0.6137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0.7929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1.0050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1.1841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1.425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1.5398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1.6636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1.7847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1.9336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2.0512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2.2052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2.352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2.5044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2.6847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2.8336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2.9532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3.1047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3.2523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3.3396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4.1438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37.1474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40.1560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43.1673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47.1499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50.1521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53.157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3:56.1657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00.1446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03.148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06.1582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09.1669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13.1446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16.1481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19.1568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22.1669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26.1444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29.1493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32.1580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35.1653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39.1444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42.1491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45.1578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48.1666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52.1454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55.1478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4:58.1577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01.1651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05.1453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08.1477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11.1576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14.1651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18.1452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21.1501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24.1588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27.1650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5:31.1501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6.5357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634]-[.A633]" office:value-type="time" office:time-value="PT00H02M55.385587499S" calcext:value-type="time">
            <text:p>00:02:55.3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18:26.6897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6.8977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7.1097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7.2900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7.5260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7.6800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7.889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8.0972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8.306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8.5185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8.7292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8.9084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9.0889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9.2944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9.4195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9.6300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9.8092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29.9593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0.0791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0.290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0.529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0.7100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0.8890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1.0958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1.279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1.546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1.638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1.7594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1.9044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2.0295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2.1493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2.295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2.4447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2.599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2.8067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2.929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3.049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3.228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3.3483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3.4692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4.148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37.1521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40.1608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43.1696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47.1484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50.1520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53.1620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8:56.1695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00.1495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03.151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06.1605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09.1704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13.1493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16.1529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19.1628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22.1704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26.1492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29.1528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32.1628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35.1702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39.1490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42.1543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45.1618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48.1726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52.1506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55.1555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19:58.1642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01.1712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05.1501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08.1537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11.1637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14.1737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18.1500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21.1549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24.1647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27.17226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0:31.1547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711]-[.A710]" office:value-type="time" office:time-value="PT00H00M03.982487577S" calcext:value-type="time">
            <text:p>00:00:03.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06:23:26.5443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6.6947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6.905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7.1147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7.295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7.5347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7.6808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7.8956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8.0986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8.285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8.5185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8.7292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8.9095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9.0913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9.3071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9.485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9.7258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29.899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0.0498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0.174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0.2922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0.4449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0.5951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0.8045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0112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1639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3128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4644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5514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704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8532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1.9442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2.0944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2.2394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2.392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2.5097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2.6270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2.7536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2.9288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3.0538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3.1406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4.154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37.1564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40.1663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43.1750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47.1539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50.1575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53.1674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3:56.1762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00.1537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03.1573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06.1673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09.1735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13.1549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16.1584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19.1685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22.1771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26.1548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29.1595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32.168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35.1758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39.1547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42.1582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45.1682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48.1782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52.1558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55.1594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4:58.1681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01.1756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05.1557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08.1617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11.16800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14.1754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18.1556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21.159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24.1692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27.1779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5:31.1604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6.6103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6.7894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6.9988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7.2097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7.3901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7.5365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7.6978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7.8969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8.1102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8.2892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8.5275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8.7105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8.889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9.100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9.3096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9.4888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9.7296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29.9101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0.0601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0.180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0.2998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0.5105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0.7147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0.895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1.1095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1.2886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1.464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1.5575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1.6498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1.799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1.9436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2.0396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2.1897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2.3386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2.5178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2.693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2.844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2.939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3.1143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3.2393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3.3579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4.1585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37.1621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40.171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43.1806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47.1596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50.1644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53.1730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8:56.1818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06:29:00.1607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 table:number-rows-repeated="4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2026-May-19 17:20:18.85989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0:21.86595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0:24.8734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0:27.8821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0:31.8648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7.3301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7.5157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7.7263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7.9357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8.1161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8.3254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8.5021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8.6561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8.8352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9.013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9.225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9.4346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9.5848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9.7060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29.9154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0.0958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0.2459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0.422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0.6054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0.8162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1.0254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1.2322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1.416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1.6561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1.8327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1.9854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1355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2490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3728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5256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5849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6745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825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2.9748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3.126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3.3055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3.4505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3.6018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3.8466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3.9602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4.055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4.8628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37.8677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40.8765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43.8865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47.8628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50.8689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53.8789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3:56.8877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00.8640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03.8700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06.8787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09.8862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13.8636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16.8672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19.8784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22.8872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26.8634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4:28.718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3110" calcext:value-type="float">
            <text:p>43110</text:p>
          </table:table-cell>
          <table:table-cell table:formula="of:=[.A907]-[.A906]" office:value-type="time" office:time-value="PT00H00M01.854713587S" calcext:value-type="time">
            <text:p>00:00:01.85</text:p>
          </table:table-cell>
          <table:table-cell office:value-type="string" calcext:value-type="string">
            <text:p>energy storage control switch</text:p>
          </table:table-cell>
          <table:table-cell office:value-type="string" calcext:value-type="string">
            <text:p>we don’t normally access thes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17:24:28.8656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3024" calcext:value-type="float">
            <text:p>43024</text:p>
          </table:table-cell>
          <table:table-cell/>
          <table:table-cell office:value-type="string" calcext:value-type="string">
            <text:p>solis backup SOC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9 17:24:28.9566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3011" calcext:value-type="float">
            <text:p>43011</text:p>
          </table:table-cell>
          <table:table-cell/>
          <table:table-cell office:value-type="string" calcext:value-type="string">
            <text:p>solis overdischarge SOC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9 17:24:29.8589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7.3108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911]-[.A910]" office:value-type="time" office:time-value="PT00H03M57.45195209S" calcext:value-type="time">
            <text:p>00:03:57.45</text:p>
          </table:table-cell>
          <table:table-cell/>
          <table:table-cell office:value-type="string" calcext:value-type="string">
            <text:p>normal cycl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17:28:27.5188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7.64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7.8217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8.0310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8.211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8.4181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8.658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8.8368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9.0147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9.2319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9.4360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9.6518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29.8298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0.011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0.1905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0.338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0.5753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0.6713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0.819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1.0295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1.211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1.420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1.6577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1.811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1.9908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2.1358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2.260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2.3742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2.5285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2.6444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2.770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2.9185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3.066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3.221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3.429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3.5756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3.6702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3.85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3.9642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4.060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4.8681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37.8754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40.8820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43.8928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47.86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50.8756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53.8840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8:56.8916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00.869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03.8753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06.883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09.8914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13.8690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16.8764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19.8838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22.8938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26.8625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29.8725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32.8837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35.89110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39.8701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42.8761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45.8849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48.8936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52.8699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55.8773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29:58.8848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01.8910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05.8698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08.873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11.88467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14.8947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18.8697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21.8771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24.8859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27.8945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0:31.8760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7.3168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989]-[.A988]" office:value-type="time" office:time-value="PT00H02M55.440865313S" calcext:value-type="time">
            <text:p>00:02:55.4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17:33:27.526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7.647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7.823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8.0357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8.216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8.3965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8.5164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8.6653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8.814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9.026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9.2369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9.4160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9.6229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9.8348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29.9825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0.1366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0.3169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0.4658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0.6159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0.8266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1.0333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1.2163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1.427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1.5758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1.6958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1.8474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1.9646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2.0859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2.2070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2.35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2.4760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2.6511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2.7761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2.926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3.106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3.2517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3.3754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3.553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3.669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3.764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4.8732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37.8805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40.8905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43.8980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47.8744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50.8780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53.8892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3:56.8991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00.874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03.8803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06.8894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09.8977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13.8745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16.8806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19.8902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22.8976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26.8740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29.8817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32.8892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35.8949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39.87517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42.8816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45.8913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48.89747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52.8750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55.8812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4:58.8899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01.89739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05.8750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08.8827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11.8910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14.90017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18.8761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21.8822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24.8910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27.8996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5:31.8810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7.318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1067]-[.A1066]" office:value-type="time" office:time-value="PT00H02M55.437971042S" calcext:value-type="time">
            <text:p>00:02:55.4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17:38:27.5322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7.738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7.9219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8.1326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8.3117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8.5223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8.6421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8.822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9.03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9.2123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9.4519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9.6599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29.8114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0.0208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0.198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0.3528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0.5255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0.680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0.8019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0.9155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1.1325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1.3393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1.5185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1.7318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1.912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2.1518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2.265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2.3916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2.5720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2.6616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2.7765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2.9318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3.079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3.2321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3.4125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3.589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3.6789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3.8329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3.979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4.0650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4.8742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37.8854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40.8941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43.9041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47.8792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50.8841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53.8929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8:56.9039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00.8853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03.8888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06.8949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09.9049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13.8800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16.8861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19.8960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22.9036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26.8798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29.8872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32.8935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35.9033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39.87977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42.8858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45.8975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48.9033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52.8812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55.8874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39:58.8945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01.9023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05.88076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08.8873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11.8956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14.9056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18.8811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21.8880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24.8968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27.9067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0:31.8869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7.3282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7.5375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7.7179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7.9260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8.138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8.3172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8.5227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8.646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8.8232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9.0338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9.2180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9.4551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9.6380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29.817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0.0215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0.1768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0.357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0.5376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0.6865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0.8064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1.0171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1.2279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1.4373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1.6440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1.8219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2.0074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2.2483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2.3668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2.4868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2.638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2.750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2.876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3.0217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3.1718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3.3273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3.594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3.6567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3.7765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3.955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4.0704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4.1684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4.8796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37.8908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40.9009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43.9083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47.8846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50.8908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53.8995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3:56.9082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00.8845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03.8919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06.9006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09.9081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13.8857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16.8918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19.9005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22.9092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26.8856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29.8930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32.8980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35.9077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39.8854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42.8915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45.9003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48.9076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52.8866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55.890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4:58.9014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01.9089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05.8864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08.8925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11.9013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14.9087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18.8864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21.8924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24.9011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27.9087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5:31.8928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7.3335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7.601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7.7235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7.9276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8.1396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8.3201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8.503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8.648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8.8338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9.012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9.2209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9.4343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9.6433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29.8189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0.0333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0.182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0.3587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0.542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0.6930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0.8081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1.0186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1.2331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1.4412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1.6531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1.833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2.0137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2.253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2.368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2.491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2.6421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2.7557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2.8794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033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182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3324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5128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6024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6618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840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3.955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4.082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4.8897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37.8946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40.9034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43.9134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47.8834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50.8946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53.905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8:56.9133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00.8908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03.8970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06.9058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09.9145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13.8908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16.8982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19.9069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22.9169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26.89074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29.8980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32.90437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35.9128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39.8918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42.8967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45.9067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48.9154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52.8918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55.8991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49:58.9065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01.9153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05.8916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08.8977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11.9077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14.9165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18.8914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21.8988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24.9062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27.9162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0:31.8962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7.3376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7.5181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7.668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7.8450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8.0228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8.2386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8.417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8.5985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8.7182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8.9289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9.137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9.3489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9.5229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9.6454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9.8247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29.9783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0.1587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0.339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0.4880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0.633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0.818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1.0216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1.2385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1.4190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1.6587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1.809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0498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1684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2882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4333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582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678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8233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2.9734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3.1287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3.3354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3.458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3.6069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3.849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3.966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4.0853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4.8936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37.9021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40.9100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43.9186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47.8964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50.9021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53.9108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3:56.919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00.8958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03.9032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06.9120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09.9206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13.8956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16.903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19.9092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22.9179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26.8967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29.9029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32.9103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35.9214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39.8966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42.9040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45.9128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48.9203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52.8902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55.9026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4:58.9103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01.9202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05.89660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08.9040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11.9114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14.9214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18.89780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21.9038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24.9126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27.9225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5:31.9026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27.3212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1379]-[.A1378]" office:value-type="time" office:time-value="PT00H02M55.418589986S" calcext:value-type="time">
            <text:p>00:02:55.4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17:58:27.5254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27.6504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27.8296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2026-May-19 17:58:40.9524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5000" calcext:value-type="float">
            <text:p>35000</text:p>
          </table:table-cell>
          <table:table-cell table:style-name="ce8" table:formula="of:=[.A1383]-[.A1382]" office:value-type="time" office:time-value="PT00H00M13.122848631S" calcext:value-type="time">
            <text:p>00:00:13.12</text:p>
          </table:table-cell>
          <table:table-cell/>
          <table:table-cell office:value-type="string" calcext:value-type="string">
            <text:p>This looks like an aborted cycle</text:p>
          </table:table-cell>
          <table:table-cell table:style-name="ce15" office:value-type="string" calcext:value-type="string">
            <text:p>Extend idle time if we don’t see requests for slave 1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17:58:46.9194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0.2209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25" calcext:value-type="float">
            <text:p>33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0.4342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0.583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0.727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0.944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1.1243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1.3337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1.5102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1.6630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1.843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2.020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2.2334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2.4427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2.6483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2.8339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3.0406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3.1882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3.3434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3.5238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3.605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3.8230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4.0335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4.2391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4.423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4.662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4.8408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4.9936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1424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2560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3811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5338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5932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6827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8341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5.9829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6.133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6.3134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6.458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6.6087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6.853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6.9670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7.0632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8:57.4427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00.4479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428]-[.A1427]" office:value-type="time" office:time-value="PT00H00M03.005254269S" calcext:value-type="time">
            <text:p>00:00:03.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17:59:03.4579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06.4663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10.4366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13.4478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16.4590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19.4665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23.4429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26.4486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28.2735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3110" calcext:value-type="float">
            <text:p>43110</text:p>
          </table:table-cell>
          <table:table-cell table:formula="of:=[.A1437]-[.A1436]" office:value-type="time" office:time-value="PT00H00M01.82490712S" calcext:value-type="time">
            <text:p>00:00:01.82</text:p>
          </table:table-cell>
          <table:table-cell/>
          <table:table-cell office:value-type="string" calcext:value-type="string">
            <text:p>These 3 agai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9 17:59:28.3840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3024" calcext:value-type="float">
            <text:p>4302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28.468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3011" calcext:value-type="float">
            <text:p>4301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7:59:29.4391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2026-May-19 18:03:31.7179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3025" calcext:value-type="float">
            <text:p>33025</text:p>
          </table:table-cell>
          <table:table-cell table:style-name="ce8" table:formula="of:=[.A1441]-[.A1440]" office:value-type="time" office:time-value="PT00H04M02.278853338S" calcext:value-type="time">
            <text:p>00:04:02.28</text:p>
          </table:table-cell>
          <table:table-cell/>
          <table:table-cell office:value-type="string" calcext:value-type="string">
            <text:p>Quite a large gap here – I think this is the reset</text:p>
          </table:table-cell>
          <table:table-cell table:style-name="ce15" office:value-type="string" calcext:value-type="string">
            <text:p>This should be fine – we’ll do our usual polls with plenty of time to spare, then re-sync, which has a 5 min timeou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6-May-19 18:03:31.9236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2.1382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2.3447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2.529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2.6490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2.824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3.0083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3.1269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3.3388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3.517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3.6643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3.8434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4.0238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4.2373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4.419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4.6284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4.8388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5.046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5.196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5.3185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5.5230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5.6480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5.8283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6.0388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6.218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6.3983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6.5448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6.6672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6.7821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6.9348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7.0864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7.1772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7.3260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7.5039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7.6276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7.8383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7.9847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8.0770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8.2586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8.3709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8.4669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39.4473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42.452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45.4609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48.4721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52.4409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55.4533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3:58.4607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01.4708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05.4484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08.4544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11.463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14.4706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18.4486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21.4543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24.4643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27.4722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31.4481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34.4529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37.4628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40.4705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44.4480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47.4554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50.46418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53.4716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4:57.4492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00.4552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03.4614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06.4726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10.44894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13.45506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16.46510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19.4738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23.4425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26.4549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29.46499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32.4712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5:36.4550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1.9336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1520]-[.A1519]" office:value-type="time" office:time-value="PT00H02M55.478629768S" calcext:value-type="time">
            <text:p>00:02:55.4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18:08:32.1430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2.3237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2.5318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2.6529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2.8333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3.0111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3.2231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3.4286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3.6431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3.8235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4.0605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4.2410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4.4227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4.661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4.7823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4.9628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5.1432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5.2921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5.4120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5.6481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5.8337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6.0443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6.2233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6.4274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6.643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6.8537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6.971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7.086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7.2136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7.3586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7.482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7.663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7.776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7.934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8.1394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8.26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8.3830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8.6227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8.7692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8.887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39.4527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42.4589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45.4676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48.4763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52.4462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55.4599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8:58.4687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01.4774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05.4525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08.4587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11.4686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14.476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18.4523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21.4585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24.4685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27.4772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31.4536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34.4583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37.4670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40.4759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44.4535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47.4608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50.4696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53.4771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09:57.4546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00.46079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03.4682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06.4769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10.4545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13.4594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16.4693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19.4768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23.4544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26.46059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29.4692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32.4767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0:36.4592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1.9381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1598]-[.A1597]" office:value-type="time" office:time-value="PT00H02M55.478900084S" calcext:value-type="time">
            <text:p>00:02:55.4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18:13:32.1448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2.327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2.5938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2.7439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2.9257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3.1087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3.2273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3.438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3.648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3.8254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4.038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4.218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4.4244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4.6389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4.7876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4.964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5.1483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5.2973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5.4123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5.658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5.8386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6.0466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6.2259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6.4379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6.6446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6.8591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6.972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7.0976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7.2187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7.3675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7.4849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7.6680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7.7867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7.9380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8.1182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8.267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8.387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8.5384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8.5979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8.6874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39.4574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42.4636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45.4735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48.4809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52.4572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55.463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3:58.4733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01.4820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05.458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08.4632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11.4707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14.4794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18.4581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21.4643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24.473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27.4818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31.4516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34.4627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37.4727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40.4803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44.4579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47.4631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50.4727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53.4840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4:57.4591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00.4639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03.4743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06.48178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10.4589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13.46544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16.4750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19.4841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23.4588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26.4637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29.4737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32.4824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5:36.4636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1.926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1676]-[.A1675]" office:value-type="time" office:time-value="PT00H02M55.462379982S" calcext:value-type="time">
            <text:p>00:02:55.46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9 18:18:32.130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2.3460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2.5264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2.6727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2.8268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3.0058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3.1258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3.3312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3.6024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3.7263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3.9621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4.1438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4.324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4.5296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4.6257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4.8641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5.0458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5.195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5.3133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5.5254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5.6464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5.8269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6.0363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6.2456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6.420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6.667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6.779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6.9004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7.023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7.1706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7.2654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7.4457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7.595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7.715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7.9239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8.0730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8.165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8.3457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8.4593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8.6158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39.4628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42.4690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45.4777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48.486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52.4564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55.4663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8:58.4776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01.4863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05.4626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08.4688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11.4775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14.4873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18.4624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21.4686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24.4748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27.4860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31.4636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34.4684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37.4784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40.4871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44.4635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47.4696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50.4796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53.4869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19:57.4632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00.4706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03.4780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06.4880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10.4644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13.4705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16.4792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19.4879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23.4642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26.4704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29.4791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32.4865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0:36.4690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1.9279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2.142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2.347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2.532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2.6520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2.8286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3.0115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3.1314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3.3421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3.5225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3.6689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3.848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4.0284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4.24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4.4224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4.5687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4.750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4.9323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5.081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5.2313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5.4418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5.6525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5.833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6.0423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6.2227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6.4017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6.5482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6.671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6.7855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6.9395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7.0910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7.1819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7.329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7.4771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7.6626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7.8418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7.988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8.0817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8.262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8.3756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8.4715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39.467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42.4744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45.4831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48.4918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52.4669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55.4743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3:58.483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01.4930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05.4680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08.4754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11.481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14.4891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18.4679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21.4741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24.4853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27.4926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31.4677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34.4738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37.4837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40.4897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44.46895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47.4751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50.4834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53.4913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4:57.4688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00.4735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03.4837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06.4925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10.46847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13.4761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16.4845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19.49486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23.4695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26.4764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29.4831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9 18:25:32.4923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 table:number-rows-repeated="10467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0T19:25:26.890864859</dc:date>
    <dc:creator>jon bird</dc:creator>
    <meta:editing-duration>PT1H4M20S</meta:editing-duration>
    <meta:editing-cycles>7</meta:editing-cycles>
    <meta:generator>LibreOffice/7.4.7.2$Linux_x86 LibreOffice_project/40$Build-2</meta:generator>
    <meta:document-statistic meta:table-count="1" meta:cell-count="7418" meta:object-count="0"/>
  </office:meta>
</office:document-meta>
</file>