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46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19">
      <style:text-properties fo:font-weight="bold" style:font-weight-asian="bold" style:font-weight-complex="bold"/>
    </style:style>
    <style:style style:name="ce6" style:family="table-cell" style:parent-style-name="Default" style:data-style-name="N119"/>
    <style:style style:name="ce7" style:family="table-cell" style:parent-style-name="Default" style:data-style-name="N119">
      <style:table-cell-properties fo:background-color="#ffff00"/>
    </style:style>
    <style:style style:name="ce14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2026-05-11_18-06-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2" table:default-cell-style-name="ce6"/>
        <table:table-column table:style-name="co5" table:default-cell-style-name="Default"/>
        <table:table-column table:style-name="co5" table:default-cell-style-name="ce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Slav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ddress</text:p>
          </table:table-cell>
          <table:table-cell table:style-name="ce1"/>
          <table:table-cell table:style-name="ce5" office:value-type="string" calcext:value-type="string">
            <text:p>Delta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2.6617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2026-May-11 18:08:52.7273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]-[.A2]" office:value-type="time" office:time-value="PT00H00M00.065607042S" calcext:value-type="time">
            <text:p>00:00:00.0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2.8801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4]-[.A3]" office:value-type="time" office:time-value="PT00H00M00.152737554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3.0907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5]-[.A4]" office:value-type="time" office:time-value="PT00H00M00.210665097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3.3000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6]-[.A5]" office:value-type="time" office:time-value="PT00H00M00.209315401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3.480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7]-[.A6]" office:value-type="time" office:time-value="PT00H00M00.18040475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3.7149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8]-[.A7]" office:value-type="time" office:time-value="PT00H00M00.234459224S" calcext:value-type="time">
            <text:p>00:00:00.2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3.9004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9]-[.A8]" office:value-type="time" office:time-value="PT00H00M00.185514987S" calcext:value-type="time">
            <text:p>00:00:00.1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4.0808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/>
          <table:table-cell table:formula="of:=[.A10]-[.A9]" office:value-type="time" office:time-value="PT00H00M00.180369546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4.2851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11]-[.A10]" office:value-type="time" office:time-value="PT00H00M00.204321463S" calcext:value-type="time">
            <text:p>00:00:00.2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4.5008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12]-[.A11]" office:value-type="time" office:time-value="PT00H00M00.215721899S" calcext:value-type="time">
            <text:p>00:00:00.2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4.7102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13]-[.A12]" office:value-type="time" office:time-value="PT00H00M00.209335517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4.8905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/>
          <table:table-cell table:formula="of:=[.A14]-[.A13]" office:value-type="time" office:time-value="PT00H00M00.18035823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5.0987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15]-[.A14]" office:value-type="time" office:time-value="PT00H00M00.208132295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5.3107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/>
          <table:table-cell table:formula="of:=[.A16]-[.A15]" office:value-type="time" office:time-value="PT00H00M00.212004734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5.4898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/>
          <table:table-cell table:formula="of:=[.A17]-[.A16]" office:value-type="time" office:time-value="PT00H00M00.179124833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5.7004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/>
          <table:table-cell table:formula="of:=[.A18]-[.A17]" office:value-type="time" office:time-value="PT00H00M00.210600346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5.8808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/>
          <table:table-cell table:formula="of:=[.A19]-[.A18]" office:value-type="time" office:time-value="PT00H00M00.180438068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6.0599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/>
          <table:table-cell table:formula="of:=[.A20]-[.A19]" office:value-type="time" office:time-value="PT00H00M00.179066998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6.2051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/>
          <table:table-cell table:formula="of:=[.A21]-[.A20]" office:value-type="time" office:time-value="PT00H00M00.145158637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6.3893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/>
          <table:table-cell table:formula="of:=[.A22]-[.A21]" office:value-type="time" office:time-value="PT00H00M00.184247014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6.5395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/>
          <table:table-cell table:formula="of:=[.A23]-[.A22]" office:value-type="time" office:time-value="PT00H00M00.150222355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6.6898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/>
          <table:table-cell table:formula="of:=[.A24]-[.A23]" office:value-type="time" office:time-value="PT00H00M00.150248758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6.8965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/>
          <table:table-cell table:formula="of:=[.A25]-[.A24]" office:value-type="time" office:time-value="PT00H00M00.206736079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7.0808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/>
          <table:table-cell table:formula="of:=[.A26]-[.A25]" office:value-type="time" office:time-value="PT00H00M00.1842489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7.2863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/>
          <table:table-cell table:formula="of:=[.A27]-[.A26]" office:value-type="time" office:time-value="PT00H00M00.205505197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7.4983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/>
          <table:table-cell table:formula="of:=[.A28]-[.A27]" office:value-type="time" office:time-value="PT00H00M00.211996562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7.7103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/>
          <table:table-cell table:formula="of:=[.A29]-[.A28]" office:value-type="time" office:time-value="PT00H00M00.212023593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7.8604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/>
          <table:table-cell table:formula="of:=[.A30]-[.A29]" office:value-type="time" office:time-value="PT00H00M00.150148803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8.0105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/>
          <table:table-cell table:formula="of:=[.A31]-[.A30]" office:value-type="time" office:time-value="PT00H00M00.150055136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8.1291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/>
          <table:table-cell table:formula="of:=[.A32]-[.A31]" office:value-type="time" office:time-value="PT00H00M00.118647516S" calcext:value-type="time">
            <text:p>00:00:00.1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8.2491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/>
          <table:table-cell table:formula="of:=[.A33]-[.A32]" office:value-type="time" office:time-value="PT00H00M00.119922403S" calcext:value-type="time">
            <text:p>00:00:00.1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8.3702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/>
          <table:table-cell table:formula="of:=[.A34]-[.A33]" office:value-type="time" office:time-value="PT00H00M00.121185975S" calcext:value-type="time">
            <text:p>00:00:00.1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8.5153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/>
          <table:table-cell table:formula="of:=[.A35]-[.A34]" office:value-type="time" office:time-value="PT00H00M00.145056169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8.640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/>
          <table:table-cell table:formula="of:=[.A36]-[.A35]" office:value-type="time" office:time-value="PT00H00M00.124950917S" calcext:value-type="time">
            <text:p>00:00:00.1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8.7851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/>
          <table:table-cell table:formula="of:=[.A37]-[.A36]" office:value-type="time" office:time-value="PT00H00M00.14486569S" calcext:value-type="time">
            <text:p>00:00:00.1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8.9340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/>
          <table:table-cell table:formula="of:=[.A38]-[.A37]" office:value-type="time" office:time-value="PT00H00M00.148905977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9.0905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/>
          <table:table-cell table:formula="of:=[.A39]-[.A38]" office:value-type="time" office:time-value="PT00H00M00.156457862S" calcext:value-type="time">
            <text:p>00:00:00.1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9.2960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/>
          <table:table-cell table:formula="of:=[.A40]-[.A39]" office:value-type="time" office:time-value="PT00H00M00.205500168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9.4197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/>
          <table:table-cell table:formula="of:=[.A41]-[.A40]" office:value-type="time" office:time-value="PT00H00M00.123760267S" calcext:value-type="time">
            <text:p>00:00:00.1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9.5976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/>
          <table:table-cell table:formula="of:=[.A42]-[.A41]" office:value-type="time" office:time-value="PT00H00M00.177882635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9.8109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/>
          <table:table-cell table:formula="of:=[.A43]-[.A42]" office:value-type="time" office:time-value="PT00H00M00.213276478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8:59.9270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/>
          <table:table-cell table:formula="of:=[.A44]-[.A43]" office:value-type="time" office:time-value="PT00H00M00.116093969S" calcext:value-type="time">
            <text:p>00:00:00.1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00.0458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/>
          <table:table-cell table:formula="of:=[.A45]-[.A44]" office:value-type="time" office:time-value="PT00H00M00.1187569S" calcext:value-type="time">
            <text:p>00:00:00.1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00.6760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6]-[.A45]" office:value-type="time" office:time-value="PT00H00M00.630274066S" calcext:value-type="time">
            <text:p>00:00:00.6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03.6821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7]-[.A46]" office:value-type="time" office:time-value="PT00H00M03.006109851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06.6897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48]-[.A47]" office:value-type="time" office:time-value="PT00H00M03.007514239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09.6984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9]-[.A48]" office:value-type="time" office:time-value="PT00H00M03.008702374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13.6759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0]-[.A49]" office:value-type="time" office:time-value="PT00H00M03.977584164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16.6808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1]-[.A50]" office:value-type="time" office:time-value="PT00H00M03.004829935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19.69079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2]-[.A51]" office:value-type="time" office:time-value="PT00H00M03.009980405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22.6995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3]-[.A52]" office:value-type="time" office:time-value="PT00H00M03.00872752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26.6771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4]-[.A53]" office:value-type="time" office:time-value="PT00H00M03.977634455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29.6806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5]-[.A54]" office:value-type="time" office:time-value="PT00H00M03.003533673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32.6906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6]-[.A55]" office:value-type="time" office:time-value="PT00H00M03.009968461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35.6981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7]-[.A56]" office:value-type="time" office:time-value="PT00H00M03.007479664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39.67697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8]-[.A57]" office:value-type="time" office:time-value="PT00H00M03.978833905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42.68059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9]-[.A58]" office:value-type="time" office:time-value="PT00H00M03.003616026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45.6905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0]-[.A59]" office:value-type="time" office:time-value="PT00H00M03.009972861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48.69800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1]-[.A60]" office:value-type="time" office:time-value="PT00H00M03.007443203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52.6768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2]-[.A61]" office:value-type="time" office:time-value="PT00H00M03.978865338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55.68045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3]-[.A62]" office:value-type="time" office:time-value="PT00H00M03.003580822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09:58.6904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4]-[.A63]" office:value-type="time" office:time-value="PT00H00M03.009966575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0:01.69915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5]-[.A64]" office:value-type="time" office:time-value="PT00H00M03.008734435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0:05.67799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6]-[.A65]" office:value-type="time" office:time-value="PT00H00M03.978837049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0:08.68159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7]-[.A66]" office:value-type="time" office:time-value="PT00H00M03.003606596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0:11.6891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8]-[.A67]" office:value-type="time" office:time-value="PT00H00M03.007520526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0:14.6978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9]-[.A68]" office:value-type="time" office:time-value="PT00H00M03.008691687S" calcext:value-type="time">
            <text:p>00:00:03.01</text:p>
          </table:table-cell>
          <table:table-cell table:number-columns-repeated="6"/>
          <table:table-cell table:style-name="ce14"/>
        </table:table-row>
        <table:table-row table:style-name="ro1">
          <table:table-cell table:style-name="ce2" office:value-type="string" calcext:value-type="string">
            <text:p>2026-May-11 18:10:18.67787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0]-[.A69]" office:value-type="time" office:time-value="PT00H00M03.980067931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0:21.6827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1]-[.A70]" office:value-type="time" office:time-value="PT00H00M03.004839364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0:24.6914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2]-[.A71]" office:value-type="time" office:time-value="PT00H00M03.008704889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0:27.6989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3]-[.A72]" office:value-type="time" office:time-value="PT00H00M03.007501666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0:31.67774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4]-[.A73]" office:value-type="time" office:time-value="PT00H00M03.978821961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0:34.68135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5]-[.A74]" office:value-type="time" office:time-value="PT00H00M03.003608482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0:37.6913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6]-[.A75]" office:value-type="time" office:time-value="PT00H00M03.009979776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0:40.6999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7]-[.A76]" office:value-type="time" office:time-value="PT00H00M03.008601163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0:44.6775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8]-[.A77]" office:value-type="time" office:time-value="PT00H00M03.977587936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0:47.682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9]-[.A78]" office:value-type="time" office:time-value="PT00H00M03.004860738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0:50.69234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0]-[.A79]" office:value-type="time" office:time-value="PT00H00M03.009958402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0:53.6998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1]-[.A80]" office:value-type="time" office:time-value="PT00H00M03.007472749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0:57.6824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/>
          <table:table-cell table:formula="of:=[.A82]-[.A81]" office:value-type="time" office:time-value="PT00H00M03.982590046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2026-May-11 18:13:53.0948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3050" calcext:value-type="float">
            <text:p>33050</text:p>
          </table:table-cell>
          <table:table-cell table:style-name="ce4"/>
          <table:table-cell table:style-name="ce7" table:formula="of:=[.A83]-[.A82]" office:value-type="time" office:time-value="PT00H02M55.412423001S" calcext:value-type="time">
            <text:p>00:02:55.41</text:p>
          </table:table-cell>
          <table:table-cell table:formula="of:=SUM([.F6:.F83])" office:value-type="time" office:time-value="PT00H05M00.004048185S" calcext:value-type="time">
            <text:p>00:05:00.00</text:p>
          </table:table-cell>
          <table:table-cell office:value-type="string" calcext:value-type="string">
            <text:p>cycle time</text:p>
          </table:table-cell>
          <table:table-cell table:formula="of:=TIME(0;5;0)-[.F83]" office:value-type="time" office:time-value="PT00H02M04.587577S" calcext:value-type="time">
            <text:p>00:02:04.59</text:p>
          </table:table-cell>
          <table:table-cell office:value-type="string" calcext:value-type="string">
            <text:p>spare ti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6-May-11 18:13:53.3014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84]-[.A83]" office:value-type="time" office:time-value="PT00H00M00.206585205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3.4856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85]-[.A84]" office:value-type="time" office:time-value="PT00H00M00.184242614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3.6596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86]-[.A85]" office:value-type="time" office:time-value="PT00H00M00.174005167S" calcext:value-type="time">
            <text:p>00:00:00.1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3.7846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87]-[.A86]" office:value-type="time" office:time-value="PT00H00M00.124993036S" calcext:value-type="time">
            <text:p>00:00:00.1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3.9954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/>
          <table:table-cell table:formula="of:=[.A88]-[.A87]" office:value-type="time" office:time-value="PT00H00M00.210749963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4.1693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89]-[.A88]" office:value-type="time" office:time-value="PT00H00M00.173993851S" calcext:value-type="time">
            <text:p>00:00:00.1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4.3851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90]-[.A89]" office:value-type="time" office:time-value="PT00H00M00.215750816S" calcext:value-type="time">
            <text:p>00:00:00.2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4.5957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91]-[.A90]" office:value-type="time" office:time-value="PT00H00M00.210605375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4.7156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/>
          <table:table-cell table:formula="of:=[.A92]-[.A91]" office:value-type="time" office:time-value="PT00H00M00.119884685S" calcext:value-type="time">
            <text:p>00:00:00.1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4.8946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93]-[.A92]" office:value-type="time" office:time-value="PT00H00M00.179012306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5.1027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/>
          <table:table-cell table:formula="of:=[.A94]-[.A93]" office:value-type="time" office:time-value="PT00H00M00.208109035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5.2832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/>
          <table:table-cell table:formula="of:=[.A95]-[.A94]" office:value-type="time" office:time-value="PT00H00M00.180504075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5.4953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/>
          <table:table-cell table:formula="of:=[.A96]-[.A95]" office:value-type="time" office:time-value="PT00H00M00.212043081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5.7046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/>
          <table:table-cell table:formula="of:=[.A97]-[.A96]" office:value-type="time" office:time-value="PT00H00M00.209326716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5.8547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/>
          <table:table-cell table:formula="of:=[.A98]-[.A97]" office:value-type="time" office:time-value="PT00H00M00.150126801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6.0048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/>
          <table:table-cell table:formula="of:=[.A99]-[.A98]" office:value-type="time" office:time-value="PT00H00M00.150123029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6.1853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/>
          <table:table-cell table:formula="of:=[.A100]-[.A99]" office:value-type="time" office:time-value="PT00H00M00.180505333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6.3342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/>
          <table:table-cell table:formula="of:=[.A101]-[.A100]" office:value-type="time" office:time-value="PT00H00M00.148874545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6.4856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/>
          <table:table-cell table:formula="of:=[.A102]-[.A101]" office:value-type="time" office:time-value="PT00H00M00.151372142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6.6948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/>
          <table:table-cell table:formula="of:=[.A103]-[.A102]" office:value-type="time" office:time-value="PT00H00M00.209234934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6.8752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/>
          <table:table-cell table:formula="of:=[.A104]-[.A103]" office:value-type="time" office:time-value="PT00H00M00.180407264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7.0846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/>
          <table:table-cell table:formula="of:=[.A105]-[.A104]" office:value-type="time" office:time-value="PT00H00M00.209355005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7.2952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/>
          <table:table-cell table:formula="of:=[.A106]-[.A105]" office:value-type="time" office:time-value="PT00H00M00.210612919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7.5007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/>
          <table:table-cell table:formula="of:=[.A107]-[.A106]" office:value-type="time" office:time-value="PT00H00M00.20550394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7.6850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/>
          <table:table-cell table:formula="of:=[.A108]-[.A107]" office:value-type="time" office:time-value="PT00H00M00.184331252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7.8956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/>
          <table:table-cell table:formula="of:=[.A109]-[.A108]" office:value-type="time" office:time-value="PT00H00M00.210542511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8.0445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/>
          <table:table-cell table:formula="of:=[.A110]-[.A109]" office:value-type="time" office:time-value="PT00H00M00.148896547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8.1342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/>
          <table:table-cell table:formula="of:=[.A111]-[.A110]" office:value-type="time" office:time-value="PT00H00M00.089723663S" calcext:value-type="time">
            <text:p>00:00:00.0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8.2844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/>
          <table:table-cell table:formula="of:=[.A112]-[.A111]" office:value-type="time" office:time-value="PT00H00M00.150232413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8.4294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/>
          <table:table-cell table:formula="of:=[.A113]-[.A112]" office:value-type="time" office:time-value="PT00H00M00.145017821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8.5242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/>
          <table:table-cell table:formula="of:=[.A114]-[.A113]" office:value-type="time" office:time-value="PT00H00M00.094754691S" calcext:value-type="time">
            <text:p>00:00:00.0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8.7046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/>
          <table:table-cell table:formula="of:=[.A115]-[.A114]" office:value-type="time" office:time-value="PT00H00M00.180365145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8.8244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/>
          <table:table-cell table:formula="of:=[.A116]-[.A115]" office:value-type="time" office:time-value="PT00H00M00.119875255S" calcext:value-type="time">
            <text:p>00:00:00.1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8.9745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/>
          <table:table-cell table:formula="of:=[.A117]-[.A116]" office:value-type="time" office:time-value="PT00H00M00.150107942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9.1801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/>
          <table:table-cell table:formula="of:=[.A118]-[.A117]" office:value-type="time" office:time-value="PT00H00M00.205527828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9.328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/>
          <table:table-cell table:formula="of:=[.A119]-[.A118]" office:value-type="time" office:time-value="PT00H00M00.148868258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9.423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/>
          <table:table-cell table:formula="of:=[.A120]-[.A119]" office:value-type="time" office:time-value="PT00H00M00.094769779S" calcext:value-type="time">
            <text:p>00:00:00.0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9.6028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/>
          <table:table-cell table:formula="of:=[.A121]-[.A120]" office:value-type="time" office:time-value="PT00H00M00.179083971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9.7177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/>
          <table:table-cell table:formula="of:=[.A122]-[.A121]" office:value-type="time" office:time-value="PT00H00M00.114895147S" calcext:value-type="time">
            <text:p>00:00:00.1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3:59.8440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/>
          <table:table-cell table:formula="of:=[.A123]-[.A122]" office:value-type="time" office:time-value="PT00H00M00.126274838S" calcext:value-type="time">
            <text:p>00:00:00.13</text:p>
          </table:table-cell>
          <table:table-cell table:formula="of:=[.A123]-[.A83]" office:value-type="time" office:time-value="PT00H00M06.7491889S" calcext:value-type="time">
            <text:p>00:00:06.7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2026-May-11 18:14:00.6807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24]-[.A123]" office:value-type="time" office:time-value="PT00H00M00.836759317S" calcext:value-type="time">
            <text:p>00:00:00.84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2026-May-11 18:14:03.6857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25]-[.A124]" office:value-type="time" office:time-value="PT00H00M03.004968865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4:06.6932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26]-[.A125]" office:value-type="time" office:time-value="PT00H00M03.007474006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4:09.7032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27]-[.A126]" office:value-type="time" office:time-value="PT00H00M03.009993606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4:13.68078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28]-[.A127]" office:value-type="time" office:time-value="PT00H00M03.977573477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4:16.68576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29]-[.A128]" office:value-type="time" office:time-value="PT00H00M03.004977037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4:19.6945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30]-[.A129]" office:value-type="time" office:time-value="PT00H00M03.008773411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4:22.7032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31]-[.A130]" office:value-type="time" office:time-value="PT00H00M03.008681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4:26.6820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32]-[.A131]" office:value-type="time" office:time-value="PT00H00M03.978845221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4:29.6856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33]-[.A132]" office:value-type="time" office:time-value="PT00H00M03.003588994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4:32.6944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34]-[.A133]" office:value-type="time" office:time-value="PT00H00M03.008748265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4:35.7030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35]-[.A134]" office:value-type="time" office:time-value="PT00H00M03.008692944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4:39.6819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36]-[.A135]" office:value-type="time" office:time-value="PT00H00M03.978844592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4:42.6867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37]-[.A136]" office:value-type="time" office:time-value="PT00H00M03.004842508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4:45.6942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38]-[.A137]" office:value-type="time" office:time-value="PT00H00M03.007464577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4:48.7042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39]-[.A138]" office:value-type="time" office:time-value="PT00H00M03.010004922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4:52.6818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40]-[.A139]" office:value-type="time" office:time-value="PT00H00M03.977596108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4:55.6879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41]-[.A140]" office:value-type="time" office:time-value="PT00H00M03.00606396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4:58.69539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42]-[.A141]" office:value-type="time" office:time-value="PT00H00M03.007489094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5:01.7041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43]-[.A142]" office:value-type="time" office:time-value="PT00H00M03.008711804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5:05.68170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44]-[.A143]" office:value-type="time" office:time-value="PT00H00M03.977597994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5:08.68779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45]-[.A144]" office:value-type="time" office:time-value="PT00H00M03.006090363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5:11.6952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46]-[.A145]" office:value-type="time" office:time-value="PT00H00M03.007465205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5:14.7052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47]-[.A146]" office:value-type="time" office:time-value="PT00H00M03.010000521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5:18.6828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48]-[.A147]" office:value-type="time" office:time-value="PT00H00M03.977555246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5:21.6863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49]-[.A148]" office:value-type="time" office:time-value="PT00H00M03.003485268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5:24.6962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50]-[.A149]" office:value-type="time" office:time-value="PT00H00M03.009950859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5:27.70498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51]-[.A150]" office:value-type="time" office:time-value="PT00H00M03.008730663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5:31.68260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52]-[.A151]" office:value-type="time" office:time-value="PT00H00M03.977616224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5:34.6861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53]-[.A152]" office:value-type="time" office:time-value="PT00H00M03.003565106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5:37.6961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54]-[.A153]" office:value-type="time" office:time-value="PT00H00M03.00996406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5:40.70486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55]-[.A154]" office:value-type="time" office:time-value="PT00H00M03.008735063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5:44.68248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56]-[.A155]" office:value-type="time" office:time-value="PT00H00M03.97761371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5:47.6860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57]-[.A156]" office:value-type="time" office:time-value="PT00H00M03.003575164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5:50.69730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58]-[.A157]" office:value-type="time" office:time-value="PT00H00M03.011245863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5:53.7047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59]-[.A158]" office:value-type="time" office:time-value="PT00H00M03.00747212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5:57.68859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/>
          <table:table-cell table:formula="of:=[.A160]-[.A159]" office:value-type="time" office:time-value="PT00H00M03.983822814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2026-May-11 18:18:53.17846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3050" calcext:value-type="float">
            <text:p>33050</text:p>
          </table:table-cell>
          <table:table-cell table:style-name="ce4"/>
          <table:table-cell table:style-name="ce7" table:formula="of:=[.A161]-[.A160]" office:value-type="time" office:time-value="PT00H02M55.489869271S" calcext:value-type="time">
            <text:p>00:02:55.49</text:p>
          </table:table-cell>
          <table:table-cell table:formula="of:=SUM([.F84:.F161])" office:value-type="time" office:time-value="PT00H05M00.083638122S" calcext:value-type="time">
            <text:p>00:05:00.08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2026-May-11 18:18:53.3852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162]-[.A161]" office:value-type="time" office:time-value="PT00H00M00.206761854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3.5985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163]-[.A162]" office:value-type="time" office:time-value="PT00H00M00.213297852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3.8064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164]-[.A163]" office:value-type="time" office:time-value="PT00H00M00.207970105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3.9857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165]-[.A164]" office:value-type="time" office:time-value="PT00H00M00.179256219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4.1990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/>
          <table:table-cell table:formula="of:=[.A166]-[.A165]" office:value-type="time" office:time-value="PT00H00M00.213292823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4.3781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167]-[.A166]" office:value-type="time" office:time-value="PT00H00M00.179055682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4.6492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168]-[.A167]" office:value-type="time" office:time-value="PT00H00M00.2711443S" calcext:value-type="time">
            <text:p>00:00:00.2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4.7993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169]-[.A168]" office:value-type="time" office:time-value="PT00H00M00.150116743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4.9784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/>
          <table:table-cell table:formula="of:=[.A170]-[.A169]" office:value-type="time" office:time-value="PT00H00M00.179107231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5.1839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171]-[.A170]" office:value-type="time" office:time-value="PT00H00M00.205483194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5.3997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/>
          <table:table-cell table:formula="of:=[.A172]-[.A171]" office:value-type="time" office:time-value="PT00H00M00.215769676S" calcext:value-type="time">
            <text:p>00:00:00.2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5.5788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/>
          <table:table-cell table:formula="of:=[.A173]-[.A172]" office:value-type="time" office:time-value="PT00H00M00.179122947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5.7239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/>
          <table:table-cell table:formula="of:=[.A174]-[.A173]" office:value-type="time" office:time-value="PT00H00M00.145118404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5.8792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/>
          <table:table-cell table:formula="of:=[.A175]-[.A174]" office:value-type="time" office:time-value="PT00H00M00.155255897S" calcext:value-type="time">
            <text:p>00:00:00.1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6.0583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/>
          <table:table-cell table:formula="of:=[.A176]-[.A175]" office:value-type="time" office:time-value="PT00H00M00.179112889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6.2059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/>
          <table:table-cell table:formula="of:=[.A177]-[.A176]" office:value-type="time" office:time-value="PT00H00M00.14762166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6.3888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/>
          <table:table-cell table:formula="of:=[.A178]-[.A177]" office:value-type="time" office:time-value="PT00H00M00.182872172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6.5377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/>
          <table:table-cell table:formula="of:=[.A179]-[.A178]" office:value-type="time" office:time-value="PT00H00M00.148877059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6.6890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/>
          <table:table-cell table:formula="of:=[.A180]-[.A179]" office:value-type="time" office:time-value="PT00H00M00.1513822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6.8971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/>
          <table:table-cell table:formula="of:=[.A181]-[.A180]" office:value-type="time" office:time-value="PT00H00M00.208038627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7.0788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/>
          <table:table-cell table:formula="of:=[.A182]-[.A181]" office:value-type="time" office:time-value="PT00H00M00.181695982S" calcext:value-type="time">
            <text:p>00:00:00.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7.2882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/>
          <table:table-cell table:formula="of:=[.A183]-[.A182]" office:value-type="time" office:time-value="PT00H00M00.209468161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7.4989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/>
          <table:table-cell table:formula="of:=[.A184]-[.A183]" office:value-type="time" office:time-value="PT00H00M00.21066824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7.7095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/>
          <table:table-cell table:formula="of:=[.A185]-[.A184]" office:value-type="time" office:time-value="PT00H00M00.210616691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7.8584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/>
          <table:table-cell table:formula="of:=[.A186]-[.A185]" office:value-type="time" office:time-value="PT00H00M00.148865115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8.0035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/>
          <table:table-cell table:formula="of:=[.A187]-[.A186]" office:value-type="time" office:time-value="PT00H00M00.145122805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8.1286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/>
          <table:table-cell table:formula="of:=[.A188]-[.A187]" office:value-type="time" office:time-value="PT00H00M00.125077274S" calcext:value-type="time">
            <text:p>00:00:00.1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8.2421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/>
          <table:table-cell table:formula="of:=[.A189]-[.A188]" office:value-type="time" office:time-value="PT00H00M00.113546709S" calcext:value-type="time">
            <text:p>00:00:00.1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8.3949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/>
          <table:table-cell table:formula="of:=[.A190]-[.A189]" office:value-type="time" office:time-value="PT00H00M00.152746355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8.5175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/>
          <table:table-cell table:formula="of:=[.A191]-[.A190]" office:value-type="time" office:time-value="PT00H00M00.122631225S" calcext:value-type="time">
            <text:p>00:00:00.1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8.6677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/>
          <table:table-cell table:formula="of:=[.A192]-[.A191]" office:value-type="time" office:time-value="PT00H00M00.150150689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8.7864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/>
          <table:table-cell table:formula="of:=[.A193]-[.A192]" office:value-type="time" office:time-value="PT00H00M00.118711009S" calcext:value-type="time">
            <text:p>00:00:00.1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8.932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/>
          <table:table-cell table:formula="of:=[.A194]-[.A193]" office:value-type="time" office:time-value="PT00H00M00.146405236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9.0892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/>
          <table:table-cell table:formula="of:=[.A195]-[.A194]" office:value-type="time" office:time-value="PT00H00M00.156462891S" calcext:value-type="time">
            <text:p>00:00:00.1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9.2974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/>
          <table:table-cell table:formula="of:=[.A196]-[.A195]" office:value-type="time" office:time-value="PT00H00M00.208138581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9.445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/>
          <table:table-cell table:formula="of:=[.A197]-[.A196]" office:value-type="time" office:time-value="PT00H00M00.147679495S" calcext:value-type="time">
            <text:p>00:00:00.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9.5374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/>
          <table:table-cell table:formula="of:=[.A198]-[.A197]" office:value-type="time" office:time-value="PT00H00M00.092362077S" calcext:value-type="time">
            <text:p>00:00:00.0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9.7441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/>
          <table:table-cell table:formula="of:=[.A199]-[.A198]" office:value-type="time" office:time-value="PT00H00M00.206698989S" calcext:value-type="time">
            <text:p>00:00:00.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9.8377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/>
          <table:table-cell table:formula="of:=[.A200]-[.A199]" office:value-type="time" office:time-value="PT00H00M00.093529467S" calcext:value-type="time">
            <text:p>00:00:00.0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8:59.9285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/>
          <table:table-cell table:formula="of:=[.A201]-[.A200]" office:value-type="time" office:time-value="PT00H00M00.090856478S" calcext:value-type="time">
            <text:p>00:00:00.0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9:00.6859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02]-[.A201]" office:value-type="time" office:time-value="PT00H00M00.757405744S" calcext:value-type="time">
            <text:p>00:00:00.7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9:03.6920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03]-[.A202]" office:value-type="time" office:time-value="PT00H00M03.006109851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9:06.7007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04]-[.A203]" office:value-type="time" office:time-value="PT00H00M03.008723119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9:09.7082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05]-[.A204]" office:value-type="time" office:time-value="PT00H00M03.007465834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9:13.6871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06]-[.A205]" office:value-type="time" office:time-value="PT00H00M03.978842078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9:16.6919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07]-[.A206]" office:value-type="time" office:time-value="PT00H00M03.004843136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9:19.70067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08]-[.A207]" office:value-type="time" office:time-value="PT00H00M03.008726891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9:22.707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09]-[.A208]" office:value-type="time" office:time-value="PT00H00M03.006469435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9:26.686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10]-[.A209]" office:value-type="time" office:time-value="PT00H00M03.978880425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9:29.6908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11]-[.A210]" office:value-type="time" office:time-value="PT00H00M03.00480416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9:32.6995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12]-[.A211]" office:value-type="time" office:time-value="PT00H00M03.008765238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9:35.7070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13]-[.A212]" office:value-type="time" office:time-value="PT00H00M03.007425601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9:39.6858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14]-[.A213]" office:value-type="time" office:time-value="PT00H00M03.978852136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9:42.6919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15]-[.A214]" office:value-type="time" office:time-value="PT00H00M03.006097279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9:45.7007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16]-[.A215]" office:value-type="time" office:time-value="PT00H00M03.008747636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9:48.709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17]-[.A216]" office:value-type="time" office:time-value="PT00H00M03.008684143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9:52.6870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18]-[.A217]" office:value-type="time" office:time-value="PT00H00M03.97763697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9:55.6905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19]-[.A218]" office:value-type="time" office:time-value="PT00H00M03.003550018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19:58.70056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20]-[.A219]" office:value-type="time" office:time-value="PT00H00M03.009975376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20:01.70806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21]-[.A220]" office:value-type="time" office:time-value="PT00H00M03.007505438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20:05.6868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22]-[.A221]" office:value-type="time" office:time-value="PT00H00M03.978804359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20:08.69297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23]-[.A222]" office:value-type="time" office:time-value="PT00H00M03.006097907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20:11.7004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24]-[.A223]" office:value-type="time" office:time-value="PT00H00M03.007477778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20:14.70916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25]-[.A224]" office:value-type="time" office:time-value="PT00H00M03.008721233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20:18.68674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26]-[.A225]" office:value-type="time" office:time-value="PT00H00M03.977577877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20:21.69160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27]-[.A226]" office:value-type="time" office:time-value="PT00H00M03.004855081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20:24.7003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28]-[.A227]" office:value-type="time" office:time-value="PT00H00M03.008713061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20:27.70908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29]-[.A228]" office:value-type="time" office:time-value="PT00H00M03.008774039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20:31.6866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30]-[.A229]" office:value-type="time" office:time-value="PT00H00M03.977582906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20:34.69147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31]-[.A230]" office:value-type="time" office:time-value="PT00H00M03.004807304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20:37.7028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32]-[.A231]" office:value-type="time" office:time-value="PT00H00M03.011354618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20:40.70910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33]-[.A232]" office:value-type="time" office:time-value="PT00H00M03.006275184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20:44.68789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34]-[.A233]" office:value-type="time" office:time-value="PT00H00M03.978784243S" calcext:value-type="time">
            <text:p>00:00:03.9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20:47.6926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35]-[.A234]" office:value-type="time" office:time-value="PT00H00M03.004751983S" calcext:value-type="time">
            <text:p>00:00:03.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20:50.70010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36]-[.A235]" office:value-type="time" office:time-value="PT00H00M03.007456404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20:53.71005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37]-[.A236]" office:value-type="time" office:time-value="PT00H00M03.009955259S" calcext:value-type="time">
            <text:p>00:00:03.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26-May-11 18:20:57.6926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A238]-[.A237]" office:value-type="time" office:time-value="PT00H00M03.982586903S" calcext:value-type="time">
            <text:p>00:00:03.98</text:p>
          </table:table-cell>
          <table:table-cell table:number-columns-repeated="7"/>
        </table:table-row>
        <table:table-row table:style-name="ro1" table:number-rows-repeated="104833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9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12T17:36:23.943497250</dc:date>
    <meta:editing-duration>PT25M16S</meta:editing-duration>
    <meta:editing-cycles>4</meta:editing-cycles>
    <meta:generator>LibreOffice/25.2.3.2$Linux_X86_64 LibreOffice_project/520$Build-2</meta:generator>
    <meta:document-statistic meta:table-count="1" meta:cell-count="1194" meta:object-count="0"/>
  </office:meta>
</office:document-meta>
</file>